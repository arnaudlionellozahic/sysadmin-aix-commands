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29.556cm" style:rel-width="100%" table:align="left" fo:background-color="#e0e0e0">
        <style:background-image/>
      </style:table-properties>
    </style:style>
    <style:style style:name="Tableau1.A" style:family="table-column">
      <style:table-column-properties style:column-width="29.556cm" style:rel-column-width="65535*"/>
    </style:style>
    <style:style style:name="Tableau1.A1" style:family="table-cell">
      <style:table-cell-properties style:vertical-align="middle" fo:padding="0.049cm" fo:border="none"/>
    </style:style>
    <style:style style:name="Tableau2" style:family="table">
      <style:table-properties style:width="29.556cm" style:rel-width="100%" table:align="left" fo:background-color="#e0e0e0">
        <style:background-image/>
      </style:table-properties>
    </style:style>
    <style:style style:name="Tableau2.A" style:family="table-column">
      <style:table-column-properties style:column-width="29.556cm" style:rel-column-width="65535*"/>
    </style:style>
    <style:style style:name="Tableau2.A1" style:family="table-cell">
      <style:table-cell-properties style:vertical-align="middle" fo:padding="0.049cm" fo:border="none"/>
    </style:style>
    <style:style style:name="Tableau3" style:family="table">
      <style:table-properties style:width="29.556cm" style:rel-width="100%" table:align="left" fo:background-color="#e0e0e0">
        <style:background-image/>
      </style:table-properties>
    </style:style>
    <style:style style:name="Tableau3.A" style:family="table-column">
      <style:table-column-properties style:column-width="29.556cm" style:rel-column-width="65535*"/>
    </style:style>
    <style:style style:name="Tableau3.A1" style:family="table-cell">
      <style:table-cell-properties style:vertical-align="middle" fo:padding="0.049cm" fo:border="none"/>
    </style:style>
    <style:style style:name="Tableau4" style:family="table">
      <style:table-properties style:width="29.556cm" style:rel-width="100%" table:align="left" fo:background-color="#e0e0e0">
        <style:background-image/>
      </style:table-properties>
    </style:style>
    <style:style style:name="Tableau4.A" style:family="table-column">
      <style:table-column-properties style:column-width="29.556cm" style:rel-column-width="65535*"/>
    </style:style>
    <style:style style:name="Tableau4.A1" style:family="table-cell">
      <style:table-cell-properties style:vertical-align="middle" fo:padding="0.049cm" fo:border="none"/>
    </style:style>
    <style:style style:name="Tableau5" style:family="table">
      <style:table-properties style:width="29.556cm" style:rel-width="100%" table:align="left" fo:background-color="#e0e0e0">
        <style:background-image/>
      </style:table-properties>
    </style:style>
    <style:style style:name="Tableau5.A" style:family="table-column">
      <style:table-column-properties style:column-width="29.556cm" style:rel-column-width="65535*"/>
    </style:style>
    <style:style style:name="Tableau5.A1" style:family="table-cell">
      <style:table-cell-properties style:vertical-align="middle" fo:padding="0.049cm" fo:border="none"/>
    </style:style>
    <style:style style:name="Tableau6" style:family="table">
      <style:table-properties style:width="29.556cm" style:rel-width="100%" table:align="left" fo:background-color="#e0e0e0">
        <style:background-image/>
      </style:table-properties>
    </style:style>
    <style:style style:name="Tableau6.A" style:family="table-column">
      <style:table-column-properties style:column-width="29.556cm" style:rel-column-width="65535*"/>
    </style:style>
    <style:style style:name="Tableau6.A1" style:family="table-cell">
      <style:table-cell-properties style:vertical-align="middle" fo:padding="0.049cm" fo:border="none"/>
    </style:style>
    <style:style style:name="Tableau7" style:family="table">
      <style:table-properties style:width="29.556cm" style:rel-width="100%" table:align="left" fo:background-color="#e0e0e0">
        <style:background-image/>
      </style:table-properties>
    </style:style>
    <style:style style:name="Tableau7.A" style:family="table-column">
      <style:table-column-properties style:column-width="29.556cm" style:rel-column-width="65535*"/>
    </style:style>
    <style:style style:name="Tableau7.A1" style:family="table-cell">
      <style:table-cell-properties style:vertical-align="middle" fo:padding="0.049cm" fo:border="none"/>
    </style:style>
    <style:style style:name="Tableau8" style:family="table">
      <style:table-properties style:width="29.556cm" style:rel-width="100%" table:align="left" fo:background-color="#e0e0e0">
        <style:background-image/>
      </style:table-properties>
    </style:style>
    <style:style style:name="Tableau8.A" style:family="table-column">
      <style:table-column-properties style:column-width="29.556cm" style:rel-column-width="65535*"/>
    </style:style>
    <style:style style:name="Tableau8.A1" style:family="table-cell">
      <style:table-cell-properties style:vertical-align="middle" fo:padding="0.049cm" fo:border="none"/>
    </style:style>
    <style:style style:name="Tableau9" style:family="table">
      <style:table-properties style:width="29.556cm" style:rel-width="100%" table:align="left" fo:background-color="#e0e0e0">
        <style:background-image/>
      </style:table-properties>
    </style:style>
    <style:style style:name="Tableau9.A" style:family="table-column">
      <style:table-column-properties style:column-width="29.556cm" style:rel-column-width="65535*"/>
    </style:style>
    <style:style style:name="Tableau9.A1" style:family="table-cell">
      <style:table-cell-properties style:vertical-align="middle" fo:padding="0.049cm" fo:border="none"/>
    </style:style>
    <style:style style:name="Tableau10" style:family="table">
      <style:table-properties style:width="29.556cm" style:rel-width="100%" table:align="left" fo:background-color="#e0e0e0">
        <style:background-image/>
      </style:table-properties>
    </style:style>
    <style:style style:name="Tableau10.A" style:family="table-column">
      <style:table-column-properties style:column-width="29.556cm" style:rel-column-width="65535*"/>
    </style:style>
    <style:style style:name="Tableau10.A1" style:family="table-cell">
      <style:table-cell-properties style:vertical-align="middle" fo:padding="0.049cm" fo:border="none"/>
    </style:style>
    <style:style style:name="Tableau11" style:family="table">
      <style:table-properties style:width="29.556cm" style:rel-width="100%" table:align="left" fo:background-color="#e0e0e0">
        <style:background-image/>
      </style:table-properties>
    </style:style>
    <style:style style:name="Tableau11.A" style:family="table-column">
      <style:table-column-properties style:column-width="29.556cm" style:rel-column-width="65535*"/>
    </style:style>
    <style:style style:name="Tableau11.A1" style:family="table-cell">
      <style:table-cell-properties style:vertical-align="middle" fo:padding="0.049cm" fo:border="none"/>
    </style:style>
    <style:style style:name="Tableau12" style:family="table">
      <style:table-properties style:width="29.556cm" style:rel-width="100%" table:align="left" fo:background-color="#e0e0e0">
        <style:background-image/>
      </style:table-properties>
    </style:style>
    <style:style style:name="Tableau12.A" style:family="table-column">
      <style:table-column-properties style:column-width="29.556cm" style:rel-column-width="65535*"/>
    </style:style>
    <style:style style:name="Tableau12.A1" style:family="table-cell">
      <style:table-cell-properties style:vertical-align="middle" fo:padding="0.049cm" fo:border="none"/>
    </style:style>
    <style:style style:name="Tableau13" style:family="table">
      <style:table-properties style:width="29.556cm" style:rel-width="100%" table:align="left" fo:background-color="#e0e0e0">
        <style:background-image/>
      </style:table-properties>
    </style:style>
    <style:style style:name="Tableau13.A" style:family="table-column">
      <style:table-column-properties style:column-width="29.556cm" style:rel-column-width="65535*"/>
    </style:style>
    <style:style style:name="Tableau13.A1" style:family="table-cell">
      <style:table-cell-properties style:vertical-align="middle" fo:padding="0.049cm" fo:border="none"/>
    </style:style>
    <style:style style:name="Tableau14" style:family="table">
      <style:table-properties style:width="29.556cm" style:rel-width="100%" table:align="left" fo:background-color="#e0e0e0">
        <style:background-image/>
      </style:table-properties>
    </style:style>
    <style:style style:name="Tableau14.A" style:family="table-column">
      <style:table-column-properties style:column-width="29.556cm" style:rel-column-width="65535*"/>
    </style:style>
    <style:style style:name="Tableau14.A1" style:family="table-cell">
      <style:table-cell-properties style:vertical-align="middle" fo:padding="0.049cm" fo:border="none"/>
    </style:style>
    <style:style style:name="Tableau15" style:family="table">
      <style:table-properties style:width="29.556cm" style:rel-width="100%" table:align="left" fo:background-color="#e0e0e0">
        <style:background-image/>
      </style:table-properties>
    </style:style>
    <style:style style:name="Tableau15.A" style:family="table-column">
      <style:table-column-properties style:column-width="29.556cm" style:rel-column-width="65535*"/>
    </style:style>
    <style:style style:name="Tableau15.A1" style:family="table-cell">
      <style:table-cell-properties style:vertical-align="middle" fo:padding="0.049cm" fo:border="none"/>
    </style:style>
    <style:style style:name="Tableau16" style:family="table">
      <style:table-properties style:width="29.556cm" style:rel-width="100%" table:align="left" fo:background-color="#e0e0e0">
        <style:background-image/>
      </style:table-properties>
    </style:style>
    <style:style style:name="Tableau16.A" style:family="table-column">
      <style:table-column-properties style:column-width="29.556cm" style:rel-column-width="65535*"/>
    </style:style>
    <style:style style:name="Tableau16.A1" style:family="table-cell">
      <style:table-cell-properties style:vertical-align="middle" fo:padding="0.049cm" fo:border="none"/>
    </style:style>
    <style:style style:name="Tableau17" style:family="table">
      <style:table-properties style:width="29.556cm" style:rel-width="100%" table:align="left" fo:background-color="#e0e0e0">
        <style:background-image/>
      </style:table-properties>
    </style:style>
    <style:style style:name="Tableau17.A" style:family="table-column">
      <style:table-column-properties style:column-width="29.556cm" style:rel-column-width="65535*"/>
    </style:style>
    <style:style style:name="Tableau17.A1" style:family="table-cell">
      <style:table-cell-properties style:vertical-align="middle" fo:padding="0.049cm" fo:border="none"/>
    </style:style>
    <style:style style:name="Tableau18" style:family="table">
      <style:table-properties style:width="29.556cm" style:rel-width="100%" table:align="left" fo:background-color="#e0e0e0">
        <style:background-image/>
      </style:table-properties>
    </style:style>
    <style:style style:name="Tableau18.A" style:family="table-column">
      <style:table-column-properties style:column-width="29.556cm" style:rel-column-width="65535*"/>
    </style:style>
    <style:style style:name="Tableau18.A1" style:family="table-cell">
      <style:table-cell-properties style:vertical-align="middle" fo:padding="0.049cm" fo:border="none"/>
    </style:style>
    <style:style style:name="Tableau19" style:family="table">
      <style:table-properties style:width="29.556cm" style:rel-width="100%" table:align="left" fo:background-color="#e0e0e0">
        <style:background-image/>
      </style:table-properties>
    </style:style>
    <style:style style:name="Tableau19.A" style:family="table-column">
      <style:table-column-properties style:column-width="29.556cm" style:rel-column-width="65535*"/>
    </style:style>
    <style:style style:name="Tableau19.A1" style:family="table-cell">
      <style:table-cell-properties style:vertical-align="middle" fo:padding="0.049cm" fo:border="none"/>
    </style:style>
    <style:style style:name="Tableau20" style:family="table">
      <style:table-properties style:width="29.556cm" style:rel-width="100%" table:align="left" fo:background-color="#e0e0e0">
        <style:background-image/>
      </style:table-properties>
    </style:style>
    <style:style style:name="Tableau20.A" style:family="table-column">
      <style:table-column-properties style:column-width="29.556cm" style:rel-column-width="65535*"/>
    </style:style>
    <style:style style:name="Tableau20.A1" style:family="table-cell">
      <style:table-cell-properties style:vertical-align="middle" fo:padding="0.049cm" fo:border="none"/>
    </style:style>
    <style:style style:name="Tableau21" style:family="table">
      <style:table-properties style:width="29.556cm" style:rel-width="100%" table:align="left" fo:background-color="#e0e0e0">
        <style:background-image/>
      </style:table-properties>
    </style:style>
    <style:style style:name="Tableau21.A" style:family="table-column">
      <style:table-column-properties style:column-width="29.556cm" style:rel-column-width="65535*"/>
    </style:style>
    <style:style style:name="Tableau21.A1" style:family="table-cell">
      <style:table-cell-properties style:vertical-align="middle" fo:padding="0.049cm" fo:border="none"/>
    </style:style>
    <style:style style:name="Tableau22" style:family="table">
      <style:table-properties style:width="29.556cm" style:rel-width="100%" table:align="left" fo:background-color="#e0e0e0">
        <style:background-image/>
      </style:table-properties>
    </style:style>
    <style:style style:name="Tableau22.A" style:family="table-column">
      <style:table-column-properties style:column-width="29.556cm" style:rel-column-width="65535*"/>
    </style:style>
    <style:style style:name="Tableau22.A1" style:family="table-cell">
      <style:table-cell-properties style:vertical-align="middle" fo:padding="0.049cm" fo:border="none"/>
    </style:style>
    <style:style style:name="Tableau23" style:family="table">
      <style:table-properties style:width="29.556cm" style:rel-width="100%" table:align="left" fo:background-color="#e0e0e0">
        <style:background-image/>
      </style:table-properties>
    </style:style>
    <style:style style:name="Tableau23.A" style:family="table-column">
      <style:table-column-properties style:column-width="29.556cm" style:rel-column-width="65535*"/>
    </style:style>
    <style:style style:name="Tableau23.A1" style:family="table-cell">
      <style:table-cell-properties style:vertical-align="middle" fo:padding="0.049cm" fo:border="none"/>
    </style:style>
    <style:style style:name="Tableau24" style:family="table">
      <style:table-properties style:width="29.556cm" style:rel-width="100%" table:align="left" fo:background-color="#e0e0e0">
        <style:background-image/>
      </style:table-properties>
    </style:style>
    <style:style style:name="Tableau24.A" style:family="table-column">
      <style:table-column-properties style:column-width="29.556cm" style:rel-column-width="65535*"/>
    </style:style>
    <style:style style:name="Tableau24.A1" style:family="table-cell">
      <style:table-cell-properties style:vertical-align="middle" fo:padding="0.049cm" fo:border="none"/>
    </style:style>
    <style:style style:name="Tableau25" style:family="table">
      <style:table-properties style:width="29.556cm" style:rel-width="100%" table:align="left" fo:background-color="#e0e0e0">
        <style:background-image/>
      </style:table-properties>
    </style:style>
    <style:style style:name="Tableau25.A" style:family="table-column">
      <style:table-column-properties style:column-width="29.556cm" style:rel-column-width="65535*"/>
    </style:style>
    <style:style style:name="Tableau25.A1" style:family="table-cell">
      <style:table-cell-properties style:vertical-align="middle" fo:padding="0.049cm" fo:border="none"/>
    </style:style>
    <style:style style:name="Tableau26" style:family="table">
      <style:table-properties style:width="29.556cm" style:rel-width="100%" table:align="left" fo:background-color="#e0e0e0">
        <style:background-image/>
      </style:table-properties>
    </style:style>
    <style:style style:name="Tableau26.A" style:family="table-column">
      <style:table-column-properties style:column-width="29.556cm" style:rel-column-width="65535*"/>
    </style:style>
    <style:style style:name="Tableau26.A1" style:family="table-cell">
      <style:table-cell-properties style:vertical-align="middle" fo:padding="0.049cm" fo:border="none"/>
    </style:style>
    <style:style style:name="Tableau27" style:family="table">
      <style:table-properties style:width="29.556cm" style:rel-width="100%" table:align="left" fo:background-color="#e0e0e0">
        <style:background-image/>
      </style:table-properties>
    </style:style>
    <style:style style:name="Tableau27.A" style:family="table-column">
      <style:table-column-properties style:column-width="29.556cm" style:rel-column-width="65535*"/>
    </style:style>
    <style:style style:name="Tableau27.A1" style:family="table-cell">
      <style:table-cell-properties style:vertical-align="middle" fo:padding="0.049cm" fo:border="none"/>
    </style:style>
    <style:style style:name="Tableau28" style:family="table">
      <style:table-properties style:width="29.556cm" style:rel-width="100%" table:align="left" fo:background-color="#e0e0e0">
        <style:background-image/>
      </style:table-properties>
    </style:style>
    <style:style style:name="Tableau28.A" style:family="table-column">
      <style:table-column-properties style:column-width="29.556cm" style:rel-column-width="65535*"/>
    </style:style>
    <style:style style:name="Tableau28.A1" style:family="table-cell">
      <style:table-cell-properties style:vertical-align="middle" fo:padding="0.049cm" fo:border="none"/>
    </style:style>
    <style:style style:name="Tableau29" style:family="table">
      <style:table-properties style:width="29.556cm" style:rel-width="100%" table:align="left" fo:background-color="#e0e0e0">
        <style:background-image/>
      </style:table-properties>
    </style:style>
    <style:style style:name="Tableau29.A" style:family="table-column">
      <style:table-column-properties style:column-width="29.556cm" style:rel-column-width="65535*"/>
    </style:style>
    <style:style style:name="Tableau29.A1" style:family="table-cell">
      <style:table-cell-properties style:vertical-align="middle" fo:padding="0.049cm" fo:border="none"/>
    </style:style>
    <style:style style:name="Tableau30" style:family="table">
      <style:table-properties style:width="29.556cm" style:rel-width="100%" table:align="left" fo:background-color="#e0e0e0">
        <style:background-image/>
      </style:table-properties>
    </style:style>
    <style:style style:name="Tableau30.A" style:family="table-column">
      <style:table-column-properties style:column-width="29.556cm" style:rel-column-width="65535*"/>
    </style:style>
    <style:style style:name="Tableau30.A1" style:family="table-cell">
      <style:table-cell-properties style:vertical-align="middle" fo:padding="0.049cm" fo:border="none"/>
    </style:style>
    <style:style style:name="Tableau31" style:family="table">
      <style:table-properties style:width="29.556cm" style:rel-width="100%" table:align="left" fo:background-color="#e0e0e0">
        <style:background-image/>
      </style:table-properties>
    </style:style>
    <style:style style:name="Tableau31.A" style:family="table-column">
      <style:table-column-properties style:column-width="29.556cm" style:rel-column-width="65535*"/>
    </style:style>
    <style:style style:name="Tableau31.A1" style:family="table-cell">
      <style:table-cell-properties style:vertical-align="middle" fo:padding="0.049cm" fo:border="none"/>
    </style:style>
    <style:style style:name="Tableau32" style:family="table">
      <style:table-properties style:width="29.556cm" style:rel-width="100%" table:align="left" fo:background-color="#e0e0e0">
        <style:background-image/>
      </style:table-properties>
    </style:style>
    <style:style style:name="Tableau32.A" style:family="table-column">
      <style:table-column-properties style:column-width="29.556cm" style:rel-column-width="65535*"/>
    </style:style>
    <style:style style:name="Tableau32.A1" style:family="table-cell">
      <style:table-cell-properties style:vertical-align="middle" fo:padding="0.049cm" fo:border="none"/>
    </style:style>
    <style:style style:name="Tableau33" style:family="table">
      <style:table-properties style:width="29.556cm" style:rel-width="100%" table:align="left" fo:background-color="#e0e0e0">
        <style:background-image/>
      </style:table-properties>
    </style:style>
    <style:style style:name="Tableau33.A" style:family="table-column">
      <style:table-column-properties style:column-width="29.556cm" style:rel-column-width="65535*"/>
    </style:style>
    <style:style style:name="Tableau33.A1" style:family="table-cell">
      <style:table-cell-properties style:vertical-align="middle" fo:padding="0.049cm" fo:border="none"/>
    </style:style>
    <style:style style:name="Tableau34" style:family="table">
      <style:table-properties style:width="29.556cm" style:rel-width="100%" table:align="left" fo:background-color="#e0e0e0">
        <style:background-image/>
      </style:table-properties>
    </style:style>
    <style:style style:name="Tableau34.A" style:family="table-column">
      <style:table-column-properties style:column-width="29.556cm" style:rel-column-width="65535*"/>
    </style:style>
    <style:style style:name="Tableau34.A1" style:family="table-cell">
      <style:table-cell-properties style:vertical-align="middle" fo:padding="0.049cm" fo:border="none"/>
    </style:style>
    <style:style style:name="Tableau35" style:family="table">
      <style:table-properties style:width="29.556cm" style:rel-width="100%" table:align="left" fo:background-color="#e0e0e0">
        <style:background-image/>
      </style:table-properties>
    </style:style>
    <style:style style:name="Tableau35.A" style:family="table-column">
      <style:table-column-properties style:column-width="29.556cm" style:rel-column-width="65535*"/>
    </style:style>
    <style:style style:name="Tableau35.A1" style:family="table-cell">
      <style:table-cell-properties style:vertical-align="middle" fo:padding="0.049cm" fo:border="none"/>
    </style:style>
    <style:style style:name="Tableau36" style:family="table">
      <style:table-properties style:width="29.556cm" style:rel-width="100%" table:align="left" fo:background-color="#e0e0e0">
        <style:background-image/>
      </style:table-properties>
    </style:style>
    <style:style style:name="Tableau36.A" style:family="table-column">
      <style:table-column-properties style:column-width="29.556cm" style:rel-column-width="65535*"/>
    </style:style>
    <style:style style:name="Tableau36.A1" style:family="table-cell">
      <style:table-cell-properties style:vertical-align="middle" fo:padding="0.049cm" fo:border="none"/>
    </style:style>
    <style:style style:name="Tableau37" style:family="table">
      <style:table-properties style:width="29.556cm" style:rel-width="100%" table:align="left" fo:background-color="#e0e0e0">
        <style:background-image/>
      </style:table-properties>
    </style:style>
    <style:style style:name="Tableau37.A" style:family="table-column">
      <style:table-column-properties style:column-width="29.556cm" style:rel-column-width="65535*"/>
    </style:style>
    <style:style style:name="Tableau37.A1" style:family="table-cell">
      <style:table-cell-properties style:vertical-align="middle" fo:padding="0.049cm" fo:border="none"/>
    </style:style>
    <style:style style:name="Tableau38" style:family="table">
      <style:table-properties style:width="29.556cm" style:rel-width="100%" table:align="left" fo:background-color="#e0e0e0">
        <style:background-image/>
      </style:table-properties>
    </style:style>
    <style:style style:name="Tableau38.A" style:family="table-column">
      <style:table-column-properties style:column-width="29.556cm" style:rel-column-width="65535*"/>
    </style:style>
    <style:style style:name="Tableau38.A1" style:family="table-cell">
      <style:table-cell-properties style:vertical-align="middle" fo:padding="0.049cm" fo:border="none"/>
    </style:style>
    <style:style style:name="Tableau39" style:family="table">
      <style:table-properties style:width="29.556cm" style:rel-width="100%" table:align="left" fo:background-color="#e0e0e0">
        <style:background-image/>
      </style:table-properties>
    </style:style>
    <style:style style:name="Tableau39.A" style:family="table-column">
      <style:table-column-properties style:column-width="29.556cm" style:rel-column-width="65535*"/>
    </style:style>
    <style:style style:name="Tableau39.A1" style:family="table-cell">
      <style:table-cell-properties style:vertical-align="middle" fo:padding="0.049cm" fo:border="none"/>
    </style:style>
    <style:style style:name="Tableau40" style:family="table">
      <style:table-properties style:width="29.556cm" style:rel-width="100%" table:align="left" fo:background-color="#e0e0e0">
        <style:background-image/>
      </style:table-properties>
    </style:style>
    <style:style style:name="Tableau40.A" style:family="table-column">
      <style:table-column-properties style:column-width="29.556cm" style:rel-column-width="65535*"/>
    </style:style>
    <style:style style:name="Tableau40.A1" style:family="table-cell">
      <style:table-cell-properties style:vertical-align="middle" fo:padding="0.049cm" fo:border="none"/>
    </style:style>
    <style:style style:name="Tableau41" style:family="table">
      <style:table-properties style:width="29.556cm" style:rel-width="100%" table:align="left" fo:background-color="#e0e0e0">
        <style:background-image/>
      </style:table-properties>
    </style:style>
    <style:style style:name="Tableau41.A" style:family="table-column">
      <style:table-column-properties style:column-width="29.556cm" style:rel-column-width="65535*"/>
    </style:style>
    <style:style style:name="Tableau41.A1" style:family="table-cell">
      <style:table-cell-properties style:vertical-align="middle" fo:padding="0.049cm" fo:border="none"/>
    </style:style>
    <style:style style:name="Tableau42" style:family="table">
      <style:table-properties style:width="29.556cm" style:rel-width="100%" table:align="left" fo:background-color="#e0e0e0">
        <style:background-image/>
      </style:table-properties>
    </style:style>
    <style:style style:name="Tableau42.A" style:family="table-column">
      <style:table-column-properties style:column-width="29.556cm" style:rel-column-width="65535*"/>
    </style:style>
    <style:style style:name="Tableau42.A1" style:family="table-cell">
      <style:table-cell-properties style:vertical-align="middle" fo:padding="0.049cm" fo:border="none"/>
    </style:style>
    <style:style style:name="Tableau43" style:family="table">
      <style:table-properties style:width="29.556cm" style:rel-width="100%" table:align="left" fo:background-color="#e0e0e0">
        <style:background-image/>
      </style:table-properties>
    </style:style>
    <style:style style:name="Tableau43.A" style:family="table-column">
      <style:table-column-properties style:column-width="29.556cm" style:rel-column-width="65535*"/>
    </style:style>
    <style:style style:name="Tableau43.A1" style:family="table-cell">
      <style:table-cell-properties style:vertical-align="middle" fo:padding="0.049cm" fo:border="none"/>
    </style:style>
    <style:style style:name="Tableau44" style:family="table">
      <style:table-properties style:width="29.556cm" style:rel-width="100%" table:align="left" fo:background-color="#e0e0e0">
        <style:background-image/>
      </style:table-properties>
    </style:style>
    <style:style style:name="Tableau44.A" style:family="table-column">
      <style:table-column-properties style:column-width="29.556cm" style:rel-column-width="65535*"/>
    </style:style>
    <style:style style:name="Tableau44.A1" style:family="table-cell">
      <style:table-cell-properties style:vertical-align="middle" fo:padding="0.049cm" fo:border="none"/>
    </style:style>
    <style:style style:name="Tableau45" style:family="table">
      <style:table-properties style:width="29.556cm" style:rel-width="100%" table:align="left" fo:background-color="#e0e0e0">
        <style:background-image/>
      </style:table-properties>
    </style:style>
    <style:style style:name="Tableau45.A" style:family="table-column">
      <style:table-column-properties style:column-width="29.556cm" style:rel-column-width="65535*"/>
    </style:style>
    <style:style style:name="Tableau45.A1" style:family="table-cell">
      <style:table-cell-properties style:vertical-align="middle" fo:padding="0.049cm" fo:border="none"/>
    </style:style>
    <style:style style:name="Tableau46" style:family="table">
      <style:table-properties style:width="29.556cm" style:rel-width="100%" table:align="left" fo:background-color="#e0e0e0">
        <style:background-image/>
      </style:table-properties>
    </style:style>
    <style:style style:name="Tableau46.A" style:family="table-column">
      <style:table-column-properties style:column-width="29.556cm" style:rel-column-width="65535*"/>
    </style:style>
    <style:style style:name="Tableau46.A1" style:family="table-cell">
      <style:table-cell-properties style:vertical-align="middle" fo:padding="0.049cm" fo:border="none"/>
    </style:style>
    <style:style style:name="Tableau47" style:family="table">
      <style:table-properties style:width="29.556cm" style:rel-width="100%" table:align="left" fo:background-color="#e0e0e0">
        <style:background-image/>
      </style:table-properties>
    </style:style>
    <style:style style:name="Tableau47.A" style:family="table-column">
      <style:table-column-properties style:column-width="29.556cm" style:rel-column-width="65535*"/>
    </style:style>
    <style:style style:name="Tableau47.A1" style:family="table-cell">
      <style:table-cell-properties style:vertical-align="middle" fo:padding="0.049cm" fo:border="none"/>
    </style:style>
    <style:style style:name="Tableau48" style:family="table">
      <style:table-properties style:width="29.556cm" style:rel-width="100%" table:align="left" fo:background-color="#e0e0e0">
        <style:background-image/>
      </style:table-properties>
    </style:style>
    <style:style style:name="Tableau48.A" style:family="table-column">
      <style:table-column-properties style:column-width="29.556cm" style:rel-column-width="65535*"/>
    </style:style>
    <style:style style:name="Tableau48.A1" style:family="table-cell">
      <style:table-cell-properties style:vertical-align="middle" fo:padding="0.049cm" fo:border="none"/>
    </style:style>
    <style:style style:name="Tableau49" style:family="table">
      <style:table-properties style:width="29.556cm" style:rel-width="100%" table:align="left" fo:background-color="#e0e0e0">
        <style:background-image/>
      </style:table-properties>
    </style:style>
    <style:style style:name="Tableau49.A" style:family="table-column">
      <style:table-column-properties style:column-width="29.556cm" style:rel-column-width="65535*"/>
    </style:style>
    <style:style style:name="Tableau49.A1" style:family="table-cell">
      <style:table-cell-properties style:vertical-align="middle" fo:padding="0.049cm" fo:border="none"/>
    </style:style>
    <style:style style:name="Tableau50" style:family="table">
      <style:table-properties style:width="29.556cm" style:rel-width="100%" table:align="left" fo:background-color="#e0e0e0">
        <style:background-image/>
      </style:table-properties>
    </style:style>
    <style:style style:name="Tableau50.A" style:family="table-column">
      <style:table-column-properties style:column-width="29.556cm" style:rel-column-width="65535*"/>
    </style:style>
    <style:style style:name="Tableau50.A1" style:family="table-cell">
      <style:table-cell-properties style:vertical-align="middle" fo:padding="0.049cm" fo:border="none"/>
    </style:style>
    <style:style style:name="Tableau51" style:family="table">
      <style:table-properties style:width="29.556cm" style:rel-width="100%" table:align="left" fo:background-color="#e0e0e0">
        <style:background-image/>
      </style:table-properties>
    </style:style>
    <style:style style:name="Tableau51.A" style:family="table-column">
      <style:table-column-properties style:column-width="29.556cm" style:rel-column-width="65535*"/>
    </style:style>
    <style:style style:name="Tableau51.A1" style:family="table-cell">
      <style:table-cell-properties style:vertical-align="middle" fo:padding="0.049cm" fo:border="none"/>
    </style:style>
    <style:style style:name="Tableau52" style:family="table">
      <style:table-properties style:width="29.556cm" style:rel-width="100%" table:align="left" fo:background-color="#e0e0e0">
        <style:background-image/>
      </style:table-properties>
    </style:style>
    <style:style style:name="Tableau52.A" style:family="table-column">
      <style:table-column-properties style:column-width="29.556cm" style:rel-column-width="65535*"/>
    </style:style>
    <style:style style:name="Tableau52.A1" style:family="table-cell">
      <style:table-cell-properties style:vertical-align="middle" fo:padding="0.049cm" fo:border="none"/>
    </style:style>
    <style:style style:name="Tableau53" style:family="table">
      <style:table-properties style:width="29.556cm" style:rel-width="100%" table:align="left" fo:background-color="#e0e0e0">
        <style:background-image/>
      </style:table-properties>
    </style:style>
    <style:style style:name="Tableau53.A" style:family="table-column">
      <style:table-column-properties style:column-width="29.556cm" style:rel-column-width="65535*"/>
    </style:style>
    <style:style style:name="Tableau53.A1" style:family="table-cell">
      <style:table-cell-properties style:vertical-align="middle" fo:padding="0.049cm" fo:border="none"/>
    </style:style>
    <style:style style:name="Tableau54" style:family="table">
      <style:table-properties style:width="29.556cm" style:rel-width="100%" table:align="left" fo:background-color="#e0e0e0">
        <style:background-image/>
      </style:table-properties>
    </style:style>
    <style:style style:name="Tableau54.A" style:family="table-column">
      <style:table-column-properties style:column-width="29.556cm" style:rel-column-width="65535*"/>
    </style:style>
    <style:style style:name="Tableau54.A1" style:family="table-cell">
      <style:table-cell-properties style:vertical-align="middle" fo:padding="0.049cm" fo:border="none"/>
    </style:style>
    <style:style style:name="Tableau55" style:family="table">
      <style:table-properties style:width="29.556cm" style:rel-width="100%" table:align="left" fo:background-color="#e0e0e0">
        <style:background-image/>
      </style:table-properties>
    </style:style>
    <style:style style:name="Tableau55.A" style:family="table-column">
      <style:table-column-properties style:column-width="29.556cm" style:rel-column-width="65535*"/>
    </style:style>
    <style:style style:name="Tableau55.A1" style:family="table-cell">
      <style:table-cell-properties style:vertical-align="middle" fo:padding="0.049cm" fo:border="none"/>
    </style:style>
    <style:style style:name="Tableau56" style:family="table">
      <style:table-properties style:width="29.556cm" style:rel-width="100%" table:align="left" fo:background-color="#e0e0e0">
        <style:background-image/>
      </style:table-properties>
    </style:style>
    <style:style style:name="Tableau56.A" style:family="table-column">
      <style:table-column-properties style:column-width="29.556cm" style:rel-column-width="65535*"/>
    </style:style>
    <style:style style:name="Tableau56.A1" style:family="table-cell">
      <style:table-cell-properties style:vertical-align="middle" fo:padding="0.049cm" fo:border="none"/>
    </style:style>
    <style:style style:name="Tableau57" style:family="table">
      <style:table-properties style:width="29.556cm" style:rel-width="100%" table:align="left" fo:background-color="#e0e0e0">
        <style:background-image/>
      </style:table-properties>
    </style:style>
    <style:style style:name="Tableau57.A" style:family="table-column">
      <style:table-column-properties style:column-width="29.556cm" style:rel-column-width="65535*"/>
    </style:style>
    <style:style style:name="Tableau57.A1" style:family="table-cell">
      <style:table-cell-properties style:vertical-align="middle" fo:padding="0.049cm" fo:border="none"/>
    </style:style>
    <style:style style:name="Tableau58" style:family="table">
      <style:table-properties style:width="29.556cm" style:rel-width="100%" table:align="left" fo:background-color="#e0e0e0">
        <style:background-image/>
      </style:table-properties>
    </style:style>
    <style:style style:name="Tableau58.A" style:family="table-column">
      <style:table-column-properties style:column-width="29.556cm" style:rel-column-width="65535*"/>
    </style:style>
    <style:style style:name="Tableau58.A1" style:family="table-cell">
      <style:table-cell-properties style:vertical-align="middle" fo:padding="0.049cm" fo:border="none"/>
    </style:style>
    <style:style style:name="Tableau59" style:family="table">
      <style:table-properties style:width="29.556cm" style:rel-width="100%" table:align="left" fo:background-color="#e0e0e0">
        <style:background-image/>
      </style:table-properties>
    </style:style>
    <style:style style:name="Tableau59.A" style:family="table-column">
      <style:table-column-properties style:column-width="29.556cm" style:rel-column-width="65535*"/>
    </style:style>
    <style:style style:name="Tableau59.A1" style:family="table-cell">
      <style:table-cell-properties style:vertical-align="middle" fo:padding="0.049cm" fo:border="none"/>
    </style:style>
    <style:style style:name="Tableau60" style:family="table">
      <style:table-properties style:width="29.556cm" style:rel-width="100%" table:align="left" fo:background-color="#e0e0e0">
        <style:background-image/>
      </style:table-properties>
    </style:style>
    <style:style style:name="Tableau60.A" style:family="table-column">
      <style:table-column-properties style:column-width="29.556cm" style:rel-column-width="65535*"/>
    </style:style>
    <style:style style:name="Tableau60.A1" style:family="table-cell">
      <style:table-cell-properties style:vertical-align="middle" fo:padding="0.049cm" fo:border="none"/>
    </style:style>
    <style:style style:name="Tableau61" style:family="table">
      <style:table-properties style:width="29.556cm" style:rel-width="100%" table:align="left" fo:background-color="#e0e0e0">
        <style:background-image/>
      </style:table-properties>
    </style:style>
    <style:style style:name="Tableau61.A" style:family="table-column">
      <style:table-column-properties style:column-width="29.556cm" style:rel-column-width="65535*"/>
    </style:style>
    <style:style style:name="Tableau61.A1" style:family="table-cell">
      <style:table-cell-properties style:vertical-align="middle" fo:padding="0.049cm" fo:border="none"/>
    </style:style>
    <style:style style:name="Tableau62" style:family="table">
      <style:table-properties style:width="29.556cm" style:rel-width="100%" table:align="left" fo:background-color="#e0e0e0">
        <style:background-image/>
      </style:table-properties>
    </style:style>
    <style:style style:name="Tableau62.A" style:family="table-column">
      <style:table-column-properties style:column-width="29.556cm" style:rel-column-width="65535*"/>
    </style:style>
    <style:style style:name="Tableau62.A1" style:family="table-cell">
      <style:table-cell-properties style:vertical-align="middle" fo:padding="0.049cm" fo:border="none"/>
    </style:style>
    <style:style style:name="Tableau63" style:family="table">
      <style:table-properties style:width="29.556cm" style:rel-width="100%" table:align="left" fo:background-color="#e0e0e0">
        <style:background-image/>
      </style:table-properties>
    </style:style>
    <style:style style:name="Tableau63.A" style:family="table-column">
      <style:table-column-properties style:column-width="29.556cm" style:rel-column-width="65535*"/>
    </style:style>
    <style:style style:name="Tableau63.A1" style:family="table-cell">
      <style:table-cell-properties style:vertical-align="middle" fo:padding="0.049cm" fo:border="none"/>
    </style:style>
    <style:style style:name="Tableau64" style:family="table">
      <style:table-properties style:width="29.556cm" style:rel-width="100%" table:align="left" fo:background-color="#e0e0e0">
        <style:background-image/>
      </style:table-properties>
    </style:style>
    <style:style style:name="Tableau64.A" style:family="table-column">
      <style:table-column-properties style:column-width="29.556cm" style:rel-column-width="65535*"/>
    </style:style>
    <style:style style:name="Tableau64.A1" style:family="table-cell">
      <style:table-cell-properties style:vertical-align="middle" fo:padding="0.049cm" fo:border="none"/>
    </style:style>
    <style:style style:name="Tableau65" style:family="table">
      <style:table-properties style:width="29.556cm" style:rel-width="100%" table:align="left" fo:background-color="#e0e0e0">
        <style:background-image/>
      </style:table-properties>
    </style:style>
    <style:style style:name="Tableau65.A" style:family="table-column">
      <style:table-column-properties style:column-width="29.556cm" style:rel-column-width="65535*"/>
    </style:style>
    <style:style style:name="Tableau65.A1" style:family="table-cell">
      <style:table-cell-properties style:vertical-align="middle" fo:padding="0.049cm" fo:border="none"/>
    </style:style>
    <style:style style:name="Tableau66" style:family="table">
      <style:table-properties style:width="29.556cm" style:rel-width="100%" table:align="left" fo:background-color="#e0e0e0">
        <style:background-image/>
      </style:table-properties>
    </style:style>
    <style:style style:name="Tableau66.A" style:family="table-column">
      <style:table-column-properties style:column-width="29.556cm" style:rel-column-width="65535*"/>
    </style:style>
    <style:style style:name="Tableau66.A1" style:family="table-cell">
      <style:table-cell-properties style:vertical-align="middle" fo:padding="0.049cm" fo:border="none"/>
    </style:style>
    <style:style style:name="Tableau67" style:family="table">
      <style:table-properties style:width="29.556cm" style:rel-width="100%" table:align="left" fo:background-color="#e0e0e0">
        <style:background-image/>
      </style:table-properties>
    </style:style>
    <style:style style:name="Tableau67.A" style:family="table-column">
      <style:table-column-properties style:column-width="29.556cm" style:rel-column-width="65535*"/>
    </style:style>
    <style:style style:name="Tableau67.A1" style:family="table-cell">
      <style:table-cell-properties style:vertical-align="middle" fo:padding="0.049cm" fo:border="none"/>
    </style:style>
    <style:style style:name="Tableau68" style:family="table">
      <style:table-properties style:width="29.556cm" style:rel-width="100%" table:align="left" fo:background-color="#e0e0e0">
        <style:background-image/>
      </style:table-properties>
    </style:style>
    <style:style style:name="Tableau68.A" style:family="table-column">
      <style:table-column-properties style:column-width="29.556cm" style:rel-column-width="65535*"/>
    </style:style>
    <style:style style:name="Tableau68.A1" style:family="table-cell">
      <style:table-cell-properties style:vertical-align="middle" fo:padding="0.049cm" fo:border="none"/>
    </style:style>
    <style:style style:name="Tableau69" style:family="table">
      <style:table-properties style:width="29.556cm" style:rel-width="100%" table:align="left" fo:background-color="#e0e0e0">
        <style:background-image/>
      </style:table-properties>
    </style:style>
    <style:style style:name="Tableau69.A" style:family="table-column">
      <style:table-column-properties style:column-width="29.556cm" style:rel-column-width="65535*"/>
    </style:style>
    <style:style style:name="Tableau69.A1" style:family="table-cell">
      <style:table-cell-properties style:vertical-align="middle" fo:padding="0.049cm" fo:border="none"/>
    </style:style>
    <style:style style:name="Tableau70" style:family="table">
      <style:table-properties style:width="29.556cm" style:rel-width="100%" table:align="left" fo:background-color="#e0e0e0">
        <style:background-image/>
      </style:table-properties>
    </style:style>
    <style:style style:name="Tableau70.A" style:family="table-column">
      <style:table-column-properties style:column-width="29.556cm" style:rel-column-width="65535*"/>
    </style:style>
    <style:style style:name="Tableau70.A1" style:family="table-cell">
      <style:table-cell-properties style:vertical-align="middle" fo:padding="0.049cm" fo:border="none"/>
    </style:style>
    <style:style style:name="Tableau71" style:family="table">
      <style:table-properties style:width="29.556cm" style:rel-width="100%" table:align="left" fo:background-color="#e0e0e0">
        <style:background-image/>
      </style:table-properties>
    </style:style>
    <style:style style:name="Tableau71.A" style:family="table-column">
      <style:table-column-properties style:column-width="29.556cm" style:rel-column-width="65535*"/>
    </style:style>
    <style:style style:name="Tableau71.A1" style:family="table-cell">
      <style:table-cell-properties style:vertical-align="middle" fo:padding="0.049cm" fo:border="none"/>
    </style:style>
    <style:style style:name="Tableau72" style:family="table">
      <style:table-properties style:width="29.556cm" style:rel-width="100%" table:align="left" fo:background-color="#e0e0e0">
        <style:background-image/>
      </style:table-properties>
    </style:style>
    <style:style style:name="Tableau72.A" style:family="table-column">
      <style:table-column-properties style:column-width="29.556cm" style:rel-column-width="65535*"/>
    </style:style>
    <style:style style:name="Tableau72.A1" style:family="table-cell">
      <style:table-cell-properties style:vertical-align="middle" fo:padding="0.049cm" fo:border="none"/>
    </style:style>
    <style:style style:name="Tableau73" style:family="table">
      <style:table-properties style:width="29.556cm" style:rel-width="100%" table:align="left" fo:background-color="#e0e0e0">
        <style:background-image/>
      </style:table-properties>
    </style:style>
    <style:style style:name="Tableau73.A" style:family="table-column">
      <style:table-column-properties style:column-width="29.556cm" style:rel-column-width="65535*"/>
    </style:style>
    <style:style style:name="Tableau73.A1" style:family="table-cell">
      <style:table-cell-properties style:vertical-align="middle" fo:padding="0.049cm" fo:border="none"/>
    </style:style>
    <style:style style:name="Tableau74" style:family="table">
      <style:table-properties style:width="29.556cm" style:rel-width="100%" table:align="left" fo:background-color="#e0e0e0">
        <style:background-image/>
      </style:table-properties>
    </style:style>
    <style:style style:name="Tableau74.A" style:family="table-column">
      <style:table-column-properties style:column-width="29.556cm" style:rel-column-width="65535*"/>
    </style:style>
    <style:style style:name="Tableau74.A1" style:family="table-cell">
      <style:table-cell-properties style:vertical-align="middle" fo:padding="0.049cm" fo:border="none"/>
    </style:style>
    <style:style style:name="Tableau75" style:family="table">
      <style:table-properties style:width="29.556cm" style:rel-width="100%" table:align="left" fo:background-color="#e0e0e0">
        <style:background-image/>
      </style:table-properties>
    </style:style>
    <style:style style:name="Tableau75.A" style:family="table-column">
      <style:table-column-properties style:column-width="29.556cm" style:rel-column-width="65535*"/>
    </style:style>
    <style:style style:name="Tableau75.A1" style:family="table-cell">
      <style:table-cell-properties style:vertical-align="middle" fo:padding="0.049cm" fo:border="none"/>
    </style:style>
    <style:style style:name="Tableau76" style:family="table">
      <style:table-properties style:width="29.556cm" style:rel-width="100%" table:align="left" fo:background-color="#e0e0e0">
        <style:background-image/>
      </style:table-properties>
    </style:style>
    <style:style style:name="Tableau76.A" style:family="table-column">
      <style:table-column-properties style:column-width="29.556cm" style:rel-column-width="65535*"/>
    </style:style>
    <style:style style:name="Tableau76.A1" style:family="table-cell">
      <style:table-cell-properties style:vertical-align="middle" fo:padding="0.049cm" fo:border="none"/>
    </style:style>
    <style:style style:name="Tableau77" style:family="table">
      <style:table-properties style:width="29.556cm" style:rel-width="100%" table:align="left" fo:background-color="#e0e0e0">
        <style:background-image/>
      </style:table-properties>
    </style:style>
    <style:style style:name="Tableau77.A" style:family="table-column">
      <style:table-column-properties style:column-width="29.556cm" style:rel-column-width="65535*"/>
    </style:style>
    <style:style style:name="Tableau77.A1" style:family="table-cell">
      <style:table-cell-properties style:vertical-align="middle" fo:padding="0.049cm" fo:border="none"/>
    </style:style>
    <style:style style:name="Tableau78" style:family="table">
      <style:table-properties style:width="29.556cm" style:rel-width="100%" table:align="left" fo:background-color="#e0e0e0">
        <style:background-image/>
      </style:table-properties>
    </style:style>
    <style:style style:name="Tableau78.A" style:family="table-column">
      <style:table-column-properties style:column-width="29.556cm" style:rel-column-width="65535*"/>
    </style:style>
    <style:style style:name="Tableau78.A1" style:family="table-cell">
      <style:table-cell-properties style:vertical-align="middle" fo:padding="0.049cm" fo:border="none"/>
    </style:style>
    <style:style style:name="Tableau79" style:family="table">
      <style:table-properties style:width="29.556cm" style:rel-width="100%" table:align="left" fo:background-color="#e0e0e0">
        <style:background-image/>
      </style:table-properties>
    </style:style>
    <style:style style:name="Tableau79.A" style:family="table-column">
      <style:table-column-properties style:column-width="29.556cm" style:rel-column-width="65535*"/>
    </style:style>
    <style:style style:name="Tableau79.A1" style:family="table-cell">
      <style:table-cell-properties style:vertical-align="middle" fo:padding="0.049cm" fo:border="none"/>
    </style:style>
    <style:style style:name="Tableau80" style:family="table">
      <style:table-properties style:width="29.556cm" style:rel-width="100%" table:align="left" fo:background-color="#e0e0e0">
        <style:background-image/>
      </style:table-properties>
    </style:style>
    <style:style style:name="Tableau80.A" style:family="table-column">
      <style:table-column-properties style:column-width="29.556cm" style:rel-column-width="65535*"/>
    </style:style>
    <style:style style:name="Tableau80.A1" style:family="table-cell">
      <style:table-cell-properties style:vertical-align="middle" fo:padding="0.049cm" fo:border="none"/>
    </style:style>
    <style:style style:name="Tableau81" style:family="table">
      <style:table-properties style:width="29.556cm" style:rel-width="100%" table:align="left" fo:background-color="#e0e0e0">
        <style:background-image/>
      </style:table-properties>
    </style:style>
    <style:style style:name="Tableau81.A" style:family="table-column">
      <style:table-column-properties style:column-width="29.556cm" style:rel-column-width="65535*"/>
    </style:style>
    <style:style style:name="Tableau81.A1" style:family="table-cell">
      <style:table-cell-properties style:vertical-align="middle" fo:padding="0.049cm" fo:border="none"/>
    </style:style>
    <style:style style:name="Tableau82" style:family="table">
      <style:table-properties style:width="29.556cm" style:rel-width="100%" table:align="left" fo:background-color="#e0e0e0">
        <style:background-image/>
      </style:table-properties>
    </style:style>
    <style:style style:name="Tableau82.A" style:family="table-column">
      <style:table-column-properties style:column-width="29.556cm" style:rel-column-width="65535*"/>
    </style:style>
    <style:style style:name="Tableau82.A1" style:family="table-cell">
      <style:table-cell-properties style:vertical-align="middle" fo:padding="0.049cm" fo:border="none"/>
    </style:style>
    <style:style style:name="Tableau83" style:family="table">
      <style:table-properties style:width="29.556cm" style:rel-width="100%" table:align="left" fo:background-color="#e0e0e0">
        <style:background-image/>
      </style:table-properties>
    </style:style>
    <style:style style:name="Tableau83.A" style:family="table-column">
      <style:table-column-properties style:column-width="29.556cm" style:rel-column-width="65535*"/>
    </style:style>
    <style:style style:name="Tableau83.A1" style:family="table-cell">
      <style:table-cell-properties style:vertical-align="middle" fo:padding="0.049cm" fo:border="none"/>
    </style:style>
    <style:style style:name="Tableau84" style:family="table">
      <style:table-properties style:width="29.556cm" style:rel-width="100%" table:align="left" fo:background-color="#e0e0e0">
        <style:background-image/>
      </style:table-properties>
    </style:style>
    <style:style style:name="Tableau84.A" style:family="table-column">
      <style:table-column-properties style:column-width="29.556cm" style:rel-column-width="65535*"/>
    </style:style>
    <style:style style:name="Tableau84.A1" style:family="table-cell">
      <style:table-cell-properties style:vertical-align="middle" fo:padding="0.049cm" fo:border="none"/>
    </style:style>
    <style:style style:name="Tableau85" style:family="table">
      <style:table-properties style:width="29.556cm" style:rel-width="100%" table:align="left" fo:background-color="#e0e0e0">
        <style:background-image/>
      </style:table-properties>
    </style:style>
    <style:style style:name="Tableau85.A" style:family="table-column">
      <style:table-column-properties style:column-width="29.556cm" style:rel-column-width="65535*"/>
    </style:style>
    <style:style style:name="Tableau85.A1" style:family="table-cell">
      <style:table-cell-properties style:vertical-align="middle" fo:padding="0.049cm" fo:border="none"/>
    </style:style>
    <style:style style:name="Tableau86" style:family="table">
      <style:table-properties style:width="29.556cm" style:rel-width="100%" table:align="left" fo:background-color="#e0e0e0">
        <style:background-image/>
      </style:table-properties>
    </style:style>
    <style:style style:name="Tableau86.A" style:family="table-column">
      <style:table-column-properties style:column-width="29.556cm" style:rel-column-width="65535*"/>
    </style:style>
    <style:style style:name="Tableau86.A1" style:family="table-cell">
      <style:table-cell-properties style:vertical-align="middle" fo:padding="0.049cm" fo:border="none"/>
    </style:style>
    <style:style style:name="Tableau87" style:family="table">
      <style:table-properties style:width="29.556cm" style:rel-width="100%" table:align="left" fo:background-color="#e0e0e0">
        <style:background-image/>
      </style:table-properties>
    </style:style>
    <style:style style:name="Tableau87.A" style:family="table-column">
      <style:table-column-properties style:column-width="29.556cm" style:rel-column-width="65535*"/>
    </style:style>
    <style:style style:name="Tableau87.A1" style:family="table-cell">
      <style:table-cell-properties style:vertical-align="middle" fo:padding="0.049cm" fo:border="none"/>
    </style:style>
    <style:style style:name="Tableau88" style:family="table">
      <style:table-properties style:width="29.556cm" style:rel-width="100%" table:align="left" fo:background-color="#e0e0e0">
        <style:background-image/>
      </style:table-properties>
    </style:style>
    <style:style style:name="Tableau88.A" style:family="table-column">
      <style:table-column-properties style:column-width="29.556cm" style:rel-column-width="65535*"/>
    </style:style>
    <style:style style:name="Tableau88.A1" style:family="table-cell">
      <style:table-cell-properties style:vertical-align="middle" fo:padding="0.049cm" fo:border="none"/>
    </style:style>
    <style:style style:name="Tableau89" style:family="table">
      <style:table-properties style:width="29.556cm" style:rel-width="100%" table:align="left" fo:background-color="#e0e0e0">
        <style:background-image/>
      </style:table-properties>
    </style:style>
    <style:style style:name="Tableau89.A" style:family="table-column">
      <style:table-column-properties style:column-width="29.556cm" style:rel-column-width="65535*"/>
    </style:style>
    <style:style style:name="Tableau89.A1" style:family="table-cell">
      <style:table-cell-properties style:vertical-align="middle" fo:padding="0.049cm" fo:border="none"/>
    </style:style>
    <style:style style:name="Tableau90" style:family="table">
      <style:table-properties style:width="29.556cm" style:rel-width="100%" table:align="left" fo:background-color="#e0e0e0">
        <style:background-image/>
      </style:table-properties>
    </style:style>
    <style:style style:name="Tableau90.A" style:family="table-column">
      <style:table-column-properties style:column-width="29.556cm" style:rel-column-width="65535*"/>
    </style:style>
    <style:style style:name="Tableau90.A1" style:family="table-cell">
      <style:table-cell-properties style:vertical-align="middle" fo:padding="0.049cm" fo:border="none"/>
    </style:style>
    <style:style style:name="Tableau91" style:family="table">
      <style:table-properties style:width="29.556cm" style:rel-width="100%" table:align="left" fo:background-color="#e0e0e0">
        <style:background-image/>
      </style:table-properties>
    </style:style>
    <style:style style:name="Tableau91.A" style:family="table-column">
      <style:table-column-properties style:column-width="29.556cm" style:rel-column-width="65535*"/>
    </style:style>
    <style:style style:name="Tableau91.A1" style:family="table-cell">
      <style:table-cell-properties style:vertical-align="middle" fo:padding="0.049cm" fo:border="none"/>
    </style:style>
    <style:style style:name="Tableau92" style:family="table">
      <style:table-properties style:width="29.556cm" style:rel-width="100%" table:align="left" fo:background-color="#e0e0e0">
        <style:background-image/>
      </style:table-properties>
    </style:style>
    <style:style style:name="Tableau92.A" style:family="table-column">
      <style:table-column-properties style:column-width="29.556cm" style:rel-column-width="65535*"/>
    </style:style>
    <style:style style:name="Tableau92.A1" style:family="table-cell">
      <style:table-cell-properties style:vertical-align="middle" fo:padding="0.049cm" fo:border="none"/>
    </style:style>
    <style:style style:name="Tableau93" style:family="table">
      <style:table-properties style:width="29.556cm" style:rel-width="100%" table:align="left" fo:background-color="#e0e0e0">
        <style:background-image/>
      </style:table-properties>
    </style:style>
    <style:style style:name="Tableau93.A" style:family="table-column">
      <style:table-column-properties style:column-width="29.556cm" style:rel-column-width="65535*"/>
    </style:style>
    <style:style style:name="Tableau93.A1" style:family="table-cell">
      <style:table-cell-properties style:vertical-align="middle" fo:padding="0.049cm" fo:border="none"/>
    </style:style>
    <style:style style:name="Tableau94" style:family="table">
      <style:table-properties style:width="29.556cm" style:rel-width="100%" table:align="left" fo:background-color="#e0e0e0">
        <style:background-image/>
      </style:table-properties>
    </style:style>
    <style:style style:name="Tableau94.A" style:family="table-column">
      <style:table-column-properties style:column-width="29.556cm" style:rel-column-width="65535*"/>
    </style:style>
    <style:style style:name="Tableau94.A1" style:family="table-cell">
      <style:table-cell-properties style:vertical-align="middle" fo:padding="0.049cm" fo:border="none"/>
    </style:style>
    <style:style style:name="Tableau95" style:family="table">
      <style:table-properties style:width="29.556cm" style:rel-width="100%" table:align="left" fo:background-color="#e0e0e0">
        <style:background-image/>
      </style:table-properties>
    </style:style>
    <style:style style:name="Tableau95.A" style:family="table-column">
      <style:table-column-properties style:column-width="29.556cm" style:rel-column-width="65535*"/>
    </style:style>
    <style:style style:name="Tableau95.A1" style:family="table-cell">
      <style:table-cell-properties style:vertical-align="middle" fo:padding="0.049cm" fo:border="none"/>
    </style:style>
    <style:style style:name="Tableau96" style:family="table">
      <style:table-properties style:width="29.556cm" style:rel-width="100%" table:align="left" fo:background-color="#e0e0e0">
        <style:background-image/>
      </style:table-properties>
    </style:style>
    <style:style style:name="Tableau96.A" style:family="table-column">
      <style:table-column-properties style:column-width="29.556cm" style:rel-column-width="65535*"/>
    </style:style>
    <style:style style:name="Tableau96.A1" style:family="table-cell">
      <style:table-cell-properties style:vertical-align="middle" fo:padding="0.049cm" fo:border="none"/>
    </style:style>
    <style:style style:name="Tableau97" style:family="table">
      <style:table-properties style:width="29.556cm" style:rel-width="100%" table:align="left" fo:background-color="#e0e0e0">
        <style:background-image/>
      </style:table-properties>
    </style:style>
    <style:style style:name="Tableau97.A" style:family="table-column">
      <style:table-column-properties style:column-width="29.556cm" style:rel-column-width="65535*"/>
    </style:style>
    <style:style style:name="Tableau97.A1" style:family="table-cell">
      <style:table-cell-properties style:vertical-align="middle" fo:padding="0.049cm" fo:border="none"/>
    </style:style>
    <style:style style:name="Tableau98" style:family="table">
      <style:table-properties style:width="29.556cm" style:rel-width="100%" table:align="left" fo:background-color="#e0e0e0">
        <style:background-image/>
      </style:table-properties>
    </style:style>
    <style:style style:name="Tableau98.A" style:family="table-column">
      <style:table-column-properties style:column-width="29.556cm" style:rel-column-width="65535*"/>
    </style:style>
    <style:style style:name="Tableau98.A1" style:family="table-cell">
      <style:table-cell-properties style:vertical-align="middle" fo:padding="0.049cm" fo:border="none"/>
    </style:style>
    <style:style style:name="Tableau99" style:family="table">
      <style:table-properties style:width="29.556cm" style:rel-width="100%" table:align="left" fo:background-color="#e0e0e0">
        <style:background-image/>
      </style:table-properties>
    </style:style>
    <style:style style:name="Tableau99.A" style:family="table-column">
      <style:table-column-properties style:column-width="29.556cm" style:rel-column-width="65535*"/>
    </style:style>
    <style:style style:name="Tableau99.A1" style:family="table-cell">
      <style:table-cell-properties style:vertical-align="middle" fo:padding="0.049cm" fo:border="none"/>
    </style:style>
    <style:style style:name="Tableau100" style:family="table">
      <style:table-properties style:width="29.556cm" style:rel-width="100%" table:align="left" fo:background-color="#e0e0e0">
        <style:background-image/>
      </style:table-properties>
    </style:style>
    <style:style style:name="Tableau100.A" style:family="table-column">
      <style:table-column-properties style:column-width="29.556cm" style:rel-column-width="65535*"/>
    </style:style>
    <style:style style:name="Tableau100.A1" style:family="table-cell">
      <style:table-cell-properties style:vertical-align="middle" fo:padding="0.049cm" fo:border="none"/>
    </style:style>
    <style:style style:name="Tableau101" style:family="table">
      <style:table-properties style:width="29.556cm" style:rel-width="100%" table:align="left" fo:background-color="#e0e0e0">
        <style:background-image/>
      </style:table-properties>
    </style:style>
    <style:style style:name="Tableau101.A" style:family="table-column">
      <style:table-column-properties style:column-width="29.556cm" style:rel-column-width="65535*"/>
    </style:style>
    <style:style style:name="Tableau101.A1" style:family="table-cell">
      <style:table-cell-properties style:vertical-align="middle" fo:padding="0.049cm" fo:border="none"/>
    </style:style>
    <style:style style:name="Tableau102" style:family="table">
      <style:table-properties style:width="29.556cm" style:rel-width="100%" table:align="left" fo:background-color="#e0e0e0">
        <style:background-image/>
      </style:table-properties>
    </style:style>
    <style:style style:name="Tableau102.A" style:family="table-column">
      <style:table-column-properties style:column-width="29.556cm" style:rel-column-width="65535*"/>
    </style:style>
    <style:style style:name="Tableau102.A1" style:family="table-cell">
      <style:table-cell-properties style:vertical-align="middle" fo:padding="0.049cm" fo:border="none"/>
    </style:style>
    <style:style style:name="Tableau103" style:family="table">
      <style:table-properties style:width="29.556cm" style:rel-width="100%" table:align="left" fo:background-color="#e0e0e0">
        <style:background-image/>
      </style:table-properties>
    </style:style>
    <style:style style:name="Tableau103.A" style:family="table-column">
      <style:table-column-properties style:column-width="29.556cm" style:rel-column-width="65535*"/>
    </style:style>
    <style:style style:name="Tableau103.A1" style:family="table-cell">
      <style:table-cell-properties style:vertical-align="middle" fo:padding="0.049cm" fo:border="none"/>
    </style:style>
    <style:style style:name="Tableau104" style:family="table">
      <style:table-properties style:width="29.556cm" style:rel-width="100%" table:align="left" fo:background-color="#e0e0e0">
        <style:background-image/>
      </style:table-properties>
    </style:style>
    <style:style style:name="Tableau104.A" style:family="table-column">
      <style:table-column-properties style:column-width="29.556cm" style:rel-column-width="65535*"/>
    </style:style>
    <style:style style:name="Tableau104.A1" style:family="table-cell">
      <style:table-cell-properties style:vertical-align="middle" fo:padding="0.049cm" fo:border="none"/>
    </style:style>
    <style:style style:name="Tableau105" style:family="table">
      <style:table-properties style:width="29.556cm" style:rel-width="100%" table:align="left" fo:background-color="#e0e0e0">
        <style:background-image/>
      </style:table-properties>
    </style:style>
    <style:style style:name="Tableau105.A" style:family="table-column">
      <style:table-column-properties style:column-width="29.556cm" style:rel-column-width="65535*"/>
    </style:style>
    <style:style style:name="Tableau105.A1" style:family="table-cell">
      <style:table-cell-properties style:vertical-align="middle" fo:padding="0.049cm" fo:border="none"/>
    </style:style>
    <style:style style:name="Tableau106" style:family="table">
      <style:table-properties style:width="29.556cm" style:rel-width="100%" table:align="left" fo:background-color="#e0e0e0">
        <style:background-image/>
      </style:table-properties>
    </style:style>
    <style:style style:name="Tableau106.A" style:family="table-column">
      <style:table-column-properties style:column-width="29.556cm" style:rel-column-width="65535*"/>
    </style:style>
    <style:style style:name="Tableau106.A1" style:family="table-cell">
      <style:table-cell-properties style:vertical-align="middle" fo:padding="0.049cm" fo:border="none"/>
    </style:style>
    <style:style style:name="Tableau107" style:family="table">
      <style:table-properties style:width="29.556cm" style:rel-width="100%" table:align="left" fo:background-color="#e0e0e0">
        <style:background-image/>
      </style:table-properties>
    </style:style>
    <style:style style:name="Tableau107.A" style:family="table-column">
      <style:table-column-properties style:column-width="29.556cm" style:rel-column-width="65535*"/>
    </style:style>
    <style:style style:name="Tableau107.A1" style:family="table-cell">
      <style:table-cell-properties style:vertical-align="middle" fo:padding="0.049cm" fo:border="none"/>
    </style:style>
    <style:style style:name="Tableau108" style:family="table">
      <style:table-properties style:width="29.556cm" style:rel-width="100%" table:align="left" fo:background-color="#e0e0e0">
        <style:background-image/>
      </style:table-properties>
    </style:style>
    <style:style style:name="Tableau108.A" style:family="table-column">
      <style:table-column-properties style:column-width="29.556cm" style:rel-column-width="65535*"/>
    </style:style>
    <style:style style:name="Tableau108.A1" style:family="table-cell">
      <style:table-cell-properties style:vertical-align="middle" fo:padding="0.049cm" fo:border="none"/>
    </style:style>
    <style:style style:name="Tableau109" style:family="table">
      <style:table-properties style:width="29.556cm" style:rel-width="100%" table:align="left" fo:background-color="#e0e0e0">
        <style:background-image/>
      </style:table-properties>
    </style:style>
    <style:style style:name="Tableau109.A" style:family="table-column">
      <style:table-column-properties style:column-width="29.556cm" style:rel-column-width="65535*"/>
    </style:style>
    <style:style style:name="Tableau109.A1" style:family="table-cell">
      <style:table-cell-properties style:vertical-align="middle" fo:padding="0.049cm" fo:border="none"/>
    </style:style>
    <style:style style:name="Tableau110" style:family="table">
      <style:table-properties style:width="29.556cm" style:rel-width="100%" table:align="left" fo:background-color="#e0e0e0">
        <style:background-image/>
      </style:table-properties>
    </style:style>
    <style:style style:name="Tableau110.A" style:family="table-column">
      <style:table-column-properties style:column-width="29.556cm" style:rel-column-width="65535*"/>
    </style:style>
    <style:style style:name="Tableau110.A1" style:family="table-cell">
      <style:table-cell-properties style:vertical-align="middle" fo:padding="0.049cm" fo:border="none"/>
    </style:style>
    <style:style style:name="Tableau111" style:family="table">
      <style:table-properties style:width="29.556cm" style:rel-width="100%" table:align="left" fo:background-color="#e0e0e0">
        <style:background-image/>
      </style:table-properties>
    </style:style>
    <style:style style:name="Tableau111.A" style:family="table-column">
      <style:table-column-properties style:column-width="29.556cm" style:rel-column-width="65535*"/>
    </style:style>
    <style:style style:name="Tableau111.A1" style:family="table-cell">
      <style:table-cell-properties style:vertical-align="middle" fo:padding="0.049cm" fo:border="none"/>
    </style:style>
    <style:style style:name="Tableau112" style:family="table">
      <style:table-properties style:width="29.556cm" style:rel-width="100%" table:align="left" fo:background-color="#e0e0e0">
        <style:background-image/>
      </style:table-properties>
    </style:style>
    <style:style style:name="Tableau112.A" style:family="table-column">
      <style:table-column-properties style:column-width="29.556cm" style:rel-column-width="65535*"/>
    </style:style>
    <style:style style:name="Tableau112.A1" style:family="table-cell">
      <style:table-cell-properties style:vertical-align="middle" fo:padding="0.049cm" fo:border="none"/>
    </style:style>
    <style:style style:name="Tableau113" style:family="table">
      <style:table-properties style:width="29.556cm" style:rel-width="100%" table:align="left" fo:background-color="#e0e0e0">
        <style:background-image/>
      </style:table-properties>
    </style:style>
    <style:style style:name="Tableau113.A" style:family="table-column">
      <style:table-column-properties style:column-width="29.556cm" style:rel-column-width="65535*"/>
    </style:style>
    <style:style style:name="Tableau113.A1" style:family="table-cell">
      <style:table-cell-properties style:vertical-align="middle" fo:padding="0.049cm" fo:border="none"/>
    </style:style>
    <style:style style:name="Tableau114" style:family="table">
      <style:table-properties style:width="29.556cm" style:rel-width="100%" table:align="left" fo:background-color="#e0e0e0">
        <style:background-image/>
      </style:table-properties>
    </style:style>
    <style:style style:name="Tableau114.A" style:family="table-column">
      <style:table-column-properties style:column-width="29.556cm" style:rel-column-width="65535*"/>
    </style:style>
    <style:style style:name="Tableau114.A1" style:family="table-cell">
      <style:table-cell-properties style:vertical-align="middle" fo:padding="0.049cm" fo:border="none"/>
    </style:style>
    <style:style style:name="Tableau115" style:family="table">
      <style:table-properties style:width="29.556cm" style:rel-width="100%" table:align="left" fo:background-color="#e0e0e0">
        <style:background-image/>
      </style:table-properties>
    </style:style>
    <style:style style:name="Tableau115.A" style:family="table-column">
      <style:table-column-properties style:column-width="29.556cm" style:rel-column-width="65535*"/>
    </style:style>
    <style:style style:name="Tableau115.A1" style:family="table-cell">
      <style:table-cell-properties style:vertical-align="middle" fo:padding="0.049cm" fo:border="none"/>
    </style:style>
    <style:style style:name="Tableau116" style:family="table">
      <style:table-properties style:width="29.556cm" style:rel-width="100%" table:align="left" fo:background-color="#e0e0e0">
        <style:background-image/>
      </style:table-properties>
    </style:style>
    <style:style style:name="Tableau116.A" style:family="table-column">
      <style:table-column-properties style:column-width="29.556cm" style:rel-column-width="65535*"/>
    </style:style>
    <style:style style:name="Tableau116.A1" style:family="table-cell">
      <style:table-cell-properties style:vertical-align="middle" fo:padding="0.049cm" fo:border="none"/>
    </style:style>
    <style:style style:name="Tableau117" style:family="table">
      <style:table-properties style:width="29.556cm" style:rel-width="100%" table:align="left" fo:background-color="#e0e0e0">
        <style:background-image/>
      </style:table-properties>
    </style:style>
    <style:style style:name="Tableau117.A" style:family="table-column">
      <style:table-column-properties style:column-width="29.556cm" style:rel-column-width="65535*"/>
    </style:style>
    <style:style style:name="Tableau117.A1" style:family="table-cell">
      <style:table-cell-properties style:vertical-align="middle" fo:padding="0.049cm" fo:border="none"/>
    </style:style>
    <style:style style:name="Tableau118" style:family="table">
      <style:table-properties style:width="29.556cm" style:rel-width="100%" table:align="left" fo:background-color="#e0e0e0">
        <style:background-image/>
      </style:table-properties>
    </style:style>
    <style:style style:name="Tableau118.A" style:family="table-column">
      <style:table-column-properties style:column-width="29.556cm" style:rel-column-width="65535*"/>
    </style:style>
    <style:style style:name="Tableau118.A1" style:family="table-cell">
      <style:table-cell-properties style:vertical-align="middle" fo:padding="0.049cm" fo:border="none"/>
    </style:style>
    <style:style style:name="Tableau119" style:family="table">
      <style:table-properties style:width="29.556cm" style:rel-width="100%" table:align="left" fo:background-color="#e0e0e0">
        <style:background-image/>
      </style:table-properties>
    </style:style>
    <style:style style:name="Tableau119.A" style:family="table-column">
      <style:table-column-properties style:column-width="29.556cm" style:rel-column-width="65535*"/>
    </style:style>
    <style:style style:name="Tableau119.A1" style:family="table-cell">
      <style:table-cell-properties style:vertical-align="middle" fo:padding="0.049cm" fo:border="none"/>
    </style:style>
    <style:style style:name="Tableau120" style:family="table">
      <style:table-properties style:width="29.556cm" style:rel-width="100%" table:align="left" fo:background-color="#e0e0e0">
        <style:background-image/>
      </style:table-properties>
    </style:style>
    <style:style style:name="Tableau120.A" style:family="table-column">
      <style:table-column-properties style:column-width="29.556cm" style:rel-column-width="65535*"/>
    </style:style>
    <style:style style:name="Tableau120.A1" style:family="table-cell">
      <style:table-cell-properties style:vertical-align="middle" fo:padding="0.049cm" fo:border="none"/>
    </style:style>
    <style:style style:name="Tableau121" style:family="table">
      <style:table-properties style:width="29.556cm" style:rel-width="100%" table:align="left" fo:background-color="#e0e0e0">
        <style:background-image/>
      </style:table-properties>
    </style:style>
    <style:style style:name="Tableau121.A" style:family="table-column">
      <style:table-column-properties style:column-width="29.556cm" style:rel-column-width="65535*"/>
    </style:style>
    <style:style style:name="Tableau121.A1" style:family="table-cell">
      <style:table-cell-properties style:vertical-align="middle" fo:padding="0.049cm" fo:border="none"/>
    </style:style>
    <style:style style:name="Tableau122" style:family="table">
      <style:table-properties style:width="29.556cm" style:rel-width="100%" table:align="left" fo:background-color="#e0e0e0">
        <style:background-image/>
      </style:table-properties>
    </style:style>
    <style:style style:name="Tableau122.A" style:family="table-column">
      <style:table-column-properties style:column-width="29.556cm" style:rel-column-width="65535*"/>
    </style:style>
    <style:style style:name="Tableau122.A1" style:family="table-cell">
      <style:table-cell-properties style:vertical-align="middle" fo:padding="0.049cm" fo:border="none"/>
    </style:style>
    <style:style style:name="Tableau123" style:family="table">
      <style:table-properties style:width="29.556cm" style:rel-width="100%" table:align="left" fo:background-color="#e0e0e0">
        <style:background-image/>
      </style:table-properties>
    </style:style>
    <style:style style:name="Tableau123.A" style:family="table-column">
      <style:table-column-properties style:column-width="29.556cm" style:rel-column-width="65535*"/>
    </style:style>
    <style:style style:name="Tableau123.A1" style:family="table-cell">
      <style:table-cell-properties style:vertical-align="middle" fo:padding="0.049cm" fo:border="none"/>
    </style:style>
    <style:style style:name="Tableau124" style:family="table">
      <style:table-properties style:width="29.556cm" style:rel-width="100%" table:align="left" fo:background-color="#e0e0e0">
        <style:background-image/>
      </style:table-properties>
    </style:style>
    <style:style style:name="Tableau124.A" style:family="table-column">
      <style:table-column-properties style:column-width="29.556cm" style:rel-column-width="65535*"/>
    </style:style>
    <style:style style:name="Tableau124.A1" style:family="table-cell">
      <style:table-cell-properties style:vertical-align="middle" fo:padding="0.049cm" fo:border="none"/>
    </style:style>
    <style:style style:name="Tableau125" style:family="table">
      <style:table-properties style:width="29.556cm" style:rel-width="100%" table:align="left" fo:background-color="#e0e0e0">
        <style:background-image/>
      </style:table-properties>
    </style:style>
    <style:style style:name="Tableau125.A" style:family="table-column">
      <style:table-column-properties style:column-width="29.556cm" style:rel-column-width="65535*"/>
    </style:style>
    <style:style style:name="Tableau125.A1" style:family="table-cell">
      <style:table-cell-properties style:vertical-align="middle" fo:padding="0.049cm" fo:border="none"/>
    </style:style>
    <style:style style:name="Tableau126" style:family="table">
      <style:table-properties style:width="29.556cm" style:rel-width="100%" table:align="left" fo:background-color="#e0e0e0">
        <style:background-image/>
      </style:table-properties>
    </style:style>
    <style:style style:name="Tableau126.A" style:family="table-column">
      <style:table-column-properties style:column-width="29.556cm" style:rel-column-width="65535*"/>
    </style:style>
    <style:style style:name="Tableau126.A1" style:family="table-cell">
      <style:table-cell-properties style:vertical-align="middle" fo:padding="0.049cm" fo:border="none"/>
    </style:style>
    <style:style style:name="Tableau127" style:family="table">
      <style:table-properties style:width="29.556cm" style:rel-width="100%" table:align="left" fo:background-color="#e0e0e0">
        <style:background-image/>
      </style:table-properties>
    </style:style>
    <style:style style:name="Tableau127.A" style:family="table-column">
      <style:table-column-properties style:column-width="29.556cm" style:rel-column-width="65535*"/>
    </style:style>
    <style:style style:name="Tableau127.A1" style:family="table-cell">
      <style:table-cell-properties style:vertical-align="middle" fo:padding="0.049cm" fo:border="none"/>
    </style:style>
    <style:style style:name="Tableau128" style:family="table">
      <style:table-properties style:width="29.556cm" style:rel-width="100%" table:align="left" fo:background-color="#e0e0e0">
        <style:background-image/>
      </style:table-properties>
    </style:style>
    <style:style style:name="Tableau128.A" style:family="table-column">
      <style:table-column-properties style:column-width="29.556cm" style:rel-column-width="65535*"/>
    </style:style>
    <style:style style:name="Tableau128.A1" style:family="table-cell">
      <style:table-cell-properties style:vertical-align="middle" fo:padding="0.049cm" fo:border="none"/>
    </style:style>
    <style:style style:name="Tableau129" style:family="table">
      <style:table-properties style:width="29.556cm" style:rel-width="100%" table:align="left" fo:background-color="#e0e0e0">
        <style:background-image/>
      </style:table-properties>
    </style:style>
    <style:style style:name="Tableau129.A" style:family="table-column">
      <style:table-column-properties style:column-width="29.556cm" style:rel-column-width="65535*"/>
    </style:style>
    <style:style style:name="Tableau129.A1" style:family="table-cell">
      <style:table-cell-properties style:vertical-align="middle" fo:padding="0.049cm" fo:border="none"/>
    </style:style>
    <style:style style:name="Tableau130" style:family="table">
      <style:table-properties style:width="29.556cm" style:rel-width="100%" table:align="left" fo:background-color="#e0e0e0">
        <style:background-image/>
      </style:table-properties>
    </style:style>
    <style:style style:name="Tableau130.A" style:family="table-column">
      <style:table-column-properties style:column-width="29.556cm" style:rel-column-width="65535*"/>
    </style:style>
    <style:style style:name="Tableau130.A1" style:family="table-cell">
      <style:table-cell-properties style:vertical-align="middle" fo:padding="0.049cm" fo:border="none"/>
    </style:style>
    <style:style style:name="Tableau131" style:family="table">
      <style:table-properties style:width="29.556cm" style:rel-width="100%" table:align="left" fo:background-color="#e0e0e0">
        <style:background-image/>
      </style:table-properties>
    </style:style>
    <style:style style:name="Tableau131.A" style:family="table-column">
      <style:table-column-properties style:column-width="29.556cm" style:rel-column-width="65535*"/>
    </style:style>
    <style:style style:name="Tableau131.A1" style:family="table-cell">
      <style:table-cell-properties style:vertical-align="middle" fo:padding="0.049cm" fo:border="none"/>
    </style:style>
    <style:style style:name="Tableau132" style:family="table">
      <style:table-properties style:width="29.556cm" style:rel-width="100%" table:align="left" fo:background-color="#e0e0e0">
        <style:background-image/>
      </style:table-properties>
    </style:style>
    <style:style style:name="Tableau132.A" style:family="table-column">
      <style:table-column-properties style:column-width="29.556cm" style:rel-column-width="65535*"/>
    </style:style>
    <style:style style:name="Tableau132.A1" style:family="table-cell">
      <style:table-cell-properties style:vertical-align="middle" fo:padding="0.049cm" fo:border="none"/>
    </style:style>
    <style:style style:name="Tableau133" style:family="table">
      <style:table-properties style:width="29.556cm" style:rel-width="100%" table:align="left" fo:background-color="#e0e0e0">
        <style:background-image/>
      </style:table-properties>
    </style:style>
    <style:style style:name="Tableau133.A" style:family="table-column">
      <style:table-column-properties style:column-width="29.556cm" style:rel-column-width="65535*"/>
    </style:style>
    <style:style style:name="Tableau133.A1" style:family="table-cell">
      <style:table-cell-properties style:vertical-align="middle" fo:padding="0.049cm" fo:border="none"/>
    </style:style>
    <style:style style:name="Tableau134" style:family="table">
      <style:table-properties style:width="29.556cm" style:rel-width="100%" table:align="left" fo:background-color="#e0e0e0">
        <style:background-image/>
      </style:table-properties>
    </style:style>
    <style:style style:name="Tableau134.A" style:family="table-column">
      <style:table-column-properties style:column-width="29.556cm" style:rel-column-width="65535*"/>
    </style:style>
    <style:style style:name="Tableau134.A1" style:family="table-cell">
      <style:table-cell-properties style:vertical-align="middle" fo:padding="0.049cm" fo:border="none"/>
    </style:style>
    <style:style style:name="Tableau135" style:family="table">
      <style:table-properties style:width="29.556cm" style:rel-width="100%" table:align="left" fo:background-color="#e0e0e0">
        <style:background-image/>
      </style:table-properties>
    </style:style>
    <style:style style:name="Tableau135.A" style:family="table-column">
      <style:table-column-properties style:column-width="29.556cm" style:rel-column-width="65535*"/>
    </style:style>
    <style:style style:name="Tableau135.A1" style:family="table-cell">
      <style:table-cell-properties style:vertical-align="middle" fo:padding="0.049cm" fo:border="none"/>
    </style:style>
    <style:style style:name="Tableau136" style:family="table">
      <style:table-properties style:width="29.556cm" style:rel-width="100%" table:align="left" fo:background-color="#e0e0e0">
        <style:background-image/>
      </style:table-properties>
    </style:style>
    <style:style style:name="Tableau136.A" style:family="table-column">
      <style:table-column-properties style:column-width="29.556cm" style:rel-column-width="65535*"/>
    </style:style>
    <style:style style:name="Tableau136.A1" style:family="table-cell">
      <style:table-cell-properties style:vertical-align="middle" fo:padding="0.049cm" fo:border="none"/>
    </style:style>
    <style:style style:name="Tableau137" style:family="table">
      <style:table-properties style:width="29.556cm" style:rel-width="100%" table:align="left" fo:background-color="#e0e0e0">
        <style:background-image/>
      </style:table-properties>
    </style:style>
    <style:style style:name="Tableau137.A" style:family="table-column">
      <style:table-column-properties style:column-width="29.556cm" style:rel-column-width="65535*"/>
    </style:style>
    <style:style style:name="Tableau137.A1" style:family="table-cell">
      <style:table-cell-properties style:vertical-align="middle" fo:padding="0.049cm" fo:border="none"/>
    </style:style>
    <style:style style:name="Tableau138" style:family="table">
      <style:table-properties style:width="29.556cm" style:rel-width="100%" table:align="left" fo:background-color="#e0e0e0">
        <style:background-image/>
      </style:table-properties>
    </style:style>
    <style:style style:name="Tableau138.A" style:family="table-column">
      <style:table-column-properties style:column-width="29.556cm" style:rel-column-width="65535*"/>
    </style:style>
    <style:style style:name="Tableau138.A1" style:family="table-cell">
      <style:table-cell-properties style:vertical-align="middle" fo:padding="0.049cm" fo:border="none"/>
    </style:style>
    <style:style style:name="Tableau139" style:family="table">
      <style:table-properties style:width="29.556cm" style:rel-width="100%" table:align="left" fo:background-color="#e0e0e0">
        <style:background-image/>
      </style:table-properties>
    </style:style>
    <style:style style:name="Tableau139.A" style:family="table-column">
      <style:table-column-properties style:column-width="29.556cm" style:rel-column-width="65535*"/>
    </style:style>
    <style:style style:name="Tableau139.A1" style:family="table-cell">
      <style:table-cell-properties style:vertical-align="middle" fo:padding="0.049cm" fo:border="none"/>
    </style:style>
    <style:style style:name="Tableau140" style:family="table">
      <style:table-properties style:width="29.556cm" style:rel-width="100%" table:align="left" fo:background-color="#e0e0e0">
        <style:background-image/>
      </style:table-properties>
    </style:style>
    <style:style style:name="Tableau140.A" style:family="table-column">
      <style:table-column-properties style:column-width="29.556cm" style:rel-column-width="65535*"/>
    </style:style>
    <style:style style:name="Tableau140.A1" style:family="table-cell">
      <style:table-cell-properties style:vertical-align="middle" fo:padding="0.049cm" fo:border="none"/>
    </style:style>
    <style:style style:name="Tableau141" style:family="table">
      <style:table-properties style:width="29.556cm" style:rel-width="100%" table:align="left" fo:background-color="#e0e0e0">
        <style:background-image/>
      </style:table-properties>
    </style:style>
    <style:style style:name="Tableau141.A" style:family="table-column">
      <style:table-column-properties style:column-width="29.556cm" style:rel-column-width="65535*"/>
    </style:style>
    <style:style style:name="Tableau141.A1" style:family="table-cell">
      <style:table-cell-properties style:vertical-align="middle" fo:padding="0.049cm" fo:border="none"/>
    </style:style>
    <style:style style:name="Tableau142" style:family="table">
      <style:table-properties style:width="29.556cm" style:rel-width="100%" table:align="left" fo:background-color="#e0e0e0">
        <style:background-image/>
      </style:table-properties>
    </style:style>
    <style:style style:name="Tableau142.A" style:family="table-column">
      <style:table-column-properties style:column-width="29.556cm" style:rel-column-width="65535*"/>
    </style:style>
    <style:style style:name="Tableau142.A1" style:family="table-cell">
      <style:table-cell-properties style:vertical-align="middle" fo:padding="0.049cm" fo:border="none"/>
    </style:style>
    <style:style style:name="Tableau143" style:family="table">
      <style:table-properties style:width="29.556cm" style:rel-width="100%" table:align="left" fo:background-color="#e0e0e0">
        <style:background-image/>
      </style:table-properties>
    </style:style>
    <style:style style:name="Tableau143.A" style:family="table-column">
      <style:table-column-properties style:column-width="29.556cm" style:rel-column-width="65535*"/>
    </style:style>
    <style:style style:name="Tableau143.A1" style:family="table-cell">
      <style:table-cell-properties style:vertical-align="middle" fo:padding="0.049cm" fo:border="none"/>
    </style:style>
    <style:style style:name="Tableau144" style:family="table">
      <style:table-properties style:width="29.556cm" style:rel-width="100%" table:align="left" fo:background-color="#e0e0e0">
        <style:background-image/>
      </style:table-properties>
    </style:style>
    <style:style style:name="Tableau144.A" style:family="table-column">
      <style:table-column-properties style:column-width="29.556cm" style:rel-column-width="65535*"/>
    </style:style>
    <style:style style:name="Tableau144.A1" style:family="table-cell">
      <style:table-cell-properties style:vertical-align="middle" fo:padding="0.049cm" fo:border="none"/>
    </style:style>
    <style:style style:name="Tableau145" style:family="table">
      <style:table-properties style:width="29.556cm" style:rel-width="100%" table:align="left" fo:background-color="#e0e0e0">
        <style:background-image/>
      </style:table-properties>
    </style:style>
    <style:style style:name="Tableau145.A" style:family="table-column">
      <style:table-column-properties style:column-width="29.556cm" style:rel-column-width="65535*"/>
    </style:style>
    <style:style style:name="Tableau145.A1" style:family="table-cell">
      <style:table-cell-properties style:vertical-align="middle" fo:padding="0.049cm" fo:border="none"/>
    </style:style>
    <style:style style:name="Tableau146" style:family="table">
      <style:table-properties style:width="29.556cm" style:rel-width="100%" table:align="left" fo:background-color="#e0e0e0">
        <style:background-image/>
      </style:table-properties>
    </style:style>
    <style:style style:name="Tableau146.A" style:family="table-column">
      <style:table-column-properties style:column-width="29.556cm" style:rel-column-width="65535*"/>
    </style:style>
    <style:style style:name="Tableau146.A1" style:family="table-cell">
      <style:table-cell-properties style:vertical-align="middle" fo:padding="0.049cm" fo:border="none"/>
    </style:style>
    <style:style style:name="Tableau147" style:family="table">
      <style:table-properties style:width="29.556cm" style:rel-width="100%" table:align="left" fo:background-color="#e0e0e0">
        <style:background-image/>
      </style:table-properties>
    </style:style>
    <style:style style:name="Tableau147.A" style:family="table-column">
      <style:table-column-properties style:column-width="29.556cm" style:rel-column-width="65535*"/>
    </style:style>
    <style:style style:name="Tableau147.A1" style:family="table-cell">
      <style:table-cell-properties style:vertical-align="middle" fo:padding="0.049cm" fo:border="none"/>
    </style:style>
    <style:style style:name="Tableau148" style:family="table">
      <style:table-properties style:width="29.556cm" style:rel-width="100%" table:align="left" fo:background-color="#e0e0e0">
        <style:background-image/>
      </style:table-properties>
    </style:style>
    <style:style style:name="Tableau148.A" style:family="table-column">
      <style:table-column-properties style:column-width="29.556cm" style:rel-column-width="65535*"/>
    </style:style>
    <style:style style:name="Tableau148.A1" style:family="table-cell">
      <style:table-cell-properties style:vertical-align="middle" fo:padding="0.049cm" fo:border="none"/>
    </style:style>
    <style:style style:name="Tableau149" style:family="table">
      <style:table-properties style:width="29.556cm" style:rel-width="100%" table:align="left" fo:background-color="#e0e0e0">
        <style:background-image/>
      </style:table-properties>
    </style:style>
    <style:style style:name="Tableau149.A" style:family="table-column">
      <style:table-column-properties style:column-width="29.556cm" style:rel-column-width="65535*"/>
    </style:style>
    <style:style style:name="Tableau149.A1" style:family="table-cell">
      <style:table-cell-properties style:vertical-align="middle" fo:padding="0.049cm" fo:border="none"/>
    </style:style>
    <style:style style:name="Tableau150" style:family="table">
      <style:table-properties style:width="29.556cm" style:rel-width="100%" table:align="left" fo:background-color="#e0e0e0">
        <style:background-image/>
      </style:table-properties>
    </style:style>
    <style:style style:name="Tableau150.A" style:family="table-column">
      <style:table-column-properties style:column-width="29.556cm" style:rel-column-width="65535*"/>
    </style:style>
    <style:style style:name="Tableau150.A1" style:family="table-cell">
      <style:table-cell-properties style:vertical-align="middle" fo:padding="0.049cm" fo:border="none"/>
    </style:style>
    <style:style style:name="Tableau151" style:family="table">
      <style:table-properties style:width="29.556cm" style:rel-width="100%" table:align="left" fo:background-color="#e0e0e0">
        <style:background-image/>
      </style:table-properties>
    </style:style>
    <style:style style:name="Tableau151.A" style:family="table-column">
      <style:table-column-properties style:column-width="29.556cm" style:rel-column-width="65535*"/>
    </style:style>
    <style:style style:name="Tableau151.A1" style:family="table-cell">
      <style:table-cell-properties style:vertical-align="middle" fo:padding="0.049cm" fo:border="none"/>
    </style:style>
    <style:style style:name="Tableau152" style:family="table">
      <style:table-properties style:width="29.556cm" style:rel-width="100%" table:align="left" fo:background-color="#e0e0e0">
        <style:background-image/>
      </style:table-properties>
    </style:style>
    <style:style style:name="Tableau152.A" style:family="table-column">
      <style:table-column-properties style:column-width="29.556cm" style:rel-column-width="65535*"/>
    </style:style>
    <style:style style:name="Tableau152.A1" style:family="table-cell">
      <style:table-cell-properties style:vertical-align="middle" fo:padding="0.049cm" fo:border="none"/>
    </style:style>
    <style:style style:name="Tableau153" style:family="table">
      <style:table-properties style:width="29.556cm" style:rel-width="100%" table:align="left" fo:background-color="#e0e0e0">
        <style:background-image/>
      </style:table-properties>
    </style:style>
    <style:style style:name="Tableau153.A" style:family="table-column">
      <style:table-column-properties style:column-width="29.556cm" style:rel-column-width="65535*"/>
    </style:style>
    <style:style style:name="Tableau153.A1" style:family="table-cell">
      <style:table-cell-properties style:vertical-align="middle" fo:padding="0.049cm" fo:border="none"/>
    </style:style>
    <style:style style:name="Tableau154" style:family="table">
      <style:table-properties style:width="29.556cm" style:rel-width="100%" table:align="left" fo:background-color="#e0e0e0">
        <style:background-image/>
      </style:table-properties>
    </style:style>
    <style:style style:name="Tableau154.A" style:family="table-column">
      <style:table-column-properties style:column-width="29.556cm" style:rel-column-width="65535*"/>
    </style:style>
    <style:style style:name="Tableau154.A1" style:family="table-cell">
      <style:table-cell-properties style:vertical-align="middle" fo:padding="0.049cm" fo:border="none"/>
    </style:style>
    <style:style style:name="Tableau155" style:family="table">
      <style:table-properties style:width="29.556cm" style:rel-width="100%" table:align="left" fo:background-color="#e0e0e0">
        <style:background-image/>
      </style:table-properties>
    </style:style>
    <style:style style:name="Tableau155.A" style:family="table-column">
      <style:table-column-properties style:column-width="29.556cm" style:rel-column-width="65535*"/>
    </style:style>
    <style:style style:name="Tableau155.A1" style:family="table-cell">
      <style:table-cell-properties style:vertical-align="middle" fo:padding="0.049cm" fo:border="none"/>
    </style:style>
    <style:style style:name="Tableau156" style:family="table">
      <style:table-properties style:width="29.556cm" style:rel-width="100%" table:align="left" fo:background-color="#e0e0e0">
        <style:background-image/>
      </style:table-properties>
    </style:style>
    <style:style style:name="Tableau156.A" style:family="table-column">
      <style:table-column-properties style:column-width="29.556cm" style:rel-column-width="65535*"/>
    </style:style>
    <style:style style:name="Tableau156.A1" style:family="table-cell">
      <style:table-cell-properties style:vertical-align="middle" fo:padding="0.049cm" fo:border="none"/>
    </style:style>
    <style:style style:name="Tableau157" style:family="table">
      <style:table-properties style:width="29.556cm" style:rel-width="100%" table:align="left" fo:background-color="#e0e0e0">
        <style:background-image/>
      </style:table-properties>
    </style:style>
    <style:style style:name="Tableau157.A" style:family="table-column">
      <style:table-column-properties style:column-width="29.556cm" style:rel-column-width="65535*"/>
    </style:style>
    <style:style style:name="Tableau157.A1" style:family="table-cell">
      <style:table-cell-properties style:vertical-align="middle" fo:padding="0.049cm" fo:border="none"/>
    </style:style>
    <style:style style:name="Tableau158" style:family="table">
      <style:table-properties style:width="29.556cm" style:rel-width="100%" table:align="left" fo:background-color="#e0e0e0">
        <style:background-image/>
      </style:table-properties>
    </style:style>
    <style:style style:name="Tableau158.A" style:family="table-column">
      <style:table-column-properties style:column-width="29.556cm" style:rel-column-width="65535*"/>
    </style:style>
    <style:style style:name="Tableau158.A1" style:family="table-cell">
      <style:table-cell-properties style:vertical-align="middle" fo:padding="0.049cm" fo:border="none"/>
    </style:style>
    <style:style style:name="Tableau159" style:family="table">
      <style:table-properties style:width="29.556cm" style:rel-width="100%" table:align="left" fo:background-color="#e0e0e0">
        <style:background-image/>
      </style:table-properties>
    </style:style>
    <style:style style:name="Tableau159.A" style:family="table-column">
      <style:table-column-properties style:column-width="29.556cm" style:rel-column-width="65535*"/>
    </style:style>
    <style:style style:name="Tableau159.A1" style:family="table-cell">
      <style:table-cell-properties style:vertical-align="middle" fo:padding="0.049cm" fo:border="none"/>
    </style:style>
    <style:style style:name="Tableau160" style:family="table">
      <style:table-properties style:width="29.556cm" style:rel-width="100%" table:align="left" fo:background-color="#e0e0e0">
        <style:background-image/>
      </style:table-properties>
    </style:style>
    <style:style style:name="Tableau160.A" style:family="table-column">
      <style:table-column-properties style:column-width="29.556cm" style:rel-column-width="65535*"/>
    </style:style>
    <style:style style:name="Tableau160.A1" style:family="table-cell">
      <style:table-cell-properties style:vertical-align="middle" fo:padding="0.049cm" fo:border="none"/>
    </style:style>
    <style:style style:name="Tableau161" style:family="table">
      <style:table-properties style:width="29.556cm" style:rel-width="100%" table:align="left" fo:background-color="#e0e0e0">
        <style:background-image/>
      </style:table-properties>
    </style:style>
    <style:style style:name="Tableau161.A" style:family="table-column">
      <style:table-column-properties style:column-width="29.556cm" style:rel-column-width="65535*"/>
    </style:style>
    <style:style style:name="Tableau161.A1" style:family="table-cell">
      <style:table-cell-properties style:vertical-align="middle" fo:padding="0.049cm" fo:border="none"/>
    </style:style>
    <style:style style:name="Tableau162" style:family="table">
      <style:table-properties style:width="29.556cm" style:rel-width="100%" table:align="left" fo:background-color="#e0e0e0">
        <style:background-image/>
      </style:table-properties>
    </style:style>
    <style:style style:name="Tableau162.A" style:family="table-column">
      <style:table-column-properties style:column-width="29.556cm" style:rel-column-width="65535*"/>
    </style:style>
    <style:style style:name="Tableau162.A1" style:family="table-cell">
      <style:table-cell-properties style:vertical-align="middle" fo:padding="0.049cm" fo:border="none"/>
    </style:style>
    <style:style style:name="Tableau163" style:family="table">
      <style:table-properties style:width="29.556cm" style:rel-width="100%" table:align="left" fo:background-color="#e0e0e0">
        <style:background-image/>
      </style:table-properties>
    </style:style>
    <style:style style:name="Tableau163.A" style:family="table-column">
      <style:table-column-properties style:column-width="29.556cm" style:rel-column-width="65535*"/>
    </style:style>
    <style:style style:name="Tableau163.A1" style:family="table-cell">
      <style:table-cell-properties style:vertical-align="middle" fo:padding="0.049cm" fo:border="none"/>
    </style:style>
    <style:style style:name="Tableau164" style:family="table">
      <style:table-properties style:width="29.556cm" style:rel-width="100%" table:align="left" fo:background-color="#e0e0e0">
        <style:background-image/>
      </style:table-properties>
    </style:style>
    <style:style style:name="Tableau164.A" style:family="table-column">
      <style:table-column-properties style:column-width="29.556cm" style:rel-column-width="65535*"/>
    </style:style>
    <style:style style:name="Tableau164.A1" style:family="table-cell">
      <style:table-cell-properties style:vertical-align="middle" fo:padding="0.049cm" fo:border="none"/>
    </style:style>
    <style:style style:name="Tableau165" style:family="table">
      <style:table-properties style:width="29.556cm" style:rel-width="100%" table:align="left" fo:background-color="#e0e0e0">
        <style:background-image/>
      </style:table-properties>
    </style:style>
    <style:style style:name="Tableau165.A" style:family="table-column">
      <style:table-column-properties style:column-width="29.556cm" style:rel-column-width="65535*"/>
    </style:style>
    <style:style style:name="Tableau165.A1" style:family="table-cell">
      <style:table-cell-properties style:vertical-align="middle" fo:padding="0.049cm" fo:border="none"/>
    </style:style>
    <style:style style:name="Tableau166" style:family="table">
      <style:table-properties style:width="29.556cm" style:rel-width="100%" table:align="left" fo:background-color="#e0e0e0">
        <style:background-image/>
      </style:table-properties>
    </style:style>
    <style:style style:name="Tableau166.A" style:family="table-column">
      <style:table-column-properties style:column-width="29.556cm" style:rel-column-width="65535*"/>
    </style:style>
    <style:style style:name="Tableau166.A1" style:family="table-cell">
      <style:table-cell-properties style:vertical-align="middle" fo:padding="0.049cm" fo:border="none"/>
    </style:style>
    <style:style style:name="Tableau167" style:family="table">
      <style:table-properties style:width="29.556cm" style:rel-width="100%" table:align="left" fo:background-color="#e0e0e0">
        <style:background-image/>
      </style:table-properties>
    </style:style>
    <style:style style:name="Tableau167.A" style:family="table-column">
      <style:table-column-properties style:column-width="29.556cm" style:rel-column-width="65535*"/>
    </style:style>
    <style:style style:name="Tableau167.A1" style:family="table-cell">
      <style:table-cell-properties style:vertical-align="middle" fo:padding="0.049cm" fo:border="none"/>
    </style:style>
    <style:style style:name="Tableau168" style:family="table">
      <style:table-properties style:width="29.556cm" style:rel-width="100%" table:align="left" fo:background-color="#e0e0e0">
        <style:background-image/>
      </style:table-properties>
    </style:style>
    <style:style style:name="Tableau168.A" style:family="table-column">
      <style:table-column-properties style:column-width="29.556cm" style:rel-column-width="65535*"/>
    </style:style>
    <style:style style:name="Tableau168.A1" style:family="table-cell">
      <style:table-cell-properties style:vertical-align="middle" fo:padding="0.049cm" fo:border="none"/>
    </style:style>
    <style:style style:name="Tableau169" style:family="table">
      <style:table-properties style:width="29.556cm" style:rel-width="100%" table:align="left" fo:background-color="#e0e0e0">
        <style:background-image/>
      </style:table-properties>
    </style:style>
    <style:style style:name="Tableau169.A" style:family="table-column">
      <style:table-column-properties style:column-width="29.556cm" style:rel-column-width="65535*"/>
    </style:style>
    <style:style style:name="Tableau169.A1" style:family="table-cell">
      <style:table-cell-properties style:vertical-align="middle" fo:padding="0.049cm" fo:border="none"/>
    </style:style>
    <style:style style:name="Tableau170" style:family="table">
      <style:table-properties style:width="29.556cm" style:rel-width="100%" table:align="left" fo:background-color="#e0e0e0">
        <style:background-image/>
      </style:table-properties>
    </style:style>
    <style:style style:name="Tableau170.A" style:family="table-column">
      <style:table-column-properties style:column-width="29.556cm" style:rel-column-width="65535*"/>
    </style:style>
    <style:style style:name="Tableau170.A1" style:family="table-cell">
      <style:table-cell-properties style:vertical-align="middle" fo:padding="0.049cm" fo:border="none"/>
    </style:style>
    <style:style style:name="Tableau171" style:family="table">
      <style:table-properties style:width="29.556cm" style:rel-width="100%" table:align="left" fo:background-color="#e0e0e0">
        <style:background-image/>
      </style:table-properties>
    </style:style>
    <style:style style:name="Tableau171.A" style:family="table-column">
      <style:table-column-properties style:column-width="29.556cm" style:rel-column-width="65535*"/>
    </style:style>
    <style:style style:name="Tableau171.A1" style:family="table-cell">
      <style:table-cell-properties style:vertical-align="middle" fo:padding="0.049cm" fo:border="none"/>
    </style:style>
    <style:style style:name="Tableau172" style:family="table">
      <style:table-properties style:width="29.556cm" style:rel-width="100%" table:align="left" fo:background-color="#e0e0e0">
        <style:background-image/>
      </style:table-properties>
    </style:style>
    <style:style style:name="Tableau172.A" style:family="table-column">
      <style:table-column-properties style:column-width="29.556cm" style:rel-column-width="65535*"/>
    </style:style>
    <style:style style:name="Tableau172.A1" style:family="table-cell">
      <style:table-cell-properties style:vertical-align="middle" fo:padding="0.049cm" fo:border="none"/>
    </style:style>
    <style:style style:name="Tableau173" style:family="table">
      <style:table-properties style:width="29.556cm" style:rel-width="100%" table:align="left" fo:background-color="#e0e0e0">
        <style:background-image/>
      </style:table-properties>
    </style:style>
    <style:style style:name="Tableau173.A" style:family="table-column">
      <style:table-column-properties style:column-width="29.556cm" style:rel-column-width="65535*"/>
    </style:style>
    <style:style style:name="Tableau173.A1" style:family="table-cell">
      <style:table-cell-properties style:vertical-align="middle" fo:padding="0.049cm" fo:border="none"/>
    </style:style>
    <style:style style:name="Tableau174" style:family="table">
      <style:table-properties style:width="29.556cm" style:rel-width="100%" table:align="left" fo:background-color="#e0e0e0">
        <style:background-image/>
      </style:table-properties>
    </style:style>
    <style:style style:name="Tableau174.A" style:family="table-column">
      <style:table-column-properties style:column-width="29.556cm" style:rel-column-width="65535*"/>
    </style:style>
    <style:style style:name="Tableau174.A1" style:family="table-cell">
      <style:table-cell-properties style:vertical-align="middle" fo:padding="0.049cm" fo:border="none"/>
    </style:style>
    <style:style style:name="Tableau175" style:family="table">
      <style:table-properties style:width="29.556cm" style:rel-width="100%" table:align="left" fo:background-color="#e0e0e0">
        <style:background-image/>
      </style:table-properties>
    </style:style>
    <style:style style:name="Tableau175.A" style:family="table-column">
      <style:table-column-properties style:column-width="29.556cm" style:rel-column-width="65535*"/>
    </style:style>
    <style:style style:name="Tableau175.A1" style:family="table-cell">
      <style:table-cell-properties style:vertical-align="middle" fo:padding="0.049cm" fo:border="none"/>
    </style:style>
    <style:style style:name="Tableau176" style:family="table">
      <style:table-properties style:width="29.556cm" style:rel-width="100%" table:align="left" fo:background-color="#e0e0e0">
        <style:background-image/>
      </style:table-properties>
    </style:style>
    <style:style style:name="Tableau176.A" style:family="table-column">
      <style:table-column-properties style:column-width="29.556cm" style:rel-column-width="65535*"/>
    </style:style>
    <style:style style:name="Tableau176.A1" style:family="table-cell">
      <style:table-cell-properties style:vertical-align="middle" fo:padding="0.049cm" fo:border="none"/>
    </style:style>
    <style:style style:name="Tableau177" style:family="table">
      <style:table-properties style:width="29.556cm" style:rel-width="100%" table:align="left" fo:background-color="#e0e0e0">
        <style:background-image/>
      </style:table-properties>
    </style:style>
    <style:style style:name="Tableau177.A" style:family="table-column">
      <style:table-column-properties style:column-width="29.556cm" style:rel-column-width="65535*"/>
    </style:style>
    <style:style style:name="Tableau177.A1" style:family="table-cell">
      <style:table-cell-properties style:vertical-align="middle" fo:padding="0.049cm" fo:border="none"/>
    </style:style>
    <style:style style:name="Tableau178" style:family="table">
      <style:table-properties style:width="29.556cm" style:rel-width="100%" table:align="left" fo:background-color="#e0e0e0">
        <style:background-image/>
      </style:table-properties>
    </style:style>
    <style:style style:name="Tableau178.A" style:family="table-column">
      <style:table-column-properties style:column-width="29.556cm" style:rel-column-width="65535*"/>
    </style:style>
    <style:style style:name="Tableau178.A1" style:family="table-cell">
      <style:table-cell-properties style:vertical-align="middle" fo:padding="0.049cm" fo:border="none"/>
    </style:style>
    <style:style style:name="Tableau179" style:family="table">
      <style:table-properties style:width="29.556cm" style:rel-width="100%" table:align="left" fo:background-color="#e0e0e0">
        <style:background-image/>
      </style:table-properties>
    </style:style>
    <style:style style:name="Tableau179.A" style:family="table-column">
      <style:table-column-properties style:column-width="29.556cm" style:rel-column-width="65535*"/>
    </style:style>
    <style:style style:name="Tableau179.A1" style:family="table-cell">
      <style:table-cell-properties style:vertical-align="middle" fo:padding="0.049cm" fo:border="none"/>
    </style:style>
    <style:style style:name="Tableau180" style:family="table">
      <style:table-properties style:width="29.556cm" style:rel-width="100%" table:align="left" fo:background-color="#e0e0e0">
        <style:background-image/>
      </style:table-properties>
    </style:style>
    <style:style style:name="Tableau180.A" style:family="table-column">
      <style:table-column-properties style:column-width="29.556cm" style:rel-column-width="65535*"/>
    </style:style>
    <style:style style:name="Tableau180.A1" style:family="table-cell">
      <style:table-cell-properties style:vertical-align="middle" fo:padding="0.049cm" fo:border="none"/>
    </style:style>
    <style:style style:name="Tableau181" style:family="table">
      <style:table-properties style:width="29.556cm" style:rel-width="100%" table:align="left" fo:background-color="#e0e0e0">
        <style:background-image/>
      </style:table-properties>
    </style:style>
    <style:style style:name="Tableau181.A" style:family="table-column">
      <style:table-column-properties style:column-width="29.556cm" style:rel-column-width="65535*"/>
    </style:style>
    <style:style style:name="Tableau181.A1" style:family="table-cell">
      <style:table-cell-properties style:vertical-align="middle" fo:padding="0.049cm" fo:border="none"/>
    </style:style>
    <style:style style:name="Tableau182" style:family="table">
      <style:table-properties style:width="29.556cm" style:rel-width="100%" table:align="left" fo:background-color="#e0e0e0">
        <style:background-image/>
      </style:table-properties>
    </style:style>
    <style:style style:name="Tableau182.A" style:family="table-column">
      <style:table-column-properties style:column-width="29.556cm" style:rel-column-width="65535*"/>
    </style:style>
    <style:style style:name="Tableau182.A1" style:family="table-cell">
      <style:table-cell-properties style:vertical-align="middle" fo:padding="0.049cm" fo:border="none"/>
    </style:style>
    <style:style style:name="Tableau183" style:family="table">
      <style:table-properties style:width="29.556cm" style:rel-width="100%" table:align="left" fo:background-color="#e0e0e0">
        <style:background-image/>
      </style:table-properties>
    </style:style>
    <style:style style:name="Tableau183.A" style:family="table-column">
      <style:table-column-properties style:column-width="29.556cm" style:rel-column-width="65535*"/>
    </style:style>
    <style:style style:name="Tableau183.A1" style:family="table-cell">
      <style:table-cell-properties style:vertical-align="middle" fo:padding="0.049cm" fo:border="none"/>
    </style:style>
    <style:style style:name="Tableau184" style:family="table">
      <style:table-properties style:width="29.556cm" style:rel-width="100%" table:align="left" fo:background-color="#e0e0e0">
        <style:background-image/>
      </style:table-properties>
    </style:style>
    <style:style style:name="Tableau184.A" style:family="table-column">
      <style:table-column-properties style:column-width="29.556cm" style:rel-column-width="65535*"/>
    </style:style>
    <style:style style:name="Tableau184.A1" style:family="table-cell">
      <style:table-cell-properties style:vertical-align="middle" fo:padding="0.049cm" fo:border="none"/>
    </style:style>
    <style:style style:name="Tableau185" style:family="table">
      <style:table-properties style:width="29.556cm" style:rel-width="100%" table:align="left" fo:background-color="#e0e0e0">
        <style:background-image/>
      </style:table-properties>
    </style:style>
    <style:style style:name="Tableau185.A" style:family="table-column">
      <style:table-column-properties style:column-width="29.556cm" style:rel-column-width="65535*"/>
    </style:style>
    <style:style style:name="Tableau185.A1" style:family="table-cell">
      <style:table-cell-properties style:vertical-align="middle" fo:padding="0.049cm" fo:border="none"/>
    </style:style>
    <style:style style:name="Tableau186" style:family="table">
      <style:table-properties style:width="29.556cm" style:rel-width="100%" table:align="left" fo:background-color="#e0e0e0">
        <style:background-image/>
      </style:table-properties>
    </style:style>
    <style:style style:name="Tableau186.A" style:family="table-column">
      <style:table-column-properties style:column-width="29.556cm" style:rel-column-width="65535*"/>
    </style:style>
    <style:style style:name="Tableau186.A1" style:family="table-cell">
      <style:table-cell-properties style:vertical-align="middle" fo:padding="0.049cm" fo:border="none"/>
    </style:style>
    <style:style style:name="Tableau187" style:family="table">
      <style:table-properties style:width="29.556cm" style:rel-width="100%" table:align="left" fo:background-color="#e0e0e0">
        <style:background-image/>
      </style:table-properties>
    </style:style>
    <style:style style:name="Tableau187.A" style:family="table-column">
      <style:table-column-properties style:column-width="29.556cm" style:rel-column-width="65535*"/>
    </style:style>
    <style:style style:name="Tableau187.A1" style:family="table-cell">
      <style:table-cell-properties style:vertical-align="middle" fo:padding="0.049cm" fo:border="none"/>
    </style:style>
    <style:style style:name="Tableau188" style:family="table">
      <style:table-properties style:width="29.556cm" style:rel-width="100%" table:align="left" fo:background-color="#e0e0e0">
        <style:background-image/>
      </style:table-properties>
    </style:style>
    <style:style style:name="Tableau188.A" style:family="table-column">
      <style:table-column-properties style:column-width="29.556cm" style:rel-column-width="65535*"/>
    </style:style>
    <style:style style:name="Tableau188.A1" style:family="table-cell">
      <style:table-cell-properties style:vertical-align="middle" fo:padding="0.049cm" fo:border="none"/>
    </style:style>
    <style:style style:name="Tableau189" style:family="table">
      <style:table-properties style:width="29.556cm" style:rel-width="100%" table:align="left" fo:background-color="#e0e0e0">
        <style:background-image/>
      </style:table-properties>
    </style:style>
    <style:style style:name="Tableau189.A" style:family="table-column">
      <style:table-column-properties style:column-width="29.556cm" style:rel-column-width="65535*"/>
    </style:style>
    <style:style style:name="Tableau189.A1" style:family="table-cell">
      <style:table-cell-properties style:vertical-align="middle" fo:padding="0.049cm" fo:border="none"/>
    </style:style>
    <style:style style:name="Tableau190" style:family="table">
      <style:table-properties style:width="29.556cm" style:rel-width="100%" table:align="left" fo:background-color="#e0e0e0">
        <style:background-image/>
      </style:table-properties>
    </style:style>
    <style:style style:name="Tableau190.A" style:family="table-column">
      <style:table-column-properties style:column-width="29.556cm" style:rel-column-width="65535*"/>
    </style:style>
    <style:style style:name="Tableau190.A1" style:family="table-cell">
      <style:table-cell-properties style:vertical-align="middle" fo:padding="0.049cm" fo:border="none"/>
    </style:style>
    <style:style style:name="Tableau191" style:family="table">
      <style:table-properties style:width="29.556cm" style:rel-width="100%" table:align="left" fo:background-color="#e0e0e0">
        <style:background-image/>
      </style:table-properties>
    </style:style>
    <style:style style:name="Tableau191.A" style:family="table-column">
      <style:table-column-properties style:column-width="29.556cm" style:rel-column-width="65535*"/>
    </style:style>
    <style:style style:name="Tableau191.A1" style:family="table-cell">
      <style:table-cell-properties style:vertical-align="middle" fo:padding="0.049cm" fo:border="none"/>
    </style:style>
    <style:style style:name="Tableau192" style:family="table">
      <style:table-properties style:width="29.556cm" style:rel-width="100%" table:align="left" fo:background-color="#e0e0e0">
        <style:background-image/>
      </style:table-properties>
    </style:style>
    <style:style style:name="Tableau192.A" style:family="table-column">
      <style:table-column-properties style:column-width="29.556cm" style:rel-column-width="65535*"/>
    </style:style>
    <style:style style:name="Tableau192.A1" style:family="table-cell">
      <style:table-cell-properties style:vertical-align="middle" fo:padding="0.049cm" fo:border="none"/>
    </style:style>
    <style:style style:name="Tableau193" style:family="table">
      <style:table-properties style:width="29.556cm" style:rel-width="100%" table:align="left" fo:background-color="#e0e0e0">
        <style:background-image/>
      </style:table-properties>
    </style:style>
    <style:style style:name="Tableau193.A" style:family="table-column">
      <style:table-column-properties style:column-width="29.556cm" style:rel-column-width="65535*"/>
    </style:style>
    <style:style style:name="Tableau193.A1" style:family="table-cell">
      <style:table-cell-properties style:vertical-align="middle" fo:padding="0.049cm" fo:border="none"/>
    </style:style>
    <style:style style:name="Tableau194" style:family="table">
      <style:table-properties style:width="29.556cm" style:rel-width="100%" table:align="left" fo:background-color="#e0e0e0">
        <style:background-image/>
      </style:table-properties>
    </style:style>
    <style:style style:name="Tableau194.A" style:family="table-column">
      <style:table-column-properties style:column-width="29.556cm" style:rel-column-width="65535*"/>
    </style:style>
    <style:style style:name="Tableau194.A1" style:family="table-cell">
      <style:table-cell-properties style:vertical-align="middle" fo:padding="0.049cm" fo:border="none"/>
    </style:style>
    <style:style style:name="Tableau195" style:family="table">
      <style:table-properties style:width="29.556cm" style:rel-width="100%" table:align="left" fo:background-color="#e0e0e0">
        <style:background-image/>
      </style:table-properties>
    </style:style>
    <style:style style:name="Tableau195.A" style:family="table-column">
      <style:table-column-properties style:column-width="29.556cm" style:rel-column-width="65535*"/>
    </style:style>
    <style:style style:name="Tableau195.A1" style:family="table-cell">
      <style:table-cell-properties style:vertical-align="middle" fo:padding="0.049cm" fo:border="none"/>
    </style:style>
    <style:style style:name="Tableau196" style:family="table">
      <style:table-properties style:width="29.556cm" style:rel-width="100%" table:align="left" fo:background-color="#e0e0e0">
        <style:background-image/>
      </style:table-properties>
    </style:style>
    <style:style style:name="Tableau196.A" style:family="table-column">
      <style:table-column-properties style:column-width="29.556cm" style:rel-column-width="65535*"/>
    </style:style>
    <style:style style:name="Tableau196.A1" style:family="table-cell">
      <style:table-cell-properties style:vertical-align="middle" fo:padding="0.049cm" fo:border="none"/>
    </style:style>
    <style:style style:name="Tableau197" style:family="table">
      <style:table-properties style:width="29.556cm" style:rel-width="100%" table:align="left" fo:background-color="#e0e0e0">
        <style:background-image/>
      </style:table-properties>
    </style:style>
    <style:style style:name="Tableau197.A" style:family="table-column">
      <style:table-column-properties style:column-width="29.556cm" style:rel-column-width="65535*"/>
    </style:style>
    <style:style style:name="Tableau197.A1" style:family="table-cell">
      <style:table-cell-properties style:vertical-align="middle" fo:padding="0.049cm" fo:border="none"/>
    </style:style>
    <style:style style:name="Tableau198" style:family="table">
      <style:table-properties style:width="29.556cm" style:rel-width="100%" table:align="left" fo:background-color="#e0e0e0">
        <style:background-image/>
      </style:table-properties>
    </style:style>
    <style:style style:name="Tableau198.A" style:family="table-column">
      <style:table-column-properties style:column-width="29.556cm" style:rel-column-width="65535*"/>
    </style:style>
    <style:style style:name="Tableau198.A1" style:family="table-cell">
      <style:table-cell-properties style:vertical-align="middle" fo:padding="0.049cm" fo:border="none"/>
    </style:style>
    <style:style style:name="Tableau199" style:family="table">
      <style:table-properties style:width="29.556cm" style:rel-width="100%" table:align="left" fo:background-color="#e0e0e0">
        <style:background-image/>
      </style:table-properties>
    </style:style>
    <style:style style:name="Tableau199.A" style:family="table-column">
      <style:table-column-properties style:column-width="29.556cm" style:rel-column-width="65535*"/>
    </style:style>
    <style:style style:name="Tableau199.A1" style:family="table-cell">
      <style:table-cell-properties style:vertical-align="middle" fo:padding="0.049cm" fo:border="none"/>
    </style:style>
    <style:style style:name="Tableau200" style:family="table">
      <style:table-properties style:width="29.556cm" style:rel-width="100%" table:align="left" fo:background-color="#e0e0e0">
        <style:background-image/>
      </style:table-properties>
    </style:style>
    <style:style style:name="Tableau200.A" style:family="table-column">
      <style:table-column-properties style:column-width="29.556cm" style:rel-column-width="65535*"/>
    </style:style>
    <style:style style:name="Tableau200.A1" style:family="table-cell">
      <style:table-cell-properties style:vertical-align="middle" fo:padding="0.049cm" fo:border="none"/>
    </style:style>
    <style:style style:name="Tableau201" style:family="table">
      <style:table-properties style:width="29.556cm" style:rel-width="100%" table:align="left" fo:background-color="#e0e0e0">
        <style:background-image/>
      </style:table-properties>
    </style:style>
    <style:style style:name="Tableau201.A" style:family="table-column">
      <style:table-column-properties style:column-width="29.556cm" style:rel-column-width="65535*"/>
    </style:style>
    <style:style style:name="Tableau201.A1" style:family="table-cell">
      <style:table-cell-properties style:vertical-align="middle" fo:padding="0.049cm" fo:border="none"/>
    </style:style>
    <style:style style:name="Tableau202" style:family="table">
      <style:table-properties style:width="29.556cm" style:rel-width="100%" table:align="left" fo:background-color="#e0e0e0">
        <style:background-image/>
      </style:table-properties>
    </style:style>
    <style:style style:name="Tableau202.A" style:family="table-column">
      <style:table-column-properties style:column-width="29.556cm" style:rel-column-width="65535*"/>
    </style:style>
    <style:style style:name="Tableau202.A1" style:family="table-cell">
      <style:table-cell-properties style:vertical-align="middle" fo:padding="0.049cm" fo:border="none"/>
    </style:style>
    <style:style style:name="Tableau203" style:family="table">
      <style:table-properties style:width="29.556cm" style:rel-width="100%" table:align="left" fo:background-color="#e0e0e0">
        <style:background-image/>
      </style:table-properties>
    </style:style>
    <style:style style:name="Tableau203.A" style:family="table-column">
      <style:table-column-properties style:column-width="29.556cm" style:rel-column-width="65535*"/>
    </style:style>
    <style:style style:name="Tableau203.A1" style:family="table-cell">
      <style:table-cell-properties style:vertical-align="middle" fo:padding="0.049cm" fo:border="none"/>
    </style:style>
    <style:style style:name="Tableau204" style:family="table">
      <style:table-properties style:width="29.556cm" style:rel-width="100%" table:align="left" fo:background-color="#e0e0e0">
        <style:background-image/>
      </style:table-properties>
    </style:style>
    <style:style style:name="Tableau204.A" style:family="table-column">
      <style:table-column-properties style:column-width="29.556cm" style:rel-column-width="65535*"/>
    </style:style>
    <style:style style:name="Tableau204.A1" style:family="table-cell">
      <style:table-cell-properties style:vertical-align="middle" fo:padding="0.049cm" fo:border="none"/>
    </style:style>
    <style:style style:name="Tableau205" style:family="table">
      <style:table-properties style:width="29.556cm" style:rel-width="100%" table:align="left" fo:background-color="#e0e0e0">
        <style:background-image/>
      </style:table-properties>
    </style:style>
    <style:style style:name="Tableau205.A" style:family="table-column">
      <style:table-column-properties style:column-width="29.556cm" style:rel-column-width="65535*"/>
    </style:style>
    <style:style style:name="Tableau205.A1" style:family="table-cell">
      <style:table-cell-properties style:vertical-align="middle" fo:padding="0.049cm" fo:border="none"/>
    </style:style>
    <style:style style:name="Tableau206" style:family="table">
      <style:table-properties style:width="29.556cm" style:rel-width="100%" table:align="left" fo:background-color="#e0e0e0">
        <style:background-image/>
      </style:table-properties>
    </style:style>
    <style:style style:name="Tableau206.A" style:family="table-column">
      <style:table-column-properties style:column-width="29.556cm" style:rel-column-width="65535*"/>
    </style:style>
    <style:style style:name="Tableau206.A1" style:family="table-cell">
      <style:table-cell-properties style:vertical-align="middle" fo:padding="0.049cm" fo:border="none"/>
    </style:style>
    <style:style style:name="Tableau207" style:family="table">
      <style:table-properties style:width="29.556cm" style:rel-width="100%" table:align="left" fo:background-color="#e0e0e0">
        <style:background-image/>
      </style:table-properties>
    </style:style>
    <style:style style:name="Tableau207.A" style:family="table-column">
      <style:table-column-properties style:column-width="29.556cm" style:rel-column-width="65535*"/>
    </style:style>
    <style:style style:name="Tableau207.A1" style:family="table-cell">
      <style:table-cell-properties style:vertical-align="middle" fo:padding="0.049cm" fo:border="none"/>
    </style:style>
    <style:style style:name="Tableau208" style:family="table">
      <style:table-properties style:width="29.556cm" style:rel-width="100%" table:align="left" fo:background-color="#e0e0e0">
        <style:background-image/>
      </style:table-properties>
    </style:style>
    <style:style style:name="Tableau208.A" style:family="table-column">
      <style:table-column-properties style:column-width="29.556cm" style:rel-column-width="65535*"/>
    </style:style>
    <style:style style:name="Tableau208.A1" style:family="table-cell">
      <style:table-cell-properties style:vertical-align="middle" fo:padding="0.049cm" fo:border="none"/>
    </style:style>
    <style:style style:name="Tableau209" style:family="table">
      <style:table-properties style:width="29.556cm" style:rel-width="100%" table:align="left" fo:background-color="#e0e0e0">
        <style:background-image/>
      </style:table-properties>
    </style:style>
    <style:style style:name="Tableau209.A" style:family="table-column">
      <style:table-column-properties style:column-width="29.556cm" style:rel-column-width="65535*"/>
    </style:style>
    <style:style style:name="Tableau209.A1" style:family="table-cell">
      <style:table-cell-properties style:vertical-align="middle" fo:padding="0.049cm" fo:border="none"/>
    </style:style>
    <style:style style:name="Tableau210" style:family="table">
      <style:table-properties style:width="29.556cm" style:rel-width="100%" table:align="left" fo:background-color="#e0e0e0">
        <style:background-image/>
      </style:table-properties>
    </style:style>
    <style:style style:name="Tableau210.A" style:family="table-column">
      <style:table-column-properties style:column-width="29.556cm" style:rel-column-width="65535*"/>
    </style:style>
    <style:style style:name="Tableau210.A1" style:family="table-cell">
      <style:table-cell-properties style:vertical-align="middle" fo:padding="0.049cm" fo:border="none"/>
    </style:style>
    <style:style style:name="Tableau211" style:family="table">
      <style:table-properties style:width="29.556cm" style:rel-width="100%" table:align="left" fo:background-color="#e0e0e0">
        <style:background-image/>
      </style:table-properties>
    </style:style>
    <style:style style:name="Tableau211.A" style:family="table-column">
      <style:table-column-properties style:column-width="29.556cm" style:rel-column-width="65535*"/>
    </style:style>
    <style:style style:name="Tableau211.A1" style:family="table-cell">
      <style:table-cell-properties style:vertical-align="middle" fo:padding="0.049cm" fo:border="none"/>
    </style:style>
    <style:style style:name="Tableau212" style:family="table">
      <style:table-properties style:width="29.556cm" style:rel-width="100%" table:align="left" fo:background-color="#e0e0e0">
        <style:background-image/>
      </style:table-properties>
    </style:style>
    <style:style style:name="Tableau212.A" style:family="table-column">
      <style:table-column-properties style:column-width="29.556cm" style:rel-column-width="65535*"/>
    </style:style>
    <style:style style:name="Tableau212.A1" style:family="table-cell">
      <style:table-cell-properties style:vertical-align="middle" fo:padding="0.049cm" fo:border="none"/>
    </style:style>
    <style:style style:name="Tableau213" style:family="table">
      <style:table-properties style:width="29.556cm" style:rel-width="100%" table:align="left" fo:background-color="#e0e0e0">
        <style:background-image/>
      </style:table-properties>
    </style:style>
    <style:style style:name="Tableau213.A" style:family="table-column">
      <style:table-column-properties style:column-width="29.556cm" style:rel-column-width="65535*"/>
    </style:style>
    <style:style style:name="Tableau213.A1" style:family="table-cell">
      <style:table-cell-properties style:vertical-align="middle" fo:padding="0.049cm" fo:border="none"/>
    </style:style>
    <style:style style:name="Tableau214" style:family="table">
      <style:table-properties style:width="29.556cm" style:rel-width="100%" table:align="left" fo:background-color="#e0e0e0">
        <style:background-image/>
      </style:table-properties>
    </style:style>
    <style:style style:name="Tableau214.A" style:family="table-column">
      <style:table-column-properties style:column-width="29.556cm" style:rel-column-width="65535*"/>
    </style:style>
    <style:style style:name="Tableau214.A1" style:family="table-cell">
      <style:table-cell-properties style:vertical-align="middle" fo:padding="0.049cm" fo:border="none"/>
    </style:style>
    <style:style style:name="Tableau215" style:family="table">
      <style:table-properties style:width="29.556cm" style:rel-width="100%" table:align="left" fo:background-color="#e0e0e0">
        <style:background-image/>
      </style:table-properties>
    </style:style>
    <style:style style:name="Tableau215.A" style:family="table-column">
      <style:table-column-properties style:column-width="29.556cm" style:rel-column-width="65535*"/>
    </style:style>
    <style:style style:name="Tableau215.A1" style:family="table-cell">
      <style:table-cell-properties style:vertical-align="middle" fo:padding="0.049cm" fo:border="none"/>
    </style:style>
    <style:style style:name="Tableau216" style:family="table">
      <style:table-properties style:width="29.556cm" style:rel-width="100%" table:align="left" fo:background-color="#e0e0e0">
        <style:background-image/>
      </style:table-properties>
    </style:style>
    <style:style style:name="Tableau216.A" style:family="table-column">
      <style:table-column-properties style:column-width="29.556cm" style:rel-column-width="65535*"/>
    </style:style>
    <style:style style:name="Tableau216.A1" style:family="table-cell">
      <style:table-cell-properties style:vertical-align="middle" fo:padding="0.049cm" fo:border="none"/>
    </style:style>
    <style:style style:name="Tableau217" style:family="table">
      <style:table-properties style:width="29.556cm" style:rel-width="100%" table:align="left" fo:background-color="#e0e0e0">
        <style:background-image/>
      </style:table-properties>
    </style:style>
    <style:style style:name="Tableau217.A" style:family="table-column">
      <style:table-column-properties style:column-width="29.556cm" style:rel-column-width="65535*"/>
    </style:style>
    <style:style style:name="Tableau217.A1" style:family="table-cell">
      <style:table-cell-properties style:vertical-align="middle" fo:padding="0.049cm" fo:border="none"/>
    </style:style>
    <style:style style:name="Tableau218" style:family="table">
      <style:table-properties style:width="29.556cm" style:rel-width="100%" table:align="left" fo:background-color="#e0e0e0">
        <style:background-image/>
      </style:table-properties>
    </style:style>
    <style:style style:name="Tableau218.A" style:family="table-column">
      <style:table-column-properties style:column-width="29.556cm" style:rel-column-width="65535*"/>
    </style:style>
    <style:style style:name="Tableau218.A1" style:family="table-cell">
      <style:table-cell-properties style:vertical-align="middle" fo:padding="0.049cm" fo:border="none"/>
    </style:style>
    <style:style style:name="Tableau219" style:family="table">
      <style:table-properties style:width="29.556cm" style:rel-width="100%" table:align="left" fo:background-color="#e0e0e0">
        <style:background-image/>
      </style:table-properties>
    </style:style>
    <style:style style:name="Tableau219.A" style:family="table-column">
      <style:table-column-properties style:column-width="29.556cm" style:rel-column-width="65535*"/>
    </style:style>
    <style:style style:name="Tableau219.A1" style:family="table-cell">
      <style:table-cell-properties style:vertical-align="middle" fo:padding="0.049cm" fo:border="none"/>
    </style:style>
    <style:style style:name="Tableau220" style:family="table">
      <style:table-properties style:width="29.556cm" style:rel-width="100%" table:align="left" fo:background-color="#e0e0e0">
        <style:background-image/>
      </style:table-properties>
    </style:style>
    <style:style style:name="Tableau220.A" style:family="table-column">
      <style:table-column-properties style:column-width="29.556cm" style:rel-column-width="65535*"/>
    </style:style>
    <style:style style:name="Tableau220.A1" style:family="table-cell">
      <style:table-cell-properties style:vertical-align="middle" fo:padding="0.049cm" fo:border="none"/>
    </style:style>
    <style:style style:name="Tableau221" style:family="table">
      <style:table-properties style:width="29.556cm" style:rel-width="100%" table:align="left" fo:background-color="#e0e0e0">
        <style:background-image/>
      </style:table-properties>
    </style:style>
    <style:style style:name="Tableau221.A" style:family="table-column">
      <style:table-column-properties style:column-width="29.556cm" style:rel-column-width="65535*"/>
    </style:style>
    <style:style style:name="Tableau221.A1" style:family="table-cell">
      <style:table-cell-properties style:vertical-align="middle" fo:padding="0.049cm" fo:border="none"/>
    </style:style>
    <style:style style:name="Tableau222" style:family="table">
      <style:table-properties style:width="29.556cm" style:rel-width="100%" table:align="left" fo:background-color="#e0e0e0">
        <style:background-image/>
      </style:table-properties>
    </style:style>
    <style:style style:name="Tableau222.A" style:family="table-column">
      <style:table-column-properties style:column-width="29.556cm" style:rel-column-width="65535*"/>
    </style:style>
    <style:style style:name="Tableau222.A1" style:family="table-cell">
      <style:table-cell-properties style:vertical-align="middle" fo:padding="0.049cm" fo:border="none"/>
    </style:style>
    <style:style style:name="Tableau223" style:family="table">
      <style:table-properties style:width="29.556cm" style:rel-width="100%" table:align="left" fo:background-color="#e0e0e0">
        <style:background-image/>
      </style:table-properties>
    </style:style>
    <style:style style:name="Tableau223.A" style:family="table-column">
      <style:table-column-properties style:column-width="29.556cm" style:rel-column-width="65535*"/>
    </style:style>
    <style:style style:name="Tableau223.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1">
      <style:paragraph-properties fo:margin-top="0cm" fo:margin-bottom="0cm"/>
    </style:style>
    <style:style style:name="P32" style:family="paragraph" style:parent-style-name="Text_20_body" style:list-style-name="L2">
      <style:paragraph-properties fo:margin-top="0cm" fo:margin-bottom="0cm"/>
    </style:style>
    <style:style style:name="P33" style:family="paragraph" style:parent-style-name="Text_20_body" style:list-style-name="L3">
      <style:paragraph-properties fo:margin-top="0cm" fo:margin-bottom="0cm"/>
    </style:style>
    <style:style style:name="P34" style:family="paragraph" style:parent-style-name="Text_20_body" style:list-style-name="L4">
      <style:paragraph-properties fo:margin-top="0cm" fo:margin-bottom="0cm"/>
    </style:style>
    <style:style style:name="P35" style:family="paragraph" style:parent-style-name="Text_20_body" style:list-style-name="L5">
      <style:paragraph-properties fo:margin-top="0cm" fo:margin-bottom="0cm"/>
    </style:style>
    <style:style style:name="P36" style:family="paragraph" style:parent-style-name="Text_20_body" style:list-style-name="L6">
      <style:paragraph-properties fo:margin-top="0cm" fo:margin-bottom="0cm"/>
    </style:style>
    <style:style style:name="P37" style:family="paragraph" style:parent-style-name="Text_20_body" style:list-style-name="L7">
      <style:paragraph-properties fo:margin-top="0cm" fo:margin-bottom="0cm"/>
    </style:style>
    <style:style style:name="P38" style:family="paragraph" style:parent-style-name="Text_20_body" style:list-style-name="L8">
      <style:paragraph-properties fo:margin-top="0cm" fo:margin-bottom="0cm"/>
    </style:style>
    <style:style style:name="P39" style:family="paragraph" style:parent-style-name="Text_20_body" style:list-style-name="L17">
      <style:paragraph-properties fo:margin-top="0cm" fo:margin-bottom="0cm"/>
    </style:style>
    <style:style style:name="P40" style:family="paragraph" style:parent-style-name="Text_20_body" style:list-style-name="L18">
      <style:paragraph-properties fo:margin-top="0cm" fo:margin-bottom="0cm"/>
    </style:style>
    <style:style style:name="P41" style:family="paragraph" style:parent-style-name="Text_20_body" style:list-style-name="L19">
      <style:paragraph-properties fo:margin-top="0cm" fo:margin-bottom="0cm"/>
    </style:style>
    <style:style style:name="P42" style:family="paragraph" style:parent-style-name="Text_20_body" style:list-style-name="L20">
      <style:paragraph-properties fo:margin-top="0cm" fo:margin-bottom="0cm"/>
    </style:style>
    <style:style style:name="P43" style:family="paragraph" style:parent-style-name="Text_20_body" style:list-style-name="L21">
      <style:paragraph-properties fo:margin-top="0cm" fo:margin-bottom="0cm"/>
    </style:style>
    <style:style style:name="P44" style:family="paragraph" style:parent-style-name="Text_20_body" style:list-style-name="L22">
      <style:paragraph-properties fo:margin-top="0cm" fo:margin-bottom="0cm"/>
    </style:style>
    <style:style style:name="P45" style:family="paragraph" style:parent-style-name="Text_20_body" style:list-style-name="L23">
      <style:paragraph-properties fo:margin-top="0cm" fo:margin-bottom="0cm"/>
    </style:style>
    <style:style style:name="P46" style:family="paragraph" style:parent-style-name="Text_20_body" style:list-style-name="L24">
      <style:paragraph-properties fo:margin-top="0cm" fo:margin-bottom="0cm"/>
    </style:style>
    <style:style style:name="P47" style:family="paragraph" style:parent-style-name="Text_20_body" style:list-style-name="L25">
      <style:paragraph-properties fo:margin-top="0cm" fo:margin-bottom="0cm"/>
    </style:style>
    <style:style style:name="P48" style:family="paragraph" style:parent-style-name="Text_20_body" style:list-style-name="L26">
      <style:paragraph-properties fo:margin-top="0cm" fo:margin-bottom="0cm"/>
    </style:style>
    <style:style style:name="P49" style:family="paragraph" style:parent-style-name="Text_20_body" style:list-style-name="L27">
      <style:paragraph-properties fo:margin-top="0cm" fo:margin-bottom="0cm"/>
    </style:style>
    <style:style style:name="P50" style:family="paragraph" style:parent-style-name="Text_20_body" style:list-style-name="L28">
      <style:paragraph-properties fo:margin-top="0cm" fo:margin-bottom="0cm"/>
    </style:style>
    <style:style style:name="P51" style:family="paragraph" style:parent-style-name="Text_20_body" style:list-style-name="L29">
      <style:paragraph-properties fo:margin-top="0cm" fo:margin-bottom="0cm"/>
    </style:style>
    <style:style style:name="P52" style:family="paragraph" style:parent-style-name="Text_20_body" style:list-style-name="L30">
      <style:paragraph-properties fo:margin-top="0cm" fo:margin-bottom="0cm"/>
    </style:style>
    <style:style style:name="P53" style:family="paragraph" style:parent-style-name="Preformatted_20_Text">
      <style:paragraph-properties fo:margin-top="0cm" fo:margin-bottom="0.499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top"/>Unix2Aix - ou comment devenir un parfait admin AIX quand on est deja admin UNIX</text:h>
      <text:h text:style-name="Heading_20_1" text:outline-level="1"> </text:h>
      <text:p text:style-name="Text_20_body"><text:a xlink:type="simple" xlink:href="http://www.linux-france.org/%7Emdecore/aix/memo-aix/memo-aix.html#sec1">1. Démarrage du système : init </text:a><text:line-break/><text:a xlink:type="simple" xlink:href="http://www.linux-france.org/%7Emdecore/aix/memo-aix/memo-aix.html#sec2">2. Démarrage des services : System Resource Controller </text:a><text:line-break/><text:a xlink:type="simple" xlink:href="http://www.linux-france.org/%7Emdecore/aix/memo-aix/memo-aix.html#sec3">3. Arrêt du système </text:a><text:line-break/><text:a xlink:type="simple" xlink:href="http://www.linux-france.org/%7Emdecore/aix/memo-aix/memo-aix.html#sec4">4. Partitions, disques, groupes de volumes </text:a><text:line-break/><text:a xlink:type="simple" xlink:href="http://www.linux-france.org/%7Emdecore/aix/memo-aix/memo-aix.html#sec5">5. Physical Volume </text:a><text:line-break/>    <text:a xlink:type="simple" xlink:href="http://www.linux-france.org/%7Emdecore/aix/memo-aix/memo-aix.html#subsec5.1">5.1. Affichage des PV </text:a><text:line-break/>    <text:a xlink:type="simple" xlink:href="http://www.linux-france.org/%7Emdecore/aix/memo-aix/memo-aix.html#subsec5.2">5.2. Ajout d'un PV </text:a><text:line-break/>    <text:a xlink:type="simple" xlink:href="http://www.linux-france.org/%7Emdecore/aix/memo-aix/memo-aix.html#subsec5.3">5.3. Déplacement du contenu du PV </text:a><text:line-break/>    <text:a xlink:type="simple" xlink:href="http://www.linux-france.org/%7Emdecore/aix/memo-aix/memo-aix.html#subsec5.4">5.4. Suppression d'un disque </text:a><text:line-break/><text:a xlink:type="simple" xlink:href="http://www.linux-france.org/%7Emdecore/aix/memo-aix/memo-aix.html#sec6">6. Volume Group </text:a><text:line-break/>    <text:a xlink:type="simple" xlink:href="http://www.linux-france.org/%7Emdecore/aix/memo-aix/memo-aix.html#subsec6.1">6.1. Affichage des VG </text:a><text:line-break/>    <text:a xlink:type="simple" xlink:href="http://www.linux-france.org/%7Emdecore/aix/memo-aix/memo-aix.html#subsec6.2">6.2. Ajout d'un VG </text:a><text:line-break/>    <text:a xlink:type="simple" xlink:href="http://www.linux-france.org/%7Emdecore/aix/memo-aix/memo-aix.html#subsec6.3">6.3. Retrait d'un VG </text:a><text:line-break/>    <text:a xlink:type="simple" xlink:href="http://www.linux-france.org/%7Emdecore/aix/memo-aix/memo-aix.html#subsec6.4">6.4. Activation / désactivation de VG </text:a><text:line-break/>    <text:a xlink:type="simple" xlink:href="http://www.linux-france.org/%7Emdecore/aix/memo-aix/memo-aix.html#subsec6.5">6.5. Importation / exportation de VG à partir de / vers un disque </text:a><text:line-break/>    <text:a xlink:type="simple" xlink:href="http://www.linux-france.org/%7Emdecore/aix/memo-aix/memo-aix.html#subsec6.6">6.6. Gros volumes </text:a><text:line-break/><text:a xlink:type="simple" xlink:href="http://www.linux-france.org/%7Emdecore/aix/memo-aix/memo-aix.html#sec7">7. Volumes logiques </text:a><text:line-break/>    <text:a xlink:type="simple" xlink:href="http://www.linux-france.org/%7Emdecore/aix/memo-aix/memo-aix.html#subsec7.1">7.1. Affichage des LV </text:a><text:line-break/>    <text:a xlink:type="simple" xlink:href="http://www.linux-france.org/%7Emdecore/aix/memo-aix/memo-aix.html#subsec7.2">7.2. Ajout d'un LV </text:a><text:line-break/>    <text:a xlink:type="simple" xlink:href="http://www.linux-france.org/%7Emdecore/aix/memo-aix/memo-aix.html#subsec7.3">7.3. Modifications d'un LV </text:a><text:line-break/>    <text:a xlink:type="simple" xlink:href="http://www.linux-france.org/%7Emdecore/aix/memo-aix/memo-aix.html#subsec7.4">7.4. Suppression d'un LV </text:a><text:line-break/><text:a xlink:type="simple" xlink:href="http://www.linux-france.org/%7Emdecore/aix/memo-aix/memo-aix.html#sec8">8. Création d'un mirroir </text:a><text:line-break/>    <text:a xlink:type="simple" xlink:href="http://www.linux-france.org/%7Emdecore/aix/memo-aix/memo-aix.html#subsec8.1">8.1. Mirroir d'un disque entier </text:a><text:line-break/>    <text:a xlink:type="simple" xlink:href="http://www.linux-france.org/%7Emdecore/aix/memo-aix/memo-aix.html#subsec8.2">8.2. Mirroir du LV et création du système de fichiers </text:a><text:line-break/><text:a xlink:type="simple" xlink:href="http://www.linux-france.org/%7Emdecore/aix/memo-aix/memo-aix.html#sec9">9. Ajout d'un disque de secours (Hot Spare) </text:a><text:line-break/><text:a xlink:type="simple" xlink:href="http://www.linux-france.org/%7Emdecore/aix/memo-aix/memo-aix.html#sec10">10. Système de fichiers </text:a><text:line-break/>    <text:a xlink:type="simple" xlink:href="http://www.linux-france.org/%7Emdecore/aix/memo-aix/memo-aix.html#subsec10.1">10.1. Rappels </text:a><text:line-break/>    <text:a xlink:type="simple" xlink:href="http://www.linux-france.org/%7Emdecore/aix/memo-aix/memo-aix.html#subsec10.2">10.2. Affichage des FS </text:a><text:line-break/>    <text:a xlink:type="simple" xlink:href="http://www.linux-france.org/%7Emdecore/aix/memo-aix/memo-aix.html#subsec10.3">10.3. Création d'un FS </text:a><text:line-break/>    <text:a xlink:type="simple" xlink:href="http://www.linux-france.org/%7Emdecore/aix/memo-aix/memo-aix.html#subsec10.4">10.4. Modifications d'un FS </text:a><text:line-break/>    <text:a xlink:type="simple" xlink:href="http://www.linux-france.org/%7Emdecore/aix/memo-aix/memo-aix.html#subsec10.5">10.5. Supprimer un FS </text:a><text:line-break/>    <text:a xlink:type="simple" xlink:href="http://www.linux-france.org/%7Emdecore/aix/memo-aix/memo-aix.html#subsec10.6">10.6. Ménage dans les systèmes de fichiers </text:a><text:line-break/>    <text:a xlink:type="simple" xlink:href="http://www.linux-france.org/%7Emdecore/aix/memo-aix/memo-aix.html#subsec10.7">10.7. Défragmentation d'un FS </text:a><text:line-break/>    <text:a xlink:type="simple" xlink:href="http://www.linux-france.org/%7Emdecore/aix/memo-aix/memo-aix.html#subsec10.8">10.8. Création d'un ramdisk </text:a><text:line-break/>    <text:a xlink:type="simple" xlink:href="http://www.linux-france.org/%7Emdecore/aix/memo-aix/memo-aix.html#subsec10.9">10.9. Au secours ! </text:a><text:line-break/><text:a xlink:type="simple" xlink:href="http://www.linux-france.org/%7Emdecore/aix/memo-aix/memo-aix.html#sec11">11. Quotas </text:a><text:line-break/><text:a xlink:type="simple" xlink:href="http://www.linux-france.org/%7Emdecore/aix/memo-aix/memo-aix.html#sec12">12. Resource Monitoring and Control (RMC) </text:a><text:line-break/><text:a xlink:type="simple" xlink:href="http://www.linux-france.org/%7Emdecore/aix/memo-aix/memo-aix.html#sec13">13. Espace de pagination (swap) </text:a><text:line-break/>    <text:a xlink:type="simple" xlink:href="http://www.linux-france.org/%7Emdecore/aix/memo-aix/memo-aix.html#subsec13.1">13.1. Affichage de l'espace de pagination </text:a><text:line-break/>    <text:a xlink:type="simple" xlink:href="http://www.linux-france.org/%7Emdecore/aix/memo-aix/memo-aix.html#subsec13.2">13.2. Ajout d'un espace de pagination </text:a><text:line-break/>    <text:a xlink:type="simple" xlink:href="http://www.linux-france.org/%7Emdecore/aix/memo-aix/memo-aix.html#subsec13.3">13.3. Modification d'un espace de pagination </text:a><text:line-break/>    <text:a xlink:type="simple" xlink:href="http://www.linux-france.org/%7Emdecore/aix/memo-aix/memo-aix.html#subsec13.4">13.4. Activation / désactivation d'un espace de pagination </text:a><text:line-break/><text:a xlink:type="simple" xlink:href="http://www.linux-france.org/%7Emdecore/aix/memo-aix/memo-aix.html#sec14">14. Gestion des périphériques </text:a><text:line-break/>    <text:a xlink:type="simple" xlink:href="http://www.linux-france.org/%7Emdecore/aix/memo-aix/memo-aix.html#subsec14.1">14.1. Affichage des périphériques </text:a><text:line-break/>    <text:a xlink:type="simple" xlink:href="http://www.linux-france.org/%7Emdecore/aix/memo-aix/memo-aix.html#subsec14.2">14.2. Configurer les unités </text:a><text:line-break/><text:a xlink:type="simple" xlink:href="http://www.linux-france.org/%7Emdecore/aix/memo-aix/memo-aix.html#sec15">15. Sauvegardes </text:a><text:line-break/>    <text:a xlink:type="simple" xlink:href="http://www.linux-france.org/%7Emdecore/aix/memo-aix/memo-aix.html#subsec15.1">15.1. Sauvegarde système </text:a><text:line-break/>    <text:a xlink:type="simple" xlink:href="http://www.linux-france.org/%7Emdecore/aix/memo-aix/memo-aix.html#subsec15.2">15.2. backup / restore </text:a><text:line-break/>    <text:a xlink:type="simple" xlink:href="http://www.linux-france.org/%7Emdecore/aix/memo-aix/memo-aix.html#subsec15.3">15.3. cpio </text:a><text:line-break/>    <text:a xlink:type="simple" xlink:href="http://www.linux-france.org/%7Emdecore/aix/memo-aix/memo-aix.html#subsec15.4">15.4. Gestion de la bande </text:a><text:line-break/>    <text:a xlink:type="simple" xlink:href="http://www.linux-france.org/%7Emdecore/aix/memo-aix/memo-aix.html#subsec15.5">15.5. Vérifications de la sauvegarde, de la bande </text:a><text:line-break/><text:a xlink:type="simple" xlink:href="http://www.linux-france.org/%7Emdecore/aix/memo-aix/memo-aix.html#sec16">16. Les packages </text:a><text:line-break/>    <text:a xlink:type="simple" xlink:href="http://www.linux-france.org/%7Emdecore/aix/memo-aix/memo-aix.html#subsec16.1">16.1. Listes des packages </text:a><text:line-break/>    <text:a xlink:type="simple" xlink:href="http://www.linux-france.org/%7Emdecore/aix/memo-aix/memo-aix.html#subsec16.2">16.2. Installation des packages et des patchs </text:a><text:line-break/><text:a xlink:type="simple" xlink:href="http://www.linux-france.org/%7Emdecore/aix/memo-aix/memo-aix.html#sec17">17. Sécurité et utilisateurs </text:a><text:line-break/>    <text:a xlink:type="simple" xlink:href="http://www.linux-france.org/%7Emdecore/aix/memo-aix/memo-aix.html#subsec17.1">17.1. Fichiers utilisés </text:a><text:line-break/>    <text:a xlink:type="simple" xlink:href="http://www.linux-france.org/%7Emdecore/aix/memo-aix/memo-aix.html#subsec17.2">17.2. Les utilisateurs </text:a><text:line-break/>    <text:a xlink:type="simple" xlink:href="http://www.linux-france.org/%7Emdecore/aix/memo-aix/memo-aix.html#subsec17.3">17.3. Les groupes </text:a><text:line-break/>    <text:a xlink:type="simple" xlink:href="http://www.linux-france.org/%7Emdecore/aix/memo-aix/memo-aix.html#subsec17.4">17.4. Au secours ! </text:a><text:line-break/><text:a xlink:type="simple" xlink:href="http://www.linux-france.org/%7Emdecore/aix/memo-aix/memo-aix.html#sec18">18. Cron </text:a><text:line-break/><text:a xlink:type="simple" xlink:href="http://www.linux-france.org/%7Emdecore/aix/memo-aix/memo-aix.html#sec19">19. Réseau </text:a><text:line-break/>    <text:a xlink:type="simple" xlink:href="http://www.linux-france.org/%7Emdecore/aix/memo-aix/memo-aix.html#subsec19.1">19.1. Affichage des attributs réseau </text:a><text:line-break/>    <text:a xlink:type="simple" xlink:href="http://www.linux-france.org/%7Emdecore/aix/memo-aix/memo-aix.html#subsec19.2">19.2. Configurer une interface </text:a><text:line-break/>    <text:a xlink:type="simple" xlink:href="http://www.linux-france.org/%7Emdecore/aix/memo-aix/memo-aix.html#subsec19.3">19.3. Dé configurer une interface </text:a><text:line-break/>    <text:a xlink:type="simple" xlink:href="http://www.linux-france.org/%7Emdecore/aix/memo-aix/memo-aix.html#subsec19.4">19.4. Modifications de l'interface réseau </text:a><text:line-break/><text:a xlink:type="simple" xlink:href="http://www.linux-france.org/%7Emdecore/aix/memo-aix/memo-aix.html#sec20">20. Autres commandes </text:a></text:p>
      <text:p text:style-name="Text_20_body">Particularité AIX : ODM (Object Data Manager), qui contient toute les informations système (unités, logiciels, configuration de la machine, menus, écrans et commandes utilisés par SMIT). En principe un administrateur n'a pas besoin de modifier directement la base ODM. Répertoires concernés : /etc/objrepos, /usr/lib/objrepos. </text:p>
      <text:p text:style-name="Text_20_body">Outils de gestion AIX : </text:p>
      <text:list xml:id="list37358635" text:style-name="L1">
        <text:list-item>
          <text:p text:style-name="P31">smit /smitty : génère les fichiers $HOME/smit.log (menus consultés, stdout, stderr, copie d'écran) et $HOME/smit.script (commandes système passées par smit, directement utilisable comme script shell). Le HOME de root est /, et ces fichiers ne sont jamais purgés. Si / est saturé cela peut poser des problèmes, on peut donc appeler smit avec les options -l &lt;fic logs&gt; et -s &lt;fic script&gt;. Tip : La touche [F8] permet de visualiser le nom de raccourci d'un écran. smit -x permet de naviguer dans smit sans exécuter aucune commande (les fichiers de logs et système sont quand même remplis). </text:p>
        </text:list-item>
        <text:list-item>
          <text:p text:style-name="P1">WebSM : wsm, http://hostname/wsm.html, wsm -host hostname </text:p>
        </text:list-item>
      </text:list>
      <text:p text:style-name="Text_20_body">L'équivalent du BIOS sur les serveurs AIX est le SMS (System Management Services). Il permet d'afficher la configuration de la machine, de définir la liste d'amorçage. Pour cela, appuyer après l'icône clavier et avant la dernière icône sur la touche F1 lors du démarrage ou 1 sur un terminal ASCII. Accessible sur les pSeries, ce code est livré avec la machine et ne fait pas partie d'AIX. Sinon le mode maintenance (accessible par un CD d'installation ou une bande système) permet de restaurer le mot de passe root, réparer une machine qui ne s'amorce pas, installer ou migrer AIX, ... </text:p>
      <text:p text:style-name="Text_20_body"><text:a xlink:type="simple" xlink:href="http://www.linux-france.org/%7Emdecore/aix/memo-aix/memo-aix.html#top">Top</text:a><text:bookmark text:name="sec1"/></text:p>
      <text:h text:style-name="Heading_20_2" text:outline-level="2">1. Démarrage du système : init</text:h>
      <text:p text:style-name="Text_20_body">inittab : 10 niveaux d'exécution (de 0 à 9). Par défaut : 2. </text:p>
      <text:p text:style-name="Text_20_body">Commandes : </text:p>
      <text:list xml:id="list37346074" text:style-name="L2">
        <text:list-item>
          <text:p text:style-name="P32">shutdown -m : passe en mode mono-utilisateur, arrête TCP/IP </text:p>
        </text:list-item>
        <text:list-item>
          <text:p text:style-name="P2">telinit 2 : repasse au niveau d'exécution 2 </text:p>
        </text:list-item>
      </text:list>
      <text:p text:style-name="Text_20_body">Pour éditer /etc/inittab et garantir qu'il n'y a aucune erreur de syntaxe (pouvant entraîner le non redémarrage de la machine), utiliser les commandes : </text:p>
      <text:list xml:id="list37353260" text:style-name="L3">
        <text:list-item>
          <text:p text:style-name="P33">mkitab </text:p>
        </text:list-item>
        <text:list-item>
          <text:p text:style-name="P33">chitab, et </text:p>
        </text:list-item>
        <text:list-item>
          <text:p text:style-name="P3">rmitab. </text:p>
        </text:list-item>
      </text:list>
      <text:p text:style-name="Text_20_body">Pour que le système relise le fichier /etc/inittab, exécuter : </text:p>
      <table:table table:name="Tableau1" table:style-name="Tableau1">
        <table:table-column table:style-name="Tableau1.A"/>
        <table:table-row>
          <table:table-cell table:style-name="Tableau1.A1" office:value-type="string">
            <text:p text:style-name="Preformatted_20_Text"># telinit q</text:p>
            <text:p text:style-name="P53">#</text:p>
          </table:table-cell>
        </table:table-row>
      </table:table>
      <text:p text:style-name="Text_20_body">Pour afficher le niveau d'exécution courant : </text:p>
      <table:table table:name="Tableau2" table:style-name="Tableau2">
        <table:table-column table:style-name="Tableau2.A"/>
        <table:table-row>
          <table:table-cell table:style-name="Tableau2.A1" office:value-type="string">
            <text:p text:style-name="Preformatted_20_Text"># who -r</text:p>
            <text:p text:style-name="Preformatted_20_Text"><text:s text:c="3"/>. <text:s text:c="7"/>run-level 2 30 déc 10:01 <text:s text:c="6"/>2 <text:s text:c="3"/>0 <text:s text:c="3"/>S</text:p>
            <text:p text:style-name="P53">#</text:p>
          </table:table-cell>
        </table:table-row>
      </table:table>
      <text:p text:style-name="Text_20_body"><text:a xlink:type="simple" xlink:href="http://www.linux-france.org/%7Emdecore/aix/memo-aix/memo-aix.html#top">Top</text:a><text:bookmark text:name="sec2"/></text:p>
      <text:h text:style-name="Heading_20_2" text:outline-level="2">2. Démarrage des services : System Resource Controller </text:h>
      <text:p text:style-name="Text_20_body">La gestion des services se fait avec SRC (System Resource Controller). </text:p>
      <text:p text:style-name="Text_20_body">On distingue sous AIX deux notions : </text:p>
      <text:list xml:id="list37342067" text:style-name="L4">
        <text:list-item>
          <text:p text:style-name="P34">un sous-système, conçu pour exécuter une tâche bien définie (exemple : lpd) </text:p>
        </text:list-item>
        <text:list-item>
          <text:p text:style-name="P4">un groupe de sous systèmes (exemple : spooler). </text:p>
        </text:list-item>
      </text:list>
      <text:p text:style-name="Text_20_body">Les commandes : </text:p>
      <text:list xml:id="list37342336" text:style-name="L5">
        <text:list-item>
          <text:p text:style-name="P35">lssrc permet d'afficher l'état des SRC </text:p>
        </text:list-item>
        <text:list-item>
          <text:p text:style-name="P35">startrsc permet de démarrer un groupe ou un sous-système </text:p>
        </text:list-item>
        <text:list-item>
          <text:p text:style-name="P35">stopsrc permet d'arrêter un groupe ou un sous-système </text:p>
        </text:list-item>
        <text:list-item>
          <text:p text:style-name="P5">refresh rafraîchir (relire le fichier de configuration) un groupe ou un sous-système. Eh oui killall -HUP inetd ça ne marchera pas, il faut faire un refresh -s inetd. </text:p>
        </text:list-item>
      </text:list>
      <text:p text:style-name="Text_20_body">Les options -s et -g permettent de sélectionner un système ou un groupe. </text:p>
      <text:p text:style-name="Text_20_body">Exemples : </text:p>
      <text:p text:style-name="Text_20_body">Affichage de la relation entre les groupes et les sous-systèmes : </text:p>
      <table:table table:name="Tableau3" table:style-name="Tableau3">
        <table:table-column table:style-name="Tableau3.A"/>
        <table:table-row>
          <table:table-cell table:style-name="Tableau3.A1" office:value-type="string">
            <text:p text:style-name="Preformatted_20_Text"># lssrc -a</text:p>
            <text:p text:style-name="Preformatted_20_Text">Sous-système <text:s text:c="5"/>Groupe <text:s text:c="10"/>PID <text:s text:c="4"/>Etat</text:p>
            <text:p text:style-name="Preformatted_20_Text"><text:s/>syslogd <text:s text:c="9"/>ras <text:s text:c="13"/>196814 <text:s text:c="2"/>actif</text:p>
            <text:p text:style-name="Preformatted_20_Text"><text:s/>sendmail <text:s text:c="8"/>mail <text:s text:c="12"/>352396 <text:s text:c="2"/>actif</text:p>
            <text:p text:style-name="Preformatted_20_Text"><text:s/>portmap <text:s text:c="9"/>portmap <text:s text:c="9"/>286850 <text:s text:c="2"/>actif</text:p>
            <text:p text:style-name="Preformatted_20_Text"><text:s/>inetd <text:s text:c="11"/>tcpip <text:s text:c="11"/>262296 <text:s text:c="2"/>actif</text:p>
            <text:p text:style-name="Preformatted_20_Text"><text:s/>snmpd <text:s text:c="11"/>tcpip <text:s text:c="11"/>254124 <text:s text:c="2"/>actif</text:p>
            <text:p text:style-name="Preformatted_20_Text"><text:s/>dpid2 <text:s text:c="11"/>tcpip <text:s text:c="11"/>303282 <text:s text:c="2"/>actif</text:p>
            <text:p text:style-name="Preformatted_20_Text"><text:s/>hostmibd <text:s text:c="8"/>tcpip <text:s text:c="11"/>368812 <text:s text:c="2"/>actif</text:p>
            <text:p text:style-name="Preformatted_20_Text"><text:s/>biod <text:s text:c="12"/>nfs <text:s text:c="13"/>295060 <text:s text:c="2"/>actif</text:p>
            <text:p text:style-name="Preformatted_20_Text"><text:s/>rpc.statd <text:s text:c="7"/>nfs <text:s text:c="13"/>385132 <text:s text:c="2"/>actif</text:p>
            <text:p text:style-name="Preformatted_20_Text"><text:s/>rpc.lockd <text:s text:c="7"/>nfs <text:s text:c="13"/>188488 <text:s text:c="2"/>actif</text:p>
            <text:p text:style-name="Preformatted_20_Text"><text:s/>ctrmc <text:s text:c="11"/>rsct <text:s text:c="12"/>458896 <text:s text:c="2"/>actif</text:p>
            <text:p text:style-name="Preformatted_20_Text"><text:s/>ctcas <text:s text:c="11"/>rsct <text:s text:c="12"/>319690 <text:s text:c="2"/>actif</text:p>
            <text:p text:style-name="Preformatted_20_Text"><text:s/>IBM.ERRM <text:s text:c="8"/>rsct_rm <text:s text:c="9"/>622762 <text:s text:c="2"/>actif</text:p>
            <text:p text:style-name="Preformatted_20_Text"><text:s/>IBM.ServiceRM <text:s text:c="3"/>rsct_rm <text:s text:c="9"/>98468 <text:s text:c="2"/>actif</text:p>
            <text:p text:style-name="Preformatted_20_Text"><text:s/>IBM.AuditRM <text:s text:c="5"/>rsct_rm <text:s text:c="9"/>639134 <text:s text:c="2"/>actif</text:p>
            <text:p text:style-name="Preformatted_20_Text"><text:s/>IBM.CSMAgentRM <text:s text:c="2"/>rsct_rm <text:s text:c="9"/>491768 <text:s text:c="2"/>actif</text:p>
            <text:p text:style-name="Preformatted_20_Text"><text:s/>wsmrefserver <text:s text:c="21"/>450754 <text:s text:c="2"/>actif</text:p>
            <text:p text:style-name="Preformatted_20_Text"><text:s/>IBM.HostRM <text:s text:c="6"/>rsct_rm <text:s text:c="9"/>475272 <text:s text:c="2"/>actif</text:p>
            <text:p text:style-name="Preformatted_20_Text"><text:s/>IBM.FSRM <text:s text:c="8"/>rsct_rm <text:s text:c="9"/>499822 <text:s text:c="2"/>actif</text:p>
            <text:p text:style-name="Preformatted_20_Text"><text:s/>qdaemon <text:s text:c="9"/>spooler <text:s text:c="17"/>inopérant</text:p>
            <text:p text:style-name="Preformatted_20_Text"><text:s/>writesrv <text:s text:c="8"/>spooler <text:s text:c="17"/>inopérant</text:p>
            <text:p text:style-name="Preformatted_20_Text"><text:s/>lpd <text:s text:c="13"/>spooler <text:s text:c="17"/>inopérant</text:p>
            <text:p text:style-name="Preformatted_20_Text"><text:s/>clvmd <text:s text:c="36"/>inopérant</text:p>
            <text:p text:style-name="Preformatted_20_Text"><text:s/>rwhod <text:s text:c="11"/>tcpip <text:s text:c="19"/>inopérant</text:p>
            <text:p text:style-name="Preformatted_20_Text"><text:s/>xntpd <text:s text:c="11"/>tcpip <text:s text:c="19"/>inopérant</text:p>
            <text:p text:style-name="Preformatted_20_Text"><text:s/>dhcpcd <text:s text:c="10"/>tcpip <text:s text:c="19"/>inopérant</text:p>
            <text:p text:style-name="Preformatted_20_Text"><text:s/>ndpd-host <text:s text:c="7"/>tcpip <text:s text:c="19"/>inopérant</text:p>
            <text:p text:style-name="Preformatted_20_Text"><text:s/>ndpd-router <text:s text:c="5"/>tcpip <text:s text:c="19"/>inopérant</text:p>
            <text:p text:style-name="Preformatted_20_Text"><text:s/>tftpd <text:s text:c="11"/>tcpip <text:s text:c="19"/>inopérant</text:p>
            <text:p text:style-name="Preformatted_20_Text"><text:s/>gated <text:s text:c="11"/>tcpip <text:s text:c="19"/>inopérant</text:p>
            <text:p text:style-name="Preformatted_20_Text"><text:s/>named <text:s text:c="11"/>tcpip <text:s text:c="19"/>inopérant</text:p>
            <text:p text:style-name="Preformatted_20_Text"><text:s/>routed <text:s text:c="10"/>tcpip <text:s text:c="19"/>inopérant</text:p>
            <text:p text:style-name="Preformatted_20_Text"><text:s/>iptrace <text:s text:c="9"/>tcpip <text:s text:c="19"/>inopérant</text:p>
            <text:p text:style-name="Preformatted_20_Text"><text:s/>timed <text:s text:c="11"/>tcpip <text:s text:c="19"/>inopérant</text:p>
            <text:p text:style-name="Preformatted_20_Text"><text:s/>dhcpsd <text:s text:c="10"/>tcpip <text:s text:c="19"/>inopérant</text:p>
            <text:p text:style-name="Preformatted_20_Text"><text:s/>dhcprd <text:s text:c="10"/>tcpip <text:s text:c="19"/>inopérant</text:p>
            <text:p text:style-name="Preformatted_20_Text"><text:s/>mrouted <text:s text:c="9"/>tcpip <text:s text:c="19"/>inopérant</text:p>
            <text:p text:style-name="Preformatted_20_Text"><text:s/>rsvpd <text:s text:c="11"/>qos <text:s text:c="21"/>inopérant</text:p>
            <text:p text:style-name="Preformatted_20_Text"><text:s/>policyd <text:s text:c="9"/>qos <text:s text:c="21"/>inopérant</text:p>
            <text:p text:style-name="Preformatted_20_Text"><text:s/>pxed <text:s text:c="12"/>tcpip <text:s text:c="19"/>inopérant</text:p>
            <text:p text:style-name="Preformatted_20_Text"><text:s/>binld <text:s text:c="11"/>tcpip <text:s text:c="19"/>inopérant</text:p>
            <text:p text:style-name="Preformatted_20_Text"><text:s/>dfpd <text:s text:c="12"/>tcpip <text:s text:c="19"/>inopérant</text:p>
            <text:p text:style-name="Preformatted_20_Text"><text:s/>nfsd <text:s text:c="12"/>nfs <text:s text:c="21"/>inopérant</text:p>
            <text:p text:style-name="Preformatted_20_Text"><text:s/>rpc.mountd <text:s text:c="6"/>nfs <text:s text:c="21"/>inopérant</text:p>
            <text:p text:style-name="Preformatted_20_Text"><text:s/>automountd <text:s text:c="6"/>autofs <text:s text:c="18"/>inopérant</text:p>
            <text:p text:style-name="Preformatted_20_Text"><text:s/>keyserv <text:s text:c="9"/>keyserv <text:s text:c="17"/>inopérant</text:p>
            <text:p text:style-name="Preformatted_20_Text"><text:s/>ypbind <text:s text:c="10"/>yp <text:s text:c="22"/>inopérant</text:p>
            <text:p text:style-name="Preformatted_20_Text"><text:s/>llbd <text:s text:c="12"/>iforncs <text:s text:c="17"/>inopérant</text:p>
            <text:p text:style-name="Preformatted_20_Text"><text:s/>glbd <text:s text:c="12"/>iforncs <text:s text:c="17"/>inopérant</text:p>
            <text:p text:style-name="Preformatted_20_Text"><text:s/>cpsd <text:s text:c="12"/>ike <text:s text:c="21"/>inopérant</text:p>
            <text:p text:style-name="Preformatted_20_Text"><text:s/>tmd <text:s text:c="13"/>ike <text:s text:c="21"/>inopérant</text:p>
            <text:p text:style-name="Preformatted_20_Text"><text:s/>isakmpd <text:s text:c="9"/>ike <text:s text:c="21"/>inopérant</text:p>
            <text:p text:style-name="Preformatted_20_Text"><text:s/>i4lmd <text:s text:c="11"/>iforls <text:s text:c="18"/>inopérant</text:p>
            <text:p text:style-name="Preformatted_20_Text"><text:s/>i4glbcd <text:s text:c="9"/>iforncs <text:s text:c="17"/>inopérant</text:p>
            <text:p text:style-name="Preformatted_20_Text"><text:s/>i4gdb <text:s text:c="11"/>iforls <text:s text:c="18"/>inopérant</text:p>
            <text:p text:style-name="Preformatted_20_Text"><text:s/>i4llmd <text:s text:c="10"/>iforls <text:s text:c="18"/>inopérant</text:p>
            <text:p text:style-name="Preformatted_20_Text"><text:s/>dtsrc <text:s text:c="36"/>inopérant</text:p>
            <text:p text:style-name="Preformatted_20_Text"><text:s/>ypserv <text:s text:c="10"/>yp <text:s text:c="22"/>inopérant</text:p>
            <text:p text:style-name="Preformatted_20_Text"><text:s/>ypupdated <text:s text:c="7"/>yp <text:s text:c="22"/>inopérant</text:p>
            <text:p text:style-name="Preformatted_20_Text"><text:s/>yppasswdd <text:s text:c="7"/>yp <text:s text:c="22"/>inopérant</text:p>
            <text:p text:style-name="P53">#</text:p>
          </table:table-cell>
        </table:table-row>
      </table:table>
      <text:p text:style-name="Text_20_body">Affichage de tous les sous-systèmes du groupe spooler : </text:p>
      <table:table table:name="Tableau4" table:style-name="Tableau4">
        <table:table-column table:style-name="Tableau4.A"/>
        <table:table-row>
          <table:table-cell table:style-name="Tableau4.A1" office:value-type="string">
            <text:p text:style-name="Preformatted_20_Text"># lssrc -g spooler</text:p>
            <text:p text:style-name="Preformatted_20_Text">Sous-système <text:s text:c="5"/>Groupe <text:s text:c="10"/>PID <text:s text:c="4"/>Etat</text:p>
            <text:p text:style-name="Preformatted_20_Text"><text:s/>qdaemon <text:s text:c="9"/>spooler <text:s text:c="17"/>inopérant</text:p>
            <text:p text:style-name="Preformatted_20_Text"><text:s/>writesrv <text:s text:c="8"/>spooler <text:s text:c="17"/>inopérant</text:p>
            <text:p text:style-name="Preformatted_20_Text"><text:s/>lpd <text:s text:c="13"/>spooler <text:s text:c="17"/>inopérant</text:p>
            <text:p text:style-name="P53">#</text:p>
          </table:table-cell>
        </table:table-row>
      </table:table>
      <text:p text:style-name="Text_20_body">Démarrage du sous-système lpd : </text:p>
      <table:table table:name="Tableau5" table:style-name="Tableau5">
        <table:table-column table:style-name="Tableau5.A"/>
        <table:table-row>
          <table:table-cell table:style-name="Tableau5.A1" office:value-type="string">
            <text:p text:style-name="Preformatted_20_Text"># startsrc -s lpd</text:p>
            <text:p text:style-name="Preformatted_20_Text">0513-059 Le sous-système lpd a été lancé. PID du sous-système : 614622.</text:p>
            <text:p text:style-name="P53">#</text:p>
          </table:table-cell>
        </table:table-row>
      </table:table>
      <text:p text:style-name="Text_20_body">Rafraîchissement du sous-système lpd : </text:p>
      <table:table table:name="Tableau6" table:style-name="Tableau6">
        <table:table-column table:style-name="Tableau6.A"/>
        <table:table-row>
          <table:table-cell table:style-name="Tableau6.A1" office:value-type="string">
            <text:p text:style-name="Preformatted_20_Text"># refresh -s lpd</text:p>
            <text:p text:style-name="Preformatted_20_Text">0513-095 La demande de régénération du sous-système a abouti.</text:p>
            <text:p text:style-name="P53">#</text:p>
          </table:table-cell>
        </table:table-row>
      </table:table>
      <text:p text:style-name="Text_20_body">Arrêt du sous-système lpd : </text:p>
      <table:table table:name="Tableau7" table:style-name="Tableau7">
        <table:table-column table:style-name="Tableau7.A"/>
        <table:table-row>
          <table:table-cell table:style-name="Tableau7.A1" office:value-type="string">
            <text:p text:style-name="Preformatted_20_Text"># stopsrc -s lpd</text:p>
            <text:p text:style-name="Preformatted_20_Text">0513-044 L'arrêt du sous-système lpd a été demandé.</text:p>
            <text:p text:style-name="P53">#</text:p>
          </table:table-cell>
        </table:table-row>
      </table:table>
      <text:p text:style-name="Text_20_body">L'exécutable permettant de gérer le SRC est /usr/sbin/srcmstr. Il est lancé au démarrage. </text:p>
      <text:p text:style-name="Text_20_body"><text:a xlink:type="simple" xlink:href="http://www.linux-france.org/%7Emdecore/aix/memo-aix/memo-aix.html#top">Top</text:a><text:bookmark text:name="sec3"/></text:p>
      <text:h text:style-name="Heading_20_2" text:outline-level="2">3. Arrêt du système</text:h>
      <text:p text:style-name="Text_20_body">Arrêt dans 2 minutes (+2) en affichant un message : </text:p>
      <table:table table:name="Tableau8" table:style-name="Tableau8">
        <table:table-column table:style-name="Tableau8.A"/>
        <table:table-row>
          <table:table-cell table:style-name="Tableau8.A1" office:value-type="string">
            <text:p text:style-name="Preformatted_20_Text"># shutdown +2 Le système sera inaccessible de 01:30 à 03:00</text:p>
            <text:p text:style-name="Preformatted_20_Text">[...]</text:p>
            <text:p text:style-name="P53">#</text:p>
          </table:table-cell>
        </table:table-row>
      </table:table>
      <text:p text:style-name="Text_20_body">Arrêt rapide et immédiat : </text:p>
      <table:table table:name="Tableau9" table:style-name="Tableau9">
        <table:table-column table:style-name="Tableau9.A"/>
        <table:table-row>
          <table:table-cell table:style-name="Tableau9.A1" office:value-type="string">
            <text:p text:style-name="Preformatted_20_Text"># shutdown -F</text:p>
            <text:p text:style-name="Preformatted_20_Text">[...]</text:p>
            <text:p text:style-name="P53">#</text:p>
          </table:table-cell>
        </table:table-row>
      </table:table>
      <text:p text:style-name="Text_20_body">Redémarrage : </text:p>
      <table:table table:name="Tableau10" table:style-name="Tableau10">
        <table:table-column table:style-name="Tableau10.A"/>
        <table:table-row>
          <table:table-cell table:style-name="Tableau10.A1" office:value-type="string">
            <text:p text:style-name="Preformatted_20_Text"># shutdown -r</text:p>
            <text:p text:style-name="Preformatted_20_Text">[...]</text:p>
            <text:p text:style-name="P53">#</text:p>
          </table:table-cell>
        </table:table-row>
      </table:table>
      <text:p text:style-name="Text_20_body">Passage en mode mono utilisateurs, pareil que init S : </text:p>
      <table:table table:name="Tableau11" table:style-name="Tableau11">
        <table:table-column table:style-name="Tableau11.A"/>
        <table:table-row>
          <table:table-cell table:style-name="Tableau11.A1" office:value-type="string">
            <text:p text:style-name="Preformatted_20_Text"># shutdown -m</text:p>
            <text:p text:style-name="Preformatted_20_Text">[...]</text:p>
            <text:p text:style-name="P53">#</text:p>
          </table:table-cell>
        </table:table-row>
      </table:table>
      <text:p text:style-name="Text_20_body">[AIX 5.1] Crée un fichier de logs /etc/shutdown.log : </text:p>
      <table:table table:name="Tableau12" table:style-name="Tableau12">
        <table:table-column table:style-name="Tableau12.A"/>
        <table:table-row>
          <table:table-cell table:style-name="Tableau12.A1" office:value-type="string">
            <text:p text:style-name="Preformatted_20_Text"># shutdown -l</text:p>
            <text:p text:style-name="Preformatted_20_Text">[...]</text:p>
            <text:p text:style-name="P53">#</text:p>
          </table:table-cell>
        </table:table-row>
      </table:table>
      <text:p text:style-name="Text_20_body">Arrêt factice (affiche les messages mais n'arrête pas le système) : </text:p>
      <table:table table:name="Tableau13" table:style-name="Tableau13">
        <table:table-column table:style-name="Tableau13.A"/>
        <table:table-row>
          <table:table-cell table:style-name="Tableau13.A1" office:value-type="string">
            <text:p text:style-name="Preformatted_20_Text"># shutdown -k</text:p>
            <text:p text:style-name="Preformatted_20_Text">[...]</text:p>
            <text:p text:style-name="P53">#</text:p>
          </table:table-cell>
        </table:table-row>
      </table:table>
      <text:p text:style-name="Text_20_body">Le plus souvent pour rebooter il faut taper : </text:p>
      <table:table table:name="Tableau14" table:style-name="Tableau14">
        <table:table-column table:style-name="Tableau14.A"/>
        <table:table-row>
          <table:table-cell table:style-name="Tableau14.A1" office:value-type="string">
            <text:p text:style-name="Preformatted_20_Text"># shutdown -Fr</text:p>
            <text:p text:style-name="Preformatted_20_Text">[...]</text:p>
            <text:p text:style-name="P53">#</text:p>
          </table:table-cell>
        </table:table-row>
      </table:table>
      <text:p text:style-name="Text_20_body">Le fichier /etc/rc.shutdown est appelé en premier par shutdown (utile pour fermer une base de données, par exemple). Si il retourne un code non nul, le système ne sera pas arrêté. </text:p>
      <text:p text:style-name="Text_20_body"><text:a xlink:type="simple" xlink:href="http://www.linux-france.org/%7Emdecore/aix/memo-aix/memo-aix.html#top">Top</text:a><text:bookmark text:name="sec4"/></text:p>
      <text:h text:style-name="Heading_20_2" text:outline-level="2">4. Partitions, disques, groupes de volumes</text:h>
      <text:p text:style-name="Text_20_body">Avant dans UNIX : un système de fichier = une partition d'un disque dur. Inconvénient : extension de la taille de la partition difficile (espace contiguë sur le disque), limitation de la taille d'un fichier et d'un système de fichier (sur une seule unité physique). Avec LVM : espaces non contigus, sur plusieurs disques, augmentation de la taille aisée, possibilités de mettre en miroir, le tout dynamiquement. </text:p>
      <text:p text:style-name="Text_20_body">Les 5 concepts principaux sont : </text:p>
      <text:list xml:id="list37333583" text:style-name="L6">
        <text:list-item>
          <text:p text:style-name="P36">le volume physique (Physical Volume ou PV) qui désigne un disque physique. Chaque disque a un nom, par exemple hdisk0, hdisk1, ... </text:p>
        </text:list-item>
        <text:list-item>
          <text:p text:style-name="P36">le groupe de volumes (Volume Group ou VG) qui désigne un ensemble de volumes physiques. C'est la plus grande quantité de mémoire pouvant être affectée. </text:p>
        </text:list-item>
        <text:list-item>
          <text:p text:style-name="P36">les partitions physiques (Physical Partitions ou PPs). Tous les volumes physiques sont divisés en partitions physiques, et la taille d'une partition physique est la même pour tous les volumes physiques appartenant au même groupe de volumes </text:p>
        </text:list-item>
        <text:list-item>
          <text:p text:style-name="P36">les partitions logiques (Logical Partitions ou LPs) correspondent aux partitions physiques. A une partition logique correspond au moins une partition physique (ou plus en cas de mirroring) sur laquelle les données sont stockées. C'est la plus petite quantité de mémoire pouvant être affectée. </text:p>
        </text:list-item>
        <text:list-item>
          <text:p text:style-name="P6">les volumes logiques (Logical Volumes ou LVs) sont des groupes de partitions logiques. Ils semblent contigues pour l'utilisateur alors qu'elles peuvent être réparties sur plusieurs volumes physiques d'un même groupe de volumes. Chaque groupe de volume a au moins un volume logique. </text:p>
        </text:list-item>
      </text:list>
      <text:p text:style-name="Text_20_body">Exemple : </text:p>
      <table:table table:name="Tableau15" table:style-name="Tableau15">
        <table:table-column table:style-name="Tableau15.A"/>
        <table:table-row>
          <table:table-cell table:style-name="Tableau15.A1" office:value-type="string">
            <text:p text:style-name="Preformatted_20_Text">------------------------+</text:p>
            <text:p text:style-name="Preformatted_20_Text"><text:s text:c="24"/>|</text:p>
            <text:p text:style-name="Preformatted_20_Text"><text:s text:c="4"/>VG ROOTVG <text:s text:c="10"/>|</text:p>
            <text:p text:style-name="Preformatted_20_Text"><text:s text:c="24"/>|</text:p>
            <text:p text:style-name="Preformatted_20_Text"><text:s text:c="24"/>|</text:p>
            <text:p text:style-name="Preformatted_20_Text"><text:s text:c="10"/>hdisk0 <text:s text:c="7"/>|</text:p>
            <text:p text:style-name="Preformatted_20_Text"><text:s text:c="8"/>__________ <text:s text:c="5"/>|</text:p>
            <text:p text:style-name="Preformatted_20_Text">PPs -&gt; |__________| <text:s text:c="4"/>|</text:p>
            <text:p text:style-name="Preformatted_20_Text"><text:s text:c="7"/>|__________| &lt;--------+</text:p>
            <text:p text:style-name="Preformatted_20_Text"><text:s text:c="7"/>|__________| <text:s text:c="4"/>| <text:s text:c="3"/>|</text:p>
            <text:p text:style-name="Preformatted_20_Text"><text:s text:c="12"/>PV <text:s text:c="9"/>| <text:s text:c="3"/>|</text:p>
            <text:p text:style-name="Preformatted_20_Text"><text:s text:c="24"/>| <text:s text:c="3"/>|</text:p>
            <text:p text:style-name="Preformatted_20_Text"><text:s text:c="24"/>| <text:s text:c="3"/>|</text:p>
            <text:p text:style-name="Preformatted_20_Text"><text:s text:c="10"/>hdisk1 <text:s text:c="7"/>| <text:s text:c="3"/>|</text:p>
            <text:p text:style-name="Preformatted_20_Text"><text:s text:c="8"/>__________ <text:s text:c="5"/>| <text:s text:c="3"/>| <text:s text:c="7"/>__________</text:p>
            <text:p text:style-name="Preformatted_20_Text"><text:s text:c="7"/>|__________| <text:s text:c="4"/>| <text:s text:c="3"/>+------ |__________| &lt;- LPs</text:p>
            <text:p text:style-name="Preformatted_20_Text"><text:s text:c="7"/>|__________| &lt;--------------- |__________|</text:p>
            <text:p text:style-name="Preformatted_20_Text"><text:s text:c="7"/>|__________| <text:s text:c="4"/>| <text:s text:c="3"/>+------ |__________|</text:p>
            <text:p text:style-name="Preformatted_20_Text"><text:s text:c="7"/>|__________| <text:s text:c="4"/>| <text:s text:c="3"/>| <text:s text:c="11"/>LV</text:p>
            <text:p text:style-name="Preformatted_20_Text"><text:s text:c="7"/>|__________| <text:s text:c="4"/>| <text:s text:c="3"/>|</text:p>
            <text:p text:style-name="Preformatted_20_Text"><text:s text:c="12"/>PV <text:s text:c="9"/>| <text:s text:c="3"/>|</text:p>
            <text:p text:style-name="Preformatted_20_Text"><text:s text:c="24"/>| <text:s text:c="3"/>|</text:p>
            <text:p text:style-name="Preformatted_20_Text"><text:s text:c="24"/>| <text:s text:c="3"/>|</text:p>
            <text:p text:style-name="Preformatted_20_Text"><text:s text:c="10"/>hdisk2 <text:s text:c="7"/>| <text:s text:c="3"/>|</text:p>
            <text:p text:style-name="Preformatted_20_Text"><text:s text:c="8"/>__________ <text:s text:c="5"/>| <text:s text:c="3"/>|</text:p>
            <text:p text:style-name="Preformatted_20_Text"><text:s text:c="7"/>|__________| <text:s text:c="4"/>| <text:s text:c="3"/>|</text:p>
            <text:p text:style-name="Preformatted_20_Text"><text:s text:c="7"/>|__________| <text:s text:c="4"/>| <text:s text:c="3"/>|</text:p>
            <text:p text:style-name="Preformatted_20_Text"><text:s text:c="7"/>|__________| <text:s text:c="4"/>| <text:s text:c="3"/>|</text:p>
            <text:p text:style-name="Preformatted_20_Text"><text:s text:c="7"/>|__________| <text:s text:c="4"/>| <text:s text:c="3"/>|</text:p>
            <text:p text:style-name="Preformatted_20_Text"><text:s text:c="7"/>|__________| &lt;--------+</text:p>
            <text:p text:style-name="Preformatted_20_Text"><text:s text:c="7"/>|__________| <text:s text:c="4"/>|</text:p>
            <text:p text:style-name="Preformatted_20_Text"><text:s text:c="7"/>|__________| <text:s text:c="4"/>|</text:p>
            <text:p text:style-name="Preformatted_20_Text"><text:s text:c="7"/>|__________| <text:s text:c="4"/>|</text:p>
            <text:p text:style-name="Preformatted_20_Text"><text:s text:c="12"/>PV <text:s text:c="9"/>|</text:p>
            <text:p text:style-name="Preformatted_20_Text"><text:s text:c="24"/>|</text:p>
            <text:p text:style-name="Preformatted_20_Text"><text:s text:c="24"/>|</text:p>
            <text:p text:style-name="P53">------------------------+</text:p>
          </table:table-cell>
        </table:table-row>
      </table:table>
      <text:p text:style-name="Text_20_body">Les 3 disques physiques hdisk0, hdisk1 et hdisk2 appartiennent au même groupe de volume, rootvg (groupe de volume installé par défaut et contenant le système AIX). </text:p>
      <text:p text:style-name="Text_20_body">La taille d'une partition physique est une puissance de 2 et peut atteindre 1024 Mo (par défaut : 1016 partitions de 4 Mo chacune). La taille d'une partition physique ne peut être modifiée, mais leur nombre si, par multiples de 1016 jusqu'à 130 048). Il peut y avoir au maximum 255 groupes de volumes (512 pour les gros volumes). </text:p>
      <text:p text:style-name="Text_20_body">Lors de l'ajout d'un disque dur (ie. d'un PV), il faut soit créer un nouveau VG soit l'ajouter à un VG déjà existant. Créer plusieurs VG permet de bien séparer les données utilisateur / système, de restaurer les données suite à un désastre, d'assurer la portabilité, l'intégrité et la sécurité des données. </text:p>
      <text:p text:style-name="Text_20_body"><text:a xlink:type="simple" xlink:href="http://www.linux-france.org/%7Emdecore/aix/memo-aix/memo-aix.html#top">Top</text:a><text:bookmark text:name="sec5"/></text:p>
      <text:h text:style-name="Heading_20_2" text:outline-level="2">5. Physical Volume</text:h>
      <text:p text:style-name="Text_20_body"><text:a xlink:type="simple" xlink:href="http://www.linux-france.org/%7Emdecore/aix/memo-aix/memo-aix.html#top">Top</text:a><text:bookmark text:name="subsec5.1"/></text:p>
      <text:h text:style-name="Heading_20_3" text:outline-level="3">5.1. Affichage des PV</text:h>
      <text:p text:style-name="Text_20_body">Affichage de tous les PV du système : </text:p>
      <table:table table:name="Tableau16" table:style-name="Tableau16">
        <table:table-column table:style-name="Tableau16.A"/>
        <table:table-row>
          <table:table-cell table:style-name="Tableau16.A1" office:value-type="string">
            <text:p text:style-name="Preformatted_20_Text"># lspv</text:p>
            <text:p text:style-name="Preformatted_20_Text">hdisk0 <text:s text:c="9"/>0057498ad0b21879 <text:s text:c="19"/>rootvg <text:s text:c="8"/></text:p>
            <text:p text:style-name="Preformatted_20_Text">hdisk1 <text:s text:c="9"/>0057498adffb3d3c <text:s text:c="19"/>rootvg <text:s text:c="8"/></text:p>
            <text:p text:style-name="Preformatted_20_Text">hdisk2 <text:s text:c="9"/>0057498a94d44bc9 <text:s text:c="19"/>vgprod <text:s text:c="8"/></text:p>
            <text:p text:style-name="Preformatted_20_Text">hdisk3 <text:s text:c="9"/>0057498aca4aaabd <text:s text:c="19"/>vgprod <text:s text:c="8"/></text:p>
            <text:p text:style-name="Preformatted_20_Text">hdisk4 <text:s text:c="9"/>0057498aca4aaba7 <text:s text:c="19"/>vgprod <text:s text:c="8"/></text:p>
            <text:p text:style-name="Preformatted_20_Text">hdisk5 <text:s text:c="9"/>0057498af9e9ba69 <text:s text:c="19"/>vgprod <text:s text:c="8"/></text:p>
            <text:p text:style-name="Preformatted_20_Text">hdisk6 <text:s text:c="9"/>0057498af9eadade <text:s text:c="19"/>vgdump <text:s text:c="8"/></text:p>
            <text:p text:style-name="Preformatted_20_Text">hdisk7 <text:s text:c="9"/>0057498a91a04bc8 <text:s text:c="19"/>vgdump <text:s text:c="8"/></text:p>
            <text:p text:style-name="Preformatted_20_Text">hdisk8 <text:s text:c="9"/>none <text:s text:c="31"/>None <text:s text:c="10"/></text:p>
            <text:p text:style-name="Preformatted_20_Text">hdisk9 <text:s text:c="9"/>0057498aca4aac86 <text:s text:c="19"/>None <text:s text:c="10"/></text:p>
            <text:p text:style-name="Preformatted_20_Text">hdisk10 <text:s text:c="8"/>0057498aca4aad60 <text:s text:c="19"/>None <text:s text:c="10"/></text:p>
            <text:p text:style-name="Preformatted_20_Text">hdisk11 <text:s text:c="8"/>0057498aca4aae40 <text:s text:c="19"/>None <text:s text:c="10"/></text:p>
            <text:p text:style-name="Preformatted_20_Text">hdisk12 <text:s text:c="8"/>none <text:s text:c="31"/>None <text:s text:c="10"/></text:p>
            <text:p text:style-name="Preformatted_20_Text">hdisk13 <text:s text:c="8"/>none <text:s text:c="31"/>None <text:s text:c="10"/></text:p>
            <text:p text:style-name="Preformatted_20_Text">hdisk14 <text:s text:c="8"/>none <text:s text:c="31"/>None <text:s text:c="10"/></text:p>
            <text:p text:style-name="Preformatted_20_Text">hdisk15 <text:s text:c="8"/>none <text:s text:c="31"/>None <text:s text:c="10"/></text:p>
            <text:p text:style-name="P53">#</text:p>
          </table:table-cell>
        </table:table-row>
      </table:table>
      <text:p text:style-name="Text_20_body">Affiche de l'état de hdisk0 : </text:p>
      <table:table table:name="Tableau17" table:style-name="Tableau17">
        <table:table-column table:style-name="Tableau17.A"/>
        <table:table-row>
          <table:table-cell table:style-name="Tableau17.A1" office:value-type="string">
            <text:p text:style-name="Preformatted_20_Text"># lspv hdisk0</text:p>
            <text:p text:style-name="Preformatted_20_Text">PHYSICAL VOLUME: <text:s text:c="3"/>hdisk0 <text:s text:c="18"/>VOLUME GROUP: <text:s text:c="4"/>rootvg</text:p>
            <text:p text:style-name="Preformatted_20_Text">PV IDENTIFIER: <text:s text:c="5"/>0057498ad0b21879 VG IDENTIFIER <text:s text:c="4"/>0057498a00004c00000000fb8bb01139</text:p>
            <text:p text:style-name="Preformatted_20_Text">PV STATE: <text:s text:c="10"/>active <text:s text:c="36"/></text:p>
            <text:p text:style-name="Preformatted_20_Text">STALE PARTITIONS: <text:s text:c="2"/>0 <text:s text:c="23"/>ALLOCATABLE: <text:s text:c="5"/>yes</text:p>
            <text:p text:style-name="Preformatted_20_Text">PP SIZE: <text:s text:c="11"/>32 megabyte(s) <text:s text:c="10"/>LOGICAL VOLUMES: <text:s/>11</text:p>
            <text:p text:style-name="Preformatted_20_Text">TOTAL PPs: <text:s text:c="9"/>542 (17344 megabytes) <text:s text:c="3"/>VG DESCRIPTORS: <text:s text:c="2"/>2</text:p>
            <text:p text:style-name="Preformatted_20_Text">FREE PPs: <text:s text:c="10"/>58 (1856 megabytes) <text:s text:c="5"/>HOT SPARE: <text:s text:c="7"/>no</text:p>
            <text:p text:style-name="Preformatted_20_Text">USED PPs: <text:s text:c="10"/>484 (15488 megabytes) <text:s text:c="21"/></text:p>
            <text:p text:style-name="Preformatted_20_Text">FREE DISTRIBUTION: <text:s/>29..00..00..00..29 <text:s text:c="24"/></text:p>
            <text:p text:style-name="Preformatted_20_Text">USED DISTRIBUTION: <text:s/>80..108..108..108..80 <text:s text:c="21"/></text:p>
            <text:p text:style-name="P53">#</text:p>
          </table:table-cell>
        </table:table-row>
      </table:table>
      <text:p text:style-name="Text_20_body">Affichage de tous les LV d'un PV : </text:p>
      <table:table table:name="Tableau18" table:style-name="Tableau18">
        <table:table-column table:style-name="Tableau18.A"/>
        <table:table-row>
          <table:table-cell table:style-name="Tableau18.A1" office:value-type="string">
            <text:p text:style-name="Preformatted_20_Text"># lspv -l hdisk0</text:p>
            <text:p text:style-name="Preformatted_20_Text">hdisk0:</text:p>
            <text:p text:style-name="Preformatted_20_Text">LV NAME <text:s text:c="14"/>LPs <text:s text:c="2"/>PPs <text:s text:c="2"/>DISTRIBUTION <text:s text:c="9"/>MOUNT POINT</text:p>
            <text:p text:style-name="Preformatted_20_Text">hd5 <text:s text:c="18"/>1 <text:s text:c="4"/>1 <text:s text:c="4"/>01..00..00..00..00 <text:s text:c="3"/>N/A</text:p>
            <text:p text:style-name="Preformatted_20_Text">hd2 <text:s text:c="18"/>32 <text:s text:c="3"/>32 <text:s text:c="3"/>07..10..15..00..00 <text:s text:c="3"/>/usr</text:p>
            <text:p text:style-name="Preformatted_20_Text">hd10opt <text:s text:c="14"/>7 <text:s text:c="4"/>7 <text:s text:c="4"/>04..02..01..00..00 <text:s text:c="3"/>/opt</text:p>
            <text:p text:style-name="Preformatted_20_Text">lv00 <text:s text:c="17"/>398 <text:s text:c="2"/>398 <text:s text:c="2"/>68..55..87..108..80 <text:s text:c="2"/>/mnt1</text:p>
            <text:p text:style-name="Preformatted_20_Text">lg_dumplv <text:s text:c="12"/>32 <text:s text:c="3"/>32 <text:s text:c="3"/>00..32..00..00..00 <text:s text:c="3"/>N/A</text:p>
            <text:p text:style-name="Preformatted_20_Text">hd6 <text:s text:c="18"/>9 <text:s text:c="4"/>9 <text:s text:c="4"/>00..09..00..00..00 <text:s text:c="3"/>N/A</text:p>
            <text:p text:style-name="Preformatted_20_Text">hd8 <text:s text:c="18"/>1 <text:s text:c="4"/>1 <text:s text:c="4"/>00..00..01..00..00 <text:s text:c="3"/>N/A</text:p>
            <text:p text:style-name="Preformatted_20_Text">hd4 <text:s text:c="18"/>1 <text:s text:c="4"/>1 <text:s text:c="4"/>00..00..01..00..00 <text:s text:c="3"/>/</text:p>
            <text:p text:style-name="Preformatted_20_Text">hd9var <text:s text:c="15"/>1 <text:s text:c="4"/>1 <text:s text:c="4"/>00..00..01..00..00 <text:s text:c="3"/>/var</text:p>
            <text:p text:style-name="Preformatted_20_Text">hd3 <text:s text:c="18"/>1 <text:s text:c="4"/>1 <text:s text:c="4"/>00..00..01..00..00 <text:s text:c="3"/>/tmp</text:p>
            <text:p text:style-name="Preformatted_20_Text">hd1 <text:s text:c="18"/>1 <text:s text:c="4"/>1 <text:s text:c="4"/>00..00..01..00..00 <text:s text:c="3"/>/home</text:p>
            <text:p text:style-name="P53">#</text:p>
          </table:table-cell>
        </table:table-row>
      </table:table>
      <text:p text:style-name="Text_20_body">Affichage de tous les LV d'un PV avec les PP associées aux LP : </text:p>
      <table:table table:name="Tableau19" table:style-name="Tableau19">
        <table:table-column table:style-name="Tableau19.A"/>
        <table:table-row>
          <table:table-cell table:style-name="Tableau19.A1" office:value-type="string">
            <text:p text:style-name="Preformatted_20_Text"># lspv -p hdisk0</text:p>
            <text:p text:style-name="Preformatted_20_Text">hdisk0:</text:p>
            <text:p text:style-name="Preformatted_20_Text">PP RANGE <text:s/>STATE <text:s text:c="2"/>REGION <text:s text:c="7"/>LV NAME <text:s text:c="12"/>TYPE <text:s text:c="6"/>MOUNT POINT</text:p>
            <text:p text:style-name="Preformatted_20_Text"><text:s text:c="2"/>1-1 <text:s text:c="4"/>used <text:s text:c="3"/>outer edge <text:s text:c="3"/>hd5 <text:s text:c="16"/>boot <text:s text:c="6"/>N/A</text:p>
            <text:p text:style-name="Preformatted_20_Text"><text:s text:c="2"/>2-30 <text:s text:c="3"/>free <text:s text:c="3"/>outer edge <text:s text:c="34"/></text:p>
            <text:p text:style-name="Preformatted_20_Text"><text:s/>31-37 <text:s text:c="3"/>used <text:s text:c="3"/>outer edge <text:s text:c="3"/>hd2 <text:s text:c="16"/>jfs <text:s text:c="7"/>/usr</text:p>
            <text:p text:style-name="Preformatted_20_Text"><text:s/>38-41 <text:s text:c="3"/>used <text:s text:c="3"/>outer edge <text:s text:c="3"/>hd10opt <text:s text:c="12"/>jfs <text:s text:c="7"/>/opt</text:p>
            <text:p text:style-name="Preformatted_20_Text"><text:s/>42-109 <text:s text:c="2"/>used <text:s text:c="3"/>outer edge <text:s text:c="3"/>lv00 <text:s text:c="15"/>jfs <text:s text:c="7"/>/mnt1</text:p>
            <text:p text:style-name="Preformatted_20_Text">110-141 <text:s text:c="2"/>used <text:s text:c="3"/>outer middle <text:s/>lg_dumplv <text:s text:c="10"/>sysdump <text:s text:c="3"/>N/A</text:p>
            <text:p text:style-name="Preformatted_20_Text">142-150 <text:s text:c="2"/>used <text:s text:c="3"/>outer middle <text:s/>hd6 <text:s text:c="16"/>paging <text:s text:c="4"/>N/A</text:p>
            <text:p text:style-name="Preformatted_20_Text">151-205 <text:s text:c="2"/>used <text:s text:c="3"/>outer middle <text:s/>lv00 <text:s text:c="15"/>jfs <text:s text:c="7"/>/mnt1</text:p>
            <text:p text:style-name="Preformatted_20_Text">206-207 <text:s text:c="2"/>used <text:s text:c="3"/>outer middle <text:s/>hd10opt <text:s text:c="12"/>jfs <text:s text:c="7"/>/opt</text:p>
            <text:p text:style-name="Preformatted_20_Text">208-217 <text:s text:c="2"/>used <text:s text:c="3"/>outer middle <text:s/>hd2 <text:s text:c="16"/>jfs <text:s text:c="7"/>/usr</text:p>
            <text:p text:style-name="Preformatted_20_Text">218-218 <text:s text:c="2"/>used <text:s text:c="3"/>center <text:s text:c="7"/>hd8 <text:s text:c="16"/>jfslog <text:s text:c="4"/>N/A</text:p>
            <text:p text:style-name="Preformatted_20_Text">219-219 <text:s text:c="2"/>used <text:s text:c="3"/>center <text:s text:c="7"/>hd4 <text:s text:c="16"/>jfs <text:s text:c="7"/>/</text:p>
            <text:p text:style-name="Preformatted_20_Text">220-220 <text:s text:c="2"/>used <text:s text:c="3"/>center <text:s text:c="7"/>hd9var <text:s text:c="13"/>jfs <text:s text:c="7"/>/var</text:p>
            <text:p text:style-name="Preformatted_20_Text">221-221 <text:s text:c="2"/>used <text:s text:c="3"/>center <text:s text:c="7"/>hd3 <text:s text:c="16"/>jfs <text:s text:c="7"/>/tmp</text:p>
            <text:p text:style-name="Preformatted_20_Text">222-222 <text:s text:c="2"/>used <text:s text:c="3"/>center <text:s text:c="7"/>hd10opt <text:s text:c="12"/>jfs <text:s text:c="7"/>/opt</text:p>
            <text:p text:style-name="Preformatted_20_Text">223-237 <text:s text:c="2"/>used <text:s text:c="3"/>center <text:s text:c="7"/>hd2 <text:s text:c="16"/>jfs <text:s text:c="7"/>/usr</text:p>
            <text:p text:style-name="Preformatted_20_Text">238-238 <text:s text:c="2"/>used <text:s text:c="3"/>center <text:s text:c="7"/>hd1 <text:s text:c="16"/>jfs <text:s text:c="7"/>/home</text:p>
            <text:p text:style-name="Preformatted_20_Text">239-325 <text:s text:c="2"/>used <text:s text:c="3"/>center <text:s text:c="7"/>lv00 <text:s text:c="15"/>jfs <text:s text:c="7"/>/mnt1</text:p>
            <text:p text:style-name="Preformatted_20_Text">326-433 <text:s text:c="2"/>used <text:s text:c="3"/>inner middle <text:s/>lv00 <text:s text:c="15"/>jfs <text:s text:c="7"/>/mnt1</text:p>
            <text:p text:style-name="Preformatted_20_Text">434-513 <text:s text:c="2"/>used <text:s text:c="3"/>inner edge <text:s text:c="3"/>lv00 <text:s text:c="15"/>jfs <text:s text:c="7"/>/mnt1</text:p>
            <text:p text:style-name="Preformatted_20_Text">514-542 <text:s text:c="2"/>free <text:s text:c="3"/>inner edge <text:s text:c="34"/></text:p>
            <text:p text:style-name="P53">#</text:p>
          </table:table-cell>
        </table:table-row>
      </table:table>
      <text:p text:style-name="Text_20_body"><text:a xlink:type="simple" xlink:href="http://www.linux-france.org/%7Emdecore/aix/memo-aix/memo-aix.html#top">Top</text:a><text:bookmark text:name="subsec5.2"/></text:p>
      <text:h text:style-name="Heading_20_3" text:outline-level="3">5.2. Ajout d'un PV</text:h>
      <text:list xml:id="list37330619" text:style-name="L7">
        <text:list-item>
          <text:p text:style-name="P37">cfgmgr (mise à jour de la base ODM pour tous les périphériques), </text:p>
        </text:list-item>
        <text:list-item>
          <text:p text:style-name="P37">éventuellement conversion en multiple de 1016 PP (chvg -t x, 1 &lt;= x &lt;= 16 pour faire x * 1016 PP), </text:p>
        </text:list-item>
        <text:list-item>
          <text:p text:style-name="P7">ajout du PV à un VG (extendvg -f &lt;VG&gt; &lt;PV&gt;). </text:p>
        </text:list-item>
      </text:list>
      <text:p text:style-name="Text_20_body"><text:a xlink:type="simple" xlink:href="http://www.linux-france.org/%7Emdecore/aix/memo-aix/memo-aix.html#top">Top</text:a><text:bookmark text:name="subsec5.3"/></text:p>
      <text:h text:style-name="Heading_20_3" text:outline-level="3">5.3. Déplacement du contenu du PV</text:h>
      <text:list xml:id="list37340660" text:style-name="L8">
        <text:list-item>
          <text:p text:style-name="P38">ajout du disque de destination dans le même VG que le disque source (extendvg), </text:p>
        </text:list-item>
        <text:list-item>
          <text:p text:style-name="P8">migration (migratepv). </text:p>
        </text:list-item>
      </text:list>
      <text:p text:style-name="Text_20_body">Exemple pour la migration de hdisk2 vers hdisk4 : </text:p>
      <text:p text:style-name="Text_20_body">Affichage de tous les PV : </text:p>
      <table:table table:name="Tableau20" table:style-name="Tableau20">
        <table:table-column table:style-name="Tableau20.A"/>
        <table:table-row>
          <table:table-cell table:style-name="Tableau20.A1" office:value-type="string">
            <text:p text:style-name="Preformatted_20_Text"># lspv</text:p>
            <text:p text:style-name="Preformatted_20_Text">hdisk0 <text:s text:c="9"/>005d8fbcb7929295 <text:s text:c="19"/>rootvg</text:p>
            <text:p text:style-name="Preformatted_20_Text">hdisk1 <text:s text:c="9"/>005d8fbcef005c33 <text:s text:c="19"/>rootvg</text:p>
            <text:p text:style-name="Preformatted_20_Text">hdisk2 <text:s text:c="9"/>005d8fbcefa42b32 <text:s text:c="19"/>datavg</text:p>
            <text:p text:style-name="Preformatted_20_Text">hdisk3 <text:s text:c="9"/>005d8fbc0dd877c2 <text:s text:c="19"/>datavg</text:p>
            <text:p text:style-name="Preformatted_20_Text">hdisk4 <text:s text:c="9"/>005d8fbc0dd922a0 <text:s text:c="19"/>None</text:p>
            <text:p text:style-name="Preformatted_20_Text">hdisk5 <text:s text:c="9"/>005d8fbc371c0aca <text:s text:c="19"/>None</text:p>
            <text:p text:style-name="P53">#</text:p>
          </table:table-cell>
        </table:table-row>
      </table:table>
      <text:p text:style-name="Text_20_body">Récupère le nom du VG auquel appartient hdisk2 : </text:p>
      <table:table table:name="Tableau21" table:style-name="Tableau21">
        <table:table-column table:style-name="Tableau21.A"/>
        <table:table-row>
          <table:table-cell table:style-name="Tableau21.A1" office:value-type="string">
            <text:p text:style-name="Preformatted_20_Text"># From=`lspv | grep hdisk2 | awk '{ print $3 }'` ; echo $From</text:p>
            <text:p text:style-name="Preformatted_20_Text">datavg</text:p>
            <text:p text:style-name="P53">#</text:p>
          </table:table-cell>
        </table:table-row>
      </table:table>
      <text:p text:style-name="Text_20_body">Ajout du disque hdisk4 au même VG que hdisk2 : </text:p>
      <table:table table:name="Tableau22" table:style-name="Tableau22">
        <table:table-column table:style-name="Tableau22.A"/>
        <table:table-row>
          <table:table-cell table:style-name="Tableau22.A1" office:value-type="string">
            <text:p text:style-name="Preformatted_20_Text"># extendvg -f $From hdisk4</text:p>
            <text:p text:style-name="P53">#</text:p>
          </table:table-cell>
        </table:table-row>
      </table:table>
      <text:p text:style-name="Text_20_body">Migration de hdisk2 vers hdisk4 (transfère tous les PPs) : </text:p>
      <table:table table:name="Tableau23" table:style-name="Tableau23">
        <table:table-column table:style-name="Tableau23.A"/>
        <table:table-row>
          <table:table-cell table:style-name="Tableau23.A1" office:value-type="string">
            <text:p text:style-name="Preformatted_20_Text"># migratepv hdisk2 hdisk4</text:p>
            <text:p text:style-name="P53">#</text:p>
          </table:table-cell>
        </table:table-row>
      </table:table>
      <text:p text:style-name="Text_20_body"><text:a xlink:type="simple" xlink:href="http://www.linux-france.org/%7Emdecore/aix/memo-aix/memo-aix.html#top">Top</text:a><text:bookmark text:name="subsec5.4"/></text:p>
      <text:h text:style-name="Heading_20_3" text:outline-level="3">5.4. Suppression d'un disque</text:h>
      <text:p text:style-name="Text_20_body">Dans l'exemple qui suit, on suppose que le PV hdisk3 est à retirer (erreurs lues via la commande "errpt -a"). </text:p>
      <text:list xml:id="list37353746" text:style-name="L9">
        <text:list-item>
          <text:p text:style-name="P9">La commande suivante indique que le VG utilisé par hdisk3 est gicrvg : </text:p>
        </text:list-item>
      </text:list>
      <text:p text:style-name="Text_20_body">gicrvg: PV_NAME PV STATE TOTAL PPs FREE PPs FREE DISTRIBUTION hdisk3 active 542 167 00..00..00..58..109 hdisk4 active 542 110 107..00..00..00..03 hdisk5 active 542 167 31..00..00..27..109 rootvg: PV_NAME PV STATE TOTAL PPs FREE PPs FREE DISTRIBUTION hdisk0 active 542 438 108..84..29..108..109 hdisk1 active 542 425 108..79..21..108..109 # </text:p>
      <text:list xml:id="list37356240" text:style-name="L10">
        <text:list-item>
          <text:p text:style-name="P10">Récupérer toute les informations du disque à communiquer au support IBM en vue d'un remplacement : </text:p>
        </text:list-item>
      </text:list>
      <text:p text:style-name="Text_20_body">UNITE EMPLACEMENT DESCRIPTION </text:p>
      <text:p text:style-name="Text_20_body">hdisk3 1n-08-00-4,0 Disque LVD SCSI 16 bits (36400 MB) </text:p>
      <text:p text:style-name="Text_20_body">Fabricant...................IBM Type et modèle machine......ST336607LC Numéro de FRU...............00P3068 Niveau et ID ROS............43353048 Numéro de série.............000A92AF Niveau de modification......H12094 Référence...................00P2676 Spécifique unité.(Z0).....000003129F00013E Spécifique unité.(Z1).....1217C511 Spécifique unité.(Z2).....0002 Spécifique unité.(Z3).....04133 Spécifique unité.(Z4).....0001 Spécifique unité.(Z5).....22 Spécifique unité.(Z6).....H12094 </text:p>
      <text:p text:style-name="Text_20_body"># </text:p>
      <text:list xml:id="list37348357" text:style-name="L11">
        <text:list-item>
          <text:p text:style-name="P11">Trouver tous les systèmes de fichiers montés sur hdisk3 : </text:p>
        </text:list-item>
      </text:list>
      <text:p text:style-name="Text_20_body">hdisk3: LV NAME LPs PPs DISTRIBUTION MOUNT POINT fslv06 324 324 109..66..108..41..00 /data_simul loglv01 1 1 00..01..00..00..00 N/A fslv07 41 41 00..41..00..00..00 /data_prod fslv19 5 5 00..00..00..05..00 /dembatch fslv20 4 4 00..00..00..04..00 /flt_edit_demo # </text:p>
      <text:list xml:id="list37342733" text:style-name="L12">
        <text:list-item>
          <text:p text:style-name="P12">Pour chaque FS, le démonter : </text:p>
        </text:list-item>
      </text:list>
      <text:p text:style-name="Text_20_body">démontage imposé de /data_simul # </text:p>
      <text:list xml:id="list37358639" text:style-name="L13">
        <text:list-item>
          <text:p text:style-name="P13">Retirer hdisk3 de son VG : </text:p>
        </text:list-item>
      </text:list>
      <text:p text:style-name="Text_20_body"># </text:p>
      <text:list xml:id="list37334412" text:style-name="L14">
        <text:list-item>
          <text:p text:style-name="P14">Désactiver le VG (sinon risque de pertes de données) : </text:p>
        </text:list-item>
      </text:list>
      <text:p text:style-name="Text_20_body"># </text:p>
      <text:p text:style-name="Text_20_body">* Retirer le device du PV de la base ODM : </text:p>
      <table:table table:name="Tableau24" table:style-name="Tableau24">
        <table:table-column table:style-name="Tableau24.A"/>
        <table:table-row>
          <table:table-cell table:style-name="Tableau24.A1" office:value-type="string">
            <text:p text:style-name="Preformatted_20_Text"># rmdev -dl hdisk3</text:p>
            <text:p text:style-name="Preformatted_20_Text">hdisk3 supprimé</text:p>
            <text:p text:style-name="P53">#</text:p>
          </table:table-cell>
        </table:table-row>
      </table:table>
      <text:list xml:id="list37356762" text:style-name="L15">
        <text:list-item>
          <text:p text:style-name="P15">Vérifier alors qu'il n'appaît plus dans l'ODM : </text:p>
        </text:list-item>
      </text:list>
      <text:p text:style-name="Text_20_body">rmt0 Disponible 1S-08-00-0,0 Unité de bande 4 mm SCSI différentielle hdisk0 Disponible 1S-08-00-4,0 Disque LVD SCSI 16 bits hdisk1 Disponible 1S-08-00-5,0 Disque LVD SCSI 16 bits hdisk2 Disponible 1S-08-00-8,0 Disque LVD SCSI 16 bits hdisk4 Disponible 1n-08-00-5,0 Disque LVD SCSI 16 bits hdisk5 Disponible 1n-08-00-8,0 Disque LVD SCSI 16 bits ses0 Disponible 1S-08-00-15,0 Unité SES (SCSI Enclosure Services) ses1 Disponible 1n-08-00-15,0 Unité SES (SCSI Enclosure Services) # </text:p>
      <text:list xml:id="list37331123" text:style-name="L16">
        <text:list-item>
          <text:p text:style-name="P16">Retirer le quatrième disque en partant du haut, sans redémarrer le système. </text:p>
        </text:list-item>
      </text:list>
      <text:p text:style-name="Text_20_body"><text:a xlink:type="simple" xlink:href="http://www.linux-france.org/%7Emdecore/aix/memo-aix/memo-aix.html#top">Top</text:a><text:bookmark text:name="sec6"/></text:p>
      <text:h text:style-name="Heading_20_2" text:outline-level="2">6. Volume Group</text:h>
      <text:p text:style-name="Text_20_body"><text:a xlink:type="simple" xlink:href="http://www.linux-france.org/%7Emdecore/aix/memo-aix/memo-aix.html#top">Top</text:a><text:bookmark text:name="subsec6.1"/></text:p>
      <text:h text:style-name="Heading_20_3" text:outline-level="3">6.1. Affichage des VG</text:h>
      <text:p text:style-name="Text_20_body">Affiche tous les groupes de volumes du système : </text:p>
      <table:table table:name="Tableau25" table:style-name="Tableau25">
        <table:table-column table:style-name="Tableau25.A"/>
        <table:table-row>
          <table:table-cell table:style-name="Tableau25.A1" office:value-type="string">
            <text:p text:style-name="Preformatted_20_Text"># lsvg</text:p>
            <text:p text:style-name="Preformatted_20_Text">rootvg</text:p>
            <text:p text:style-name="Preformatted_20_Text">vgprod</text:p>
            <text:p text:style-name="Preformatted_20_Text">vgdump</text:p>
            <text:p text:style-name="Preformatted_20_Text">vgtest</text:p>
            <text:p text:style-name="P53">#</text:p>
          </table:table-cell>
        </table:table-row>
      </table:table>
      <text:p text:style-name="Text_20_body">Affiche tous les groupes de volumes actifs : </text:p>
      <table:table table:name="Tableau26" table:style-name="Tableau26">
        <table:table-column table:style-name="Tableau26.A"/>
        <table:table-row>
          <table:table-cell table:style-name="Tableau26.A1" office:value-type="string">
            <text:p text:style-name="Preformatted_20_Text"># lsvg -o</text:p>
            <text:p text:style-name="Preformatted_20_Text">vgdump</text:p>
            <text:p text:style-name="Preformatted_20_Text">vgprod</text:p>
            <text:p text:style-name="Preformatted_20_Text">rootvg</text:p>
            <text:p text:style-name="P53">#</text:p>
          </table:table-cell>
        </table:table-row>
      </table:table>
      <text:p text:style-name="Text_20_body">Affichage de l'état du groupe rootvg (affiche aussi le nombre max de PV pour ce VG) : </text:p>
      <table:table table:name="Tableau27" table:style-name="Tableau27">
        <table:table-column table:style-name="Tableau27.A"/>
        <table:table-row>
          <table:table-cell table:style-name="Tableau27.A1" office:value-type="string">
            <text:p text:style-name="Preformatted_20_Text"># lsvg rootvg</text:p>
            <text:p text:style-name="Preformatted_20_Text">VOLUME GROUP: <text:s text:c="2"/>rootvg <text:s text:c="18"/>VG IDENTIFIER: <text:s/>0057498a00004c00000000fb8bb01139</text:p>
            <text:p text:style-name="Preformatted_20_Text">VG STATE: <text:s text:c="6"/>active <text:s text:c="18"/>PP SIZE: <text:s text:c="7"/>32 megabyte(s)</text:p>
            <text:p text:style-name="Preformatted_20_Text">VG PERMISSION: <text:s/>read/write <text:s text:c="14"/>TOTAL PPs: <text:s text:c="5"/>1084 (34688 megabytes)</text:p>
            <text:p text:style-name="Preformatted_20_Text">MAX LVs: <text:s text:c="7"/>256 <text:s text:c="21"/>FREE PPs: <text:s text:c="6"/>507 (16224 megabytes)</text:p>
            <text:p text:style-name="Preformatted_20_Text">LVs: <text:s text:c="11"/>12 <text:s text:c="22"/>USED PPs: <text:s text:c="6"/>577 (18464 megabytes)</text:p>
            <text:p text:style-name="Preformatted_20_Text">OPEN LVs: <text:s text:c="6"/>11 <text:s text:c="22"/>QUORUM: <text:s text:c="8"/>1</text:p>
            <text:p text:style-name="Preformatted_20_Text">TOTAL PVs: <text:s text:c="5"/>2 <text:s text:c="23"/>VG DESCRIPTORS: 3</text:p>
            <text:p text:style-name="Preformatted_20_Text">STALE PVs: <text:s text:c="5"/>0 <text:s text:c="23"/>STALE PPs: <text:s text:c="5"/>0</text:p>
            <text:p text:style-name="Preformatted_20_Text">ACTIVE PVs: <text:s text:c="4"/>2 <text:s text:c="23"/>AUTO ON: <text:s text:c="7"/>yes</text:p>
            <text:p text:style-name="Preformatted_20_Text">MAX PPs per PV: 1016 <text:s text:c="20"/>MAX PVs: <text:s text:c="7"/>32</text:p>
            <text:p text:style-name="Preformatted_20_Text">LTG size: <text:s text:c="6"/>128 kilobyte(s) <text:s text:c="9"/>AUTO SYNC: <text:s text:c="5"/>no</text:p>
            <text:p text:style-name="Preformatted_20_Text">HOT SPARE: <text:s text:c="5"/>no <text:s text:c="38"/></text:p>
            <text:p text:style-name="P53">#</text:p>
          </table:table-cell>
        </table:table-row>
      </table:table>
      <text:p text:style-name="Text_20_body">Affichage des infos sur tous les LV de rootvg : </text:p>
      <table:table table:name="Tableau28" table:style-name="Tableau28">
        <table:table-column table:style-name="Tableau28.A"/>
        <table:table-row>
          <table:table-cell table:style-name="Tableau28.A1" office:value-type="string">
            <text:p text:style-name="Preformatted_20_Text"># lsvg -l rootvg</text:p>
            <text:p text:style-name="Preformatted_20_Text">rootvg:</text:p>
            <text:p text:style-name="Preformatted_20_Text">LV NAME <text:s text:c="12"/>TYPE <text:s text:c="6"/>LPs <text:s text:c="2"/>PPs <text:s text:c="2"/>PVs <text:s/>LV STATE <text:s text:c="5"/>MOUNT POINT</text:p>
            <text:p text:style-name="Preformatted_20_Text">hd5 <text:s text:c="16"/>boot <text:s text:c="6"/>1 <text:s text:c="4"/>2 <text:s text:c="4"/>2 <text:s text:c="3"/>closed/syncd <text:s/>N/A</text:p>
            <text:p text:style-name="Preformatted_20_Text">hd6 <text:s text:c="16"/>paging <text:s text:c="4"/>9 <text:s text:c="4"/>18 <text:s text:c="3"/>2 <text:s text:c="3"/>open/syncd <text:s text:c="3"/>N/A</text:p>
            <text:p text:style-name="Preformatted_20_Text">hd8 <text:s text:c="16"/>jfslog <text:s text:c="4"/>1 <text:s text:c="4"/>2 <text:s text:c="4"/>2 <text:s text:c="3"/>open/syncd <text:s text:c="3"/>N/A</text:p>
            <text:p text:style-name="Preformatted_20_Text">hd4 <text:s text:c="16"/>jfs <text:s text:c="7"/>1 <text:s text:c="4"/>2 <text:s text:c="4"/>2 <text:s text:c="3"/>open/syncd <text:s text:c="3"/>/</text:p>
            <text:p text:style-name="Preformatted_20_Text">hd2 <text:s text:c="16"/>jfs <text:s text:c="7"/>32 <text:s text:c="3"/>64 <text:s text:c="3"/>2 <text:s text:c="3"/>open/syncd <text:s text:c="3"/>/usr</text:p>
            <text:p text:style-name="Preformatted_20_Text">hd9var <text:s text:c="13"/>jfs <text:s text:c="7"/>1 <text:s text:c="4"/>2 <text:s text:c="4"/>2 <text:s text:c="3"/>open/syncd <text:s text:c="3"/>/var</text:p>
            <text:p text:style-name="Preformatted_20_Text">hd3 <text:s text:c="16"/>jfs <text:s text:c="7"/>1 <text:s text:c="4"/>2 <text:s text:c="4"/>2 <text:s text:c="3"/>open/syncd <text:s text:c="3"/>/tmp</text:p>
            <text:p text:style-name="Preformatted_20_Text">hd1 <text:s text:c="16"/>jfs <text:s text:c="7"/>1 <text:s text:c="4"/>2 <text:s text:c="4"/>2 <text:s text:c="3"/>open/syncd <text:s text:c="3"/>/home</text:p>
            <text:p text:style-name="Preformatted_20_Text">hd10opt <text:s text:c="12"/>jfs <text:s text:c="7"/>7 <text:s text:c="4"/>14 <text:s text:c="3"/>2 <text:s text:c="3"/>open/syncd <text:s text:c="3"/>/opt</text:p>
            <text:p text:style-name="Preformatted_20_Text">lg_dumplv <text:s text:c="10"/>sysdump <text:s text:c="3"/>32 <text:s text:c="3"/>64 <text:s text:c="3"/>2 <text:s text:c="3"/>open/syncd <text:s text:c="3"/>N/A</text:p>
            <text:p text:style-name="Preformatted_20_Text">lv00 <text:s text:c="15"/>jfs <text:s text:c="7"/>398 <text:s text:c="2"/>398 <text:s text:c="2"/>1 <text:s text:c="3"/>open/syncd <text:s text:c="3"/>/mnt1</text:p>
            <text:p text:style-name="Preformatted_20_Text">paging00 <text:s text:c="11"/>paging <text:s text:c="4"/>7 <text:s text:c="4"/>7 <text:s text:c="4"/>1 <text:s text:c="3"/>open/syncd <text:s text:c="3"/>N/A</text:p>
            <text:p text:style-name="P53">#</text:p>
          </table:table-cell>
        </table:table-row>
      </table:table>
      <text:p text:style-name="Text_20_body">Affichage des infos sur tous les LV par groupes de VG actifs : </text:p>
      <table:table table:name="Tableau29" table:style-name="Tableau29">
        <table:table-column table:style-name="Tableau29.A"/>
        <table:table-row>
          <table:table-cell table:style-name="Tableau29.A1" office:value-type="string">
            <text:p text:style-name="Preformatted_20_Text"># lsvg -o | lsvg -i -l</text:p>
            <text:p text:style-name="Preformatted_20_Text">vgdump:</text:p>
            <text:p text:style-name="Preformatted_20_Text">LV NAME <text:s text:c="12"/>TYPE <text:s text:c="6"/>LPs <text:s text:c="2"/>PPs <text:s text:c="2"/>PVs <text:s/>LV STATE <text:s text:c="5"/>MOUNT POINT</text:p>
            <text:p text:style-name="Preformatted_20_Text">loglv00 <text:s text:c="12"/>jfslog <text:s text:c="4"/>1 <text:s text:c="4"/>1 <text:s text:c="4"/>1 <text:s text:c="3"/>open/syncd <text:s text:c="3"/>N/A</text:p>
            <text:p text:style-name="Preformatted_20_Text">lv01 <text:s text:c="15"/>jfs <text:s text:c="7"/>100 <text:s text:c="2"/>100 <text:s text:c="2"/>2 <text:s text:c="3"/>open/syncd <text:s text:c="3"/>/mnt1/dump</text:p>
            <text:p text:style-name="Preformatted_20_Text">vgprod:</text:p>
            <text:p text:style-name="Preformatted_20_Text">LV NAME <text:s text:c="12"/>TYPE <text:s text:c="6"/>LPs <text:s text:c="2"/>PPs <text:s text:c="2"/>PVs <text:s/>LV STATE <text:s text:c="5"/>MOUNT POINT</text:p>
            <text:p text:style-name="Preformatted_20_Text">prod_master <text:s text:c="8"/>raw <text:s text:c="7"/>1 <text:s text:c="4"/>1 <text:s text:c="4"/>1 <text:s text:c="3"/>open/syncd <text:s text:c="3"/>N/A</text:p>
            <text:p text:style-name="Preformatted_20_Text">prod_temprocs <text:s text:c="6"/>raw <text:s text:c="7"/>2 <text:s text:c="4"/>2 <text:s text:c="4"/>1 <text:s text:c="3"/>open/syncd <text:s text:c="3"/>N/A</text:p>
            <text:p text:style-name="Preformatted_20_Text">prod_sysdb <text:s text:c="9"/>raw <text:s text:c="7"/>2 <text:s text:c="4"/>2 <text:s text:c="4"/>1 <text:s text:c="3"/>open/syncd <text:s text:c="3"/>N/A</text:p>
            <text:p text:style-name="Preformatted_20_Text">prod_tempdb <text:s text:c="8"/>raw <text:s text:c="7"/>4 <text:s text:c="4"/>4 <text:s text:c="4"/>1 <text:s text:c="3"/>open/syncd <text:s text:c="3"/>N/A</text:p>
            <text:p text:style-name="Preformatted_20_Text">prod_data1 <text:s text:c="9"/>raw <text:s text:c="7"/>190 <text:s text:c="2"/>190 <text:s text:c="2"/>3 <text:s text:c="3"/>open/syncd <text:s text:c="3"/>N/A</text:p>
            <text:p text:style-name="Preformatted_20_Text">prod_log1 <text:s text:c="10"/>raw <text:s text:c="7"/>67 <text:s text:c="3"/>67 <text:s text:c="3"/>1 <text:s text:c="3"/>open/syncd <text:s text:c="3"/>N/A</text:p>
            <text:p text:style-name="Preformatted_20_Text">rootvg:</text:p>
            <text:p text:style-name="Preformatted_20_Text">LV NAME <text:s text:c="12"/>TYPE <text:s text:c="6"/>LPs <text:s text:c="2"/>PPs <text:s text:c="2"/>PVs <text:s/>LV STATE <text:s text:c="5"/>MOUNT POINT</text:p>
            <text:p text:style-name="Preformatted_20_Text">hd5 <text:s text:c="16"/>boot <text:s text:c="6"/>1 <text:s text:c="4"/>2 <text:s text:c="4"/>2 <text:s text:c="3"/>closed/syncd <text:s/>N/A</text:p>
            <text:p text:style-name="Preformatted_20_Text">hd6 <text:s text:c="16"/>paging <text:s text:c="4"/>9 <text:s text:c="4"/>18 <text:s text:c="3"/>2 <text:s text:c="3"/>open/syncd <text:s text:c="3"/>N/A</text:p>
            <text:p text:style-name="Preformatted_20_Text">hd8 <text:s text:c="16"/>jfslog <text:s text:c="4"/>1 <text:s text:c="4"/>2 <text:s text:c="4"/>2 <text:s text:c="3"/>open/syncd <text:s text:c="3"/>N/A</text:p>
            <text:p text:style-name="Preformatted_20_Text">hd4 <text:s text:c="16"/>jfs <text:s text:c="7"/>1 <text:s text:c="4"/>2 <text:s text:c="4"/>2 <text:s text:c="3"/>open/syncd <text:s text:c="3"/>/</text:p>
            <text:p text:style-name="Preformatted_20_Text">hd2 <text:s text:c="16"/>jfs <text:s text:c="7"/>32 <text:s text:c="3"/>64 <text:s text:c="3"/>2 <text:s text:c="3"/>open/syncd <text:s text:c="3"/>/usr</text:p>
            <text:p text:style-name="Preformatted_20_Text">hd9var <text:s text:c="13"/>jfs <text:s text:c="7"/>1 <text:s text:c="4"/>2 <text:s text:c="4"/>2 <text:s text:c="3"/>open/syncd <text:s text:c="3"/>/var</text:p>
            <text:p text:style-name="Preformatted_20_Text">hd3 <text:s text:c="16"/>jfs <text:s text:c="7"/>1 <text:s text:c="4"/>2 <text:s text:c="4"/>2 <text:s text:c="3"/>open/syncd <text:s text:c="3"/>/tmp</text:p>
            <text:p text:style-name="Preformatted_20_Text">hd1 <text:s text:c="16"/>jfs <text:s text:c="7"/>1 <text:s text:c="4"/>2 <text:s text:c="4"/>2 <text:s text:c="3"/>open/syncd <text:s text:c="3"/>/home</text:p>
            <text:p text:style-name="Preformatted_20_Text">hd10opt <text:s text:c="12"/>jfs <text:s text:c="7"/>7 <text:s text:c="4"/>14 <text:s text:c="3"/>2 <text:s text:c="3"/>open/syncd <text:s text:c="3"/>/opt</text:p>
            <text:p text:style-name="Preformatted_20_Text">lg_dumplv <text:s text:c="10"/>sysdump <text:s text:c="3"/>32 <text:s text:c="3"/>64 <text:s text:c="3"/>2 <text:s text:c="3"/>open/syncd <text:s text:c="3"/>N/A</text:p>
            <text:p text:style-name="Preformatted_20_Text">lv00 <text:s text:c="15"/>jfs <text:s text:c="7"/>398 <text:s text:c="2"/>398 <text:s text:c="2"/>1 <text:s text:c="3"/>open/syncd <text:s text:c="3"/>/mnt1</text:p>
            <text:p text:style-name="Preformatted_20_Text">paging00 <text:s text:c="11"/>paging <text:s text:c="4"/>7 <text:s text:c="4"/>7 <text:s text:c="4"/>1 <text:s text:c="3"/>open/syncd <text:s text:c="3"/>N/A</text:p>
            <text:p text:style-name="P53">#</text:p>
          </table:table-cell>
        </table:table-row>
      </table:table>
      <text:p text:style-name="Text_20_body">Affiche des infos sur tous les PV de rootvg (avec nb de PPs dans chaque section du PV : bord extérieur, milieu extérieur, centre, milieu intérieur, bord intérieur) : </text:p>
      <table:table table:name="Tableau30" table:style-name="Tableau30">
        <table:table-column table:style-name="Tableau30.A"/>
        <table:table-row>
          <table:table-cell table:style-name="Tableau30.A1" office:value-type="string">
            <text:p text:style-name="Preformatted_20_Text"># lsvg -p rootvg</text:p>
            <text:p text:style-name="Preformatted_20_Text">rootvg:</text:p>
            <text:p text:style-name="Preformatted_20_Text">PV_NAME <text:s text:c="10"/>PV STATE <text:s text:c="9"/>TOTAL PPs <text:s text:c="2"/>FREE PPs <text:s text:c="3"/>FREE DISTRIBUTION</text:p>
            <text:p text:style-name="Preformatted_20_Text">hdisk0 <text:s text:c="11"/>active <text:s text:c="11"/>542 <text:s text:c="8"/>58 <text:s text:c="9"/>29..00..00..00..29</text:p>
            <text:p text:style-name="Preformatted_20_Text">hdisk1 <text:s text:c="11"/>active <text:s text:c="11"/>542 <text:s text:c="8"/>449 <text:s text:c="8"/>108..67..57..108..109</text:p>
            <text:p text:style-name="P53">#</text:p>
          </table:table-cell>
        </table:table-row>
      </table:table>
      <text:p text:style-name="Text_20_body"><text:a xlink:type="simple" xlink:href="http://www.linux-france.org/%7Emdecore/aix/memo-aix/memo-aix.html#top">Top</text:a><text:bookmark text:name="subsec6.2"/></text:p>
      <text:h text:style-name="Heading_20_3" text:outline-level="3">6.2. Ajout d'un VG</text:h>
      <text:p text:style-name="Text_20_body">Ajoute le VG de nom datavg (-y datavg) sur le PV hdisk2 : </text:p>
      <table:table table:name="Tableau31" table:style-name="Tableau31">
        <table:table-column table:style-name="Tableau31.A"/>
        <table:table-row>
          <table:table-cell table:style-name="Tableau31.A1" office:value-type="string">
            <text:p text:style-name="Preformatted_20_Text"># mkvg -y datavg hdisk2</text:p>
            <text:p text:style-name="Preformatted_20_Text">datavg</text:p>
            <text:p text:style-name="P53">#</text:p>
          </table:table-cell>
        </table:table-row>
      </table:table>
      <text:p text:style-name="Text_20_body">Ajoute le PV hdisk3 au VG datavg : </text:p>
      <table:table table:name="Tableau32" table:style-name="Tableau32">
        <table:table-column table:style-name="Tableau32.A"/>
        <table:table-row>
          <table:table-cell table:style-name="Tableau32.A1" office:value-type="string">
            <text:p text:style-name="Preformatted_20_Text"># extendvg -f datavg hdisk3</text:p>
            <text:p text:style-name="P53">#</text:p>
          </table:table-cell>
        </table:table-row>
      </table:table>
      <text:p text:style-name="Text_20_body">Ajoute le VG de nom logvg (-y logvg) sur le PV hdisk3 en forçant la création du VG et en allouant 64 Mo par PP : </text:p>
      <table:table table:name="Tableau33" table:style-name="Tableau33">
        <table:table-column table:style-name="Tableau33.A"/>
        <table:table-row>
          <table:table-cell table:style-name="Tableau33.A1" office:value-type="string">
            <text:p text:style-name="Preformatted_20_Text"># mkvg -f -y logvg -s 64 hdisk3</text:p>
            <text:p text:style-name="Preformatted_20_Text">logvg</text:p>
            <text:p text:style-name="P53">#</text:p>
          </table:table-cell>
        </table:table-row>
      </table:table>
      <text:p text:style-name="Text_20_body">Autorise 2 * 1016 PPs par PV : </text:p>
      <table:table table:name="Tableau34" table:style-name="Tableau34">
        <table:table-column table:style-name="Tableau34.A"/>
        <table:table-row>
          <table:table-cell table:style-name="Tableau34.A1" office:value-type="string">
            <text:p text:style-name="Preformatted_20_Text"># mkvg -t 2</text:p>
            <text:p text:style-name="Preformatted_20_Text">[...]</text:p>
            <text:p text:style-name="P53">#</text:p>
          </table:table-cell>
        </table:table-row>
      </table:table>
      <text:p text:style-name="Text_20_body"><text:a xlink:type="simple" xlink:href="http://www.linux-france.org/%7Emdecore/aix/memo-aix/memo-aix.html#top">Top</text:a><text:bookmark text:name="subsec6.3"/></text:p>
      <text:h text:style-name="Heading_20_3" text:outline-level="3">6.3. Retrait d'un VG</text:h>
      <text:p text:style-name="Text_20_body">Retire le PV hdisk2 du VG datavg. Le VG est supprimé lorsqu'il n'y a plus aucun PV dans le VG : </text:p>
      <table:table table:name="Tableau35" table:style-name="Tableau35">
        <table:table-column table:style-name="Tableau35.A"/>
        <table:table-row>
          <table:table-cell table:style-name="Tableau35.A1" office:value-type="string">
            <text:p text:style-name="Preformatted_20_Text"># reducevg datavg hdisk2</text:p>
            <text:p text:style-name="P53">#</text:p>
          </table:table-cell>
        </table:table-row>
      </table:table>
      <text:p text:style-name="Text_20_body">Retire le PV hdisk5 du VG datavg ainsi que tous les VL de datavg (efface toute les données) : </text:p>
      <table:table table:name="Tableau36" table:style-name="Tableau36">
        <table:table-column table:style-name="Tableau36.A"/>
        <table:table-row>
          <table:table-cell table:style-name="Tableau36.A1" office:value-type="string">
            <text:p text:style-name="Preformatted_20_Text"># reducevg -d datavg hdisk5</text:p>
            <text:p text:style-name="Preformatted_20_Text">0516-914 rmlv : Attention, toutes les données appartenant au volume</text:p>
            <text:p text:style-name="Preformatted_20_Text"><text:s text:c="9"/>logique monlv du volume physique hdisk5 seront détruites.</text:p>
            <text:p text:style-name="Preformatted_20_Text">rmlv : voulez-vous continuer ? o(ui) n(on) ? o</text:p>
            <text:p text:style-name="Preformatted_20_Text">0516-914 rmlv : Attention, toutes les données appartenant au volume</text:p>
            <text:p text:style-name="Preformatted_20_Text"><text:s text:c="9"/>logique loglv du volume physique hdisk5 seront détruites.</text:p>
            <text:p text:style-name="Preformatted_20_Text">rmlv : voulez-vous continuer ? o(ui) n(on) ? o</text:p>
            <text:p text:style-name="Preformatted_20_Text">rmlv : le volume logique loglv est supprimé.</text:p>
            <text:p text:style-name="P53">#</text:p>
          </table:table-cell>
        </table:table-row>
      </table:table>
      <text:p text:style-name="Text_20_body"><text:a xlink:type="simple" xlink:href="http://www.linux-france.org/%7Emdecore/aix/memo-aix/memo-aix.html#top">Top</text:a><text:bookmark text:name="subsec6.4"/></text:p>
      <text:h text:style-name="Heading_20_3" text:outline-level="3">6.4. Activation / désactivation de VG</text:h>
      <text:p text:style-name="Text_20_body">Désactive le VG datavg (aucun LV de datavg ne doit être ouvert avant de lancer cette commande) : </text:p>
      <table:table table:name="Tableau37" table:style-name="Tableau37">
        <table:table-column table:style-name="Tableau37.A"/>
        <table:table-row>
          <table:table-cell table:style-name="Tableau37.A1" office:value-type="string">
            <text:p text:style-name="Preformatted_20_Text"># varyoffvg datavg</text:p>
            <text:p text:style-name="P53">#</text:p>
          </table:table-cell>
        </table:table-row>
      </table:table>
      <text:p text:style-name="Text_20_body">Active le VG datavg : </text:p>
      <table:table table:name="Tableau38" table:style-name="Tableau38">
        <table:table-column table:style-name="Tableau38.A"/>
        <table:table-row>
          <table:table-cell table:style-name="Tableau38.A1" office:value-type="string">
            <text:p text:style-name="Preformatted_20_Text"># varyonvg datavg</text:p>
            <text:p text:style-name="P53">#</text:p>
          </table:table-cell>
        </table:table-row>
      </table:table>
      <text:p text:style-name="Text_20_body"><text:a xlink:type="simple" xlink:href="http://www.linux-france.org/%7Emdecore/aix/memo-aix/memo-aix.html#top">Top</text:a><text:bookmark text:name="subsec6.5"/></text:p>
      <text:h text:style-name="Heading_20_3" text:outline-level="3">6.5. Importation / exportation de VG à partir de / vers un disque</text:h>
      <text:list xml:id="list37334031" text:style-name="L17">
        <text:list-item>
          <text:p text:style-name="P39">la commande exportvg export un VG qui doit être inactif (varyoffvg), </text:p>
        </text:list-item>
        <text:list-item>
          <text:p text:style-name="P17">la commande importvg importe un VG : </text:p>
        </text:list-item>
      </text:list>
      <text:p text:style-name="Text_20_body">[...] # </text:p>
      <text:p text:style-name="Text_20_body"><text:a xlink:type="simple" xlink:href="http://www.linux-france.org/%7Emdecore/aix/memo-aix/memo-aix.html#top">Top</text:a><text:bookmark text:name="subsec6.6"/></text:p>
      <text:h text:style-name="Heading_20_3" text:outline-level="3">6.6. Gros volumes</text:h>
      <text:p text:style-name="Text_20_body">VG normaux : </text:p>
      <table:table table:name="Tableau39" table:style-name="Tableau39">
        <table:table-column table:style-name="Tableau39.A"/>
        <table:table-row>
          <table:table-cell table:style-name="Tableau39.A1" office:value-type="string">
            <text:p text:style-name="Preformatted_20_Text">Nb de PV <text:s text:c="2"/>Nombre max de PPs/PV <text:s text:c="2"/>Commande AIX</text:p>
            <text:p text:style-name="Preformatted_20_Text"><text:s text:c="2"/>2 <text:s text:c="9"/>16256 <text:s text:c="16"/>mkvg -t 5</text:p>
            <text:p text:style-name="Preformatted_20_Text"><text:s text:c="2"/>4 <text:s text:c="10"/>8128 <text:s text:c="16"/>mkvg -t 4</text:p>
            <text:p text:style-name="Preformatted_20_Text"><text:s text:c="2"/>8 <text:s text:c="10"/>4064 <text:s text:c="16"/>mkvg -t 3</text:p>
            <text:p text:style-name="Preformatted_20_Text"><text:s/>16 <text:s text:c="10"/>2032 <text:s text:c="16"/>mkvg -t 2</text:p>
            <text:p text:style-name="P53"><text:s/>32 <text:s text:c="10"/>1016 <text:s text:c="16"/>mkvg</text:p>
          </table:table-cell>
        </table:table-row>
      </table:table>
      <text:p text:style-name="Text_20_body">Gros VG : </text:p>
      <table:table table:name="Tableau40" table:style-name="Tableau40">
        <table:table-column table:style-name="Tableau40.A"/>
        <table:table-row>
          <table:table-cell table:style-name="Tableau40.A1" office:value-type="string">
            <text:p text:style-name="Preformatted_20_Text">Nb de PV <text:s text:c="2"/>Nombre max de PPs/PV <text:s text:c="2"/>Commande AIX</text:p>
            <text:p text:style-name="Preformatted_20_Text"><text:s text:c="3"/>2 <text:s text:c="7"/>65024 <text:s text:c="17"/>mkvg -B -t 7</text:p>
            <text:p text:style-name="Preformatted_20_Text"><text:s text:c="3"/>4 <text:s text:c="7"/>32512 <text:s text:c="17"/>mkvg -B -t 6</text:p>
            <text:p text:style-name="Preformatted_20_Text"><text:s text:c="3"/>8 <text:s text:c="7"/>16256 <text:s text:c="17"/>mkvg -B -t 5</text:p>
            <text:p text:style-name="Preformatted_20_Text"><text:s text:c="2"/>16 <text:s text:c="8"/>8128 <text:s text:c="17"/>mkvg -B -t 4</text:p>
            <text:p text:style-name="Preformatted_20_Text"><text:s text:c="2"/>32 <text:s text:c="8"/>4064 <text:s text:c="17"/>mkvg -B -t 3</text:p>
            <text:p text:style-name="Preformatted_20_Text"><text:s text:c="2"/>64 <text:s text:c="8"/>2032 <text:s text:c="17"/>mkvg -B -t 2</text:p>
            <text:p text:style-name="P53"><text:s/>128 <text:s text:c="8"/>1016 <text:s text:c="17"/>mkvg -B</text:p>
          </table:table-cell>
        </table:table-row>
      </table:table>
      <text:p text:style-name="Text_20_body">Convertit le VG datavg en gros volume : </text:p>
      <table:table table:name="Tableau41" table:style-name="Tableau41">
        <table:table-column table:style-name="Tableau41.A"/>
        <table:table-row>
          <table:table-cell table:style-name="Tableau41.A1" office:value-type="string">
            <text:p text:style-name="Preformatted_20_Text"># chvg -f -B datavg</text:p>
            <text:p text:style-name="Preformatted_20_Text">0516-1164 chvg : Le groupe de volumes datavg a été modifié. <text:s/>Les</text:p>
            <text:p text:style-name="Preformatted_20_Text"><text:s text:c="8"/>caractéristiques en cours de datavg lui permettent de contenir jusqu'à</text:p>
            <text:p text:style-name="Preformatted_20_Text"><text:s text:c="8"/>128 volumes physiques comportant 1016 partitions physiques chacun.</text:p>
            <text:p text:style-name="P53">#</text:p>
          </table:table-cell>
        </table:table-row>
      </table:table>
      <text:p text:style-name="Text_20_body">Créé de gros groupes de volumes (max 128 PV vs 32, 65024 PPs vs 16256) : </text:p>
      <table:table table:name="Tableau42" table:style-name="Tableau42">
        <table:table-column table:style-name="Tableau42.A"/>
        <table:table-row>
          <table:table-cell table:style-name="Tableau42.A1" office:value-type="string">
            <text:p text:style-name="Preformatted_20_Text"># mkvg -B</text:p>
            <text:p text:style-name="Preformatted_20_Text">[...]</text:p>
            <text:p text:style-name="P53">#</text:p>
          </table:table-cell>
        </table:table-row>
      </table:table>
      <text:p text:style-name="Text_20_body"><text:a xlink:type="simple" xlink:href="http://www.linux-france.org/%7Emdecore/aix/memo-aix/memo-aix.html#top">Top</text:a><text:bookmark text:name="sec7"/></text:p>
      <text:h text:style-name="Heading_20_2" text:outline-level="2">7. Volumes logiques </text:h>
      <text:p text:style-name="Text_20_body"><text:a xlink:type="simple" xlink:href="http://www.linux-france.org/%7Emdecore/aix/memo-aix/memo-aix.html#top">Top</text:a><text:bookmark text:name="subsec7.1"/></text:p>
      <text:h text:style-name="Heading_20_3" text:outline-level="3">7.1. Affichage des LV</text:h>
      <text:p text:style-name="Text_20_body">Affiche des infos sur l'état du LV hd6 : </text:p>
      <table:table table:name="Tableau43" table:style-name="Tableau43">
        <table:table-column table:style-name="Tableau43.A"/>
        <table:table-row>
          <table:table-cell table:style-name="Tableau43.A1" office:value-type="string">
            <text:p text:style-name="Preformatted_20_Text"># lslv hd6</text:p>
            <text:p text:style-name="Preformatted_20_Text">LOGICAL VOLUME: <text:s text:c="4"/>hd6 <text:s text:c="19"/>VOLUME GROUP: <text:s text:c="2"/>rootvg</text:p>
            <text:p text:style-name="Preformatted_20_Text">LV IDENTIFIER: <text:s text:c="5"/>0057498a00004c00000000fb8bb01139.2 PERMISSION: <text:s text:c="4"/>read/write</text:p>
            <text:p text:style-name="Preformatted_20_Text">VG STATE: <text:s text:c="10"/>active/complete <text:s text:c="7"/>LV STATE: <text:s text:c="6"/>opened/syncd</text:p>
            <text:p text:style-name="Preformatted_20_Text">TYPE: <text:s text:c="14"/>paging <text:s text:c="16"/>WRITE VERIFY: <text:s text:c="2"/>off</text:p>
            <text:p text:style-name="Preformatted_20_Text">MAX LPs: <text:s text:c="11"/>512 <text:s text:c="19"/>PP SIZE: <text:s text:c="7"/>32 megabyte(s)</text:p>
            <text:p text:style-name="Preformatted_20_Text">COPIES: <text:s text:c="12"/>2 <text:s text:c="21"/>SCHED POLICY: <text:s text:c="2"/>parallel</text:p>
            <text:p text:style-name="Preformatted_20_Text">LPs: <text:s text:c="15"/>9 <text:s text:c="21"/>PPs: <text:s text:c="11"/>18</text:p>
            <text:p text:style-name="Preformatted_20_Text">STALE PPs: <text:s text:c="9"/>0 <text:s text:c="21"/>BB POLICY: <text:s text:c="5"/>non-relocatable</text:p>
            <text:p text:style-name="Preformatted_20_Text">INTER-POLICY: <text:s text:c="6"/>minimum <text:s text:c="15"/>RELOCATABLE: <text:s text:c="3"/>yes</text:p>
            <text:p text:style-name="Preformatted_20_Text">INTRA-POLICY: <text:s text:c="6"/>middle <text:s text:c="16"/>UPPER BOUND: <text:s text:c="3"/>32</text:p>
            <text:p text:style-name="Preformatted_20_Text">MOUNT POINT: <text:s text:c="7"/>N/A <text:s text:c="19"/>LABEL: <text:s text:c="9"/>None</text:p>
            <text:p text:style-name="Preformatted_20_Text">MIRROR WRITE CONSISTENCY: off <text:s text:c="35"/></text:p>
            <text:p text:style-name="Preformatted_20_Text">EACH LP COPY ON A SEPARATE PV ?: yes <text:s text:c="35"/></text:p>
            <text:p text:style-name="P53">#</text:p>
          </table:table-cell>
        </table:table-row>
      </table:table>
      <text:p text:style-name="Text_20_body">Affiche sur quels VG sont les LV : </text:p>
      <table:table table:name="Tableau44" table:style-name="Tableau44">
        <table:table-column table:style-name="Tableau44.A"/>
        <table:table-row>
          <table:table-cell table:style-name="Tableau44.A1" office:value-type="string">
            <text:p text:style-name="Preformatted_20_Text"># lslv -l hd6</text:p>
            <text:p text:style-name="Preformatted_20_Text">hd6:N/A</text:p>
            <text:p text:style-name="Preformatted_20_Text">PV <text:s text:c="15"/>COPIES <text:s text:c="7"/>IN BAND <text:s text:c="6"/>DISTRIBUTION <text:s/></text:p>
            <text:p text:style-name="Preformatted_20_Text">hdisk0 <text:s text:c="11"/>009:000:000 <text:s text:c="2"/>100% <text:s text:c="9"/>000:009:000:000:000 </text:p>
            <text:p text:style-name="Preformatted_20_Text">hdisk1 <text:s text:c="11"/>009:000:000 <text:s text:c="2"/>100% <text:s text:c="9"/>000:009:000:000:000 </text:p>
            <text:p text:style-name="P53">#</text:p>
          </table:table-cell>
        </table:table-row>
      </table:table>
      <text:p text:style-name="Text_20_body">Affiche la carte d'allocation sur le disque hdisk0 : </text:p>
      <table:table table:name="Tableau45" table:style-name="Tableau45">
        <table:table-column table:style-name="Tableau45.A"/>
        <table:table-row>
          <table:table-cell table:style-name="Tableau45.A1" office:value-type="string">
            <text:p text:style-name="Preformatted_20_Text"># lslv -p hdisk0</text:p>
            <text:p text:style-name="Preformatted_20_Text">hdisk0:::</text:p>
            <text:p text:style-name="Preformatted_20_Text">USED <text:s text:c="2"/>FREE <text:s text:c="2"/>FREE <text:s text:c="2"/>FREE <text:s text:c="2"/>FREE <text:s text:c="2"/>FREE <text:s text:c="2"/>FREE <text:s text:c="2"/>FREE <text:s text:c="2"/>FREE <text:s text:c="2"/>FREE <text:s text:c="6"/>1-10</text:p>
            <text:p text:style-name="Preformatted_20_Text">FREE <text:s text:c="2"/>FREE <text:s text:c="2"/>FREE <text:s text:c="2"/>FREE <text:s text:c="2"/>FREE <text:s text:c="2"/>FREE <text:s text:c="2"/>FREE <text:s text:c="2"/>FREE <text:s text:c="2"/>FREE <text:s text:c="2"/>FREE <text:s text:c="5"/>11-20</text:p>
            <text:p text:style-name="Preformatted_20_Text">FREE <text:s text:c="2"/>FREE <text:s text:c="2"/>FREE <text:s text:c="2"/>FREE <text:s text:c="2"/>FREE <text:s text:c="2"/>FREE <text:s text:c="2"/>FREE <text:s text:c="2"/>FREE <text:s text:c="2"/>FREE <text:s text:c="2"/>FREE <text:s text:c="5"/>21-30</text:p>
            <text:p text:style-name="Preformatted_20_Text">USED <text:s text:c="2"/>USED <text:s text:c="2"/>USED <text:s text:c="2"/>USED <text:s text:c="2"/>USED <text:s text:c="2"/>USED <text:s text:c="2"/>USED <text:s text:c="2"/>USED <text:s text:c="2"/>USED <text:s text:c="2"/>USED <text:s text:c="5"/>31-40</text:p>
            <text:p text:style-name="Preformatted_20_Text">USED <text:s text:c="2"/>USED <text:s text:c="2"/>USED <text:s text:c="2"/>USED <text:s text:c="2"/>USED <text:s text:c="2"/>USED <text:s text:c="2"/>USED <text:s text:c="2"/>USED <text:s text:c="2"/>USED <text:s text:c="2"/>USED <text:s text:c="5"/>41-50</text:p>
            <text:p text:style-name="Preformatted_20_Text">USED <text:s text:c="2"/>USED <text:s text:c="2"/>USED <text:s text:c="2"/>USED <text:s text:c="2"/>USED <text:s text:c="2"/>USED <text:s text:c="2"/>USED <text:s text:c="2"/>USED <text:s text:c="2"/>USED <text:s text:c="2"/>USED <text:s text:c="5"/>51-60</text:p>
            <text:p text:style-name="Preformatted_20_Text">USED <text:s text:c="2"/>USED <text:s text:c="2"/>USED <text:s text:c="2"/>USED <text:s text:c="2"/>USED <text:s text:c="2"/>USED <text:s text:c="2"/>USED <text:s text:c="2"/>USED <text:s text:c="2"/>USED <text:s text:c="2"/>USED <text:s text:c="5"/>61-70</text:p>
            <text:p text:style-name="Preformatted_20_Text">USED <text:s text:c="2"/>USED <text:s text:c="2"/>USED <text:s text:c="2"/>USED <text:s text:c="2"/>USED <text:s text:c="2"/>USED <text:s text:c="2"/>USED <text:s text:c="2"/>USED <text:s text:c="2"/>USED <text:s text:c="2"/>USED <text:s text:c="5"/>71-80</text:p>
            <text:p text:style-name="Preformatted_20_Text">USED <text:s text:c="2"/>USED <text:s text:c="2"/>USED <text:s text:c="2"/>USED <text:s text:c="2"/>USED <text:s text:c="2"/>USED <text:s text:c="2"/>USED <text:s text:c="2"/>USED <text:s text:c="2"/>USED <text:s text:c="2"/>USED <text:s text:c="5"/>81-90</text:p>
            <text:p text:style-name="Preformatted_20_Text">USED <text:s text:c="2"/>USED <text:s text:c="2"/>USED <text:s text:c="2"/>USED <text:s text:c="2"/>USED <text:s text:c="2"/>USED <text:s text:c="2"/>USED <text:s text:c="2"/>USED <text:s text:c="2"/>USED <text:s text:c="2"/>USED <text:s text:c="5"/>91-100</text:p>
            <text:p text:style-name="Preformatted_20_Text">USED <text:s text:c="2"/>USED <text:s text:c="2"/>USED <text:s text:c="2"/>USED <text:s text:c="2"/>USED <text:s text:c="2"/>USED <text:s text:c="2"/>USED <text:s text:c="2"/>USED <text:s text:c="2"/>USED <text:s text:c="11"/>101-109</text:p>
            <text:p text:style-name="Preformatted_20_Text"/>
            <text:p text:style-name="Preformatted_20_Text">USED <text:s text:c="2"/>USED <text:s text:c="2"/>USED <text:s text:c="2"/>USED <text:s text:c="2"/>USED <text:s text:c="2"/>USED <text:s text:c="2"/>USED <text:s text:c="2"/>USED <text:s text:c="2"/>USED <text:s text:c="2"/>USED <text:s text:c="4"/>110-119</text:p>
            <text:p text:style-name="Preformatted_20_Text">USED <text:s text:c="2"/>USED <text:s text:c="2"/>USED <text:s text:c="2"/>USED <text:s text:c="2"/>USED <text:s text:c="2"/>USED <text:s text:c="2"/>USED <text:s text:c="2"/>USED <text:s text:c="2"/>USED <text:s text:c="2"/>USED <text:s text:c="4"/>120-129</text:p>
            <text:p text:style-name="Preformatted_20_Text">USED <text:s text:c="2"/>USED <text:s text:c="2"/>USED <text:s text:c="2"/>USED <text:s text:c="2"/>USED <text:s text:c="2"/>USED <text:s text:c="2"/>USED <text:s text:c="2"/>USED <text:s text:c="2"/>USED <text:s text:c="2"/>USED <text:s text:c="4"/>130-139</text:p>
            <text:p text:style-name="Preformatted_20_Text">USED <text:s text:c="2"/>USED <text:s text:c="2"/>USED <text:s text:c="2"/>USED <text:s text:c="2"/>USED <text:s text:c="2"/>USED <text:s text:c="2"/>USED <text:s text:c="2"/>USED <text:s text:c="2"/>USED <text:s text:c="2"/>USED <text:s text:c="4"/>140-149</text:p>
            <text:p text:style-name="Preformatted_20_Text">USED <text:s text:c="2"/>USED <text:s text:c="2"/>USED <text:s text:c="2"/>USED <text:s text:c="2"/>USED <text:s text:c="2"/>USED <text:s text:c="2"/>USED <text:s text:c="2"/>USED <text:s text:c="2"/>USED <text:s text:c="2"/>USED <text:s text:c="4"/>150-159</text:p>
            <text:p text:style-name="Preformatted_20_Text">USED <text:s text:c="2"/>USED <text:s text:c="2"/>USED <text:s text:c="2"/>USED <text:s text:c="2"/>USED <text:s text:c="2"/>USED <text:s text:c="2"/>USED <text:s text:c="2"/>USED <text:s text:c="2"/>USED <text:s text:c="2"/>USED <text:s text:c="4"/>160-169</text:p>
            <text:p text:style-name="Preformatted_20_Text">USED <text:s text:c="2"/>USED <text:s text:c="2"/>USED <text:s text:c="2"/>USED <text:s text:c="2"/>USED <text:s text:c="2"/>USED <text:s text:c="2"/>USED <text:s text:c="2"/>USED <text:s text:c="2"/>USED <text:s text:c="2"/>USED <text:s text:c="4"/>170-179</text:p>
            <text:p text:style-name="Preformatted_20_Text">USED <text:s text:c="2"/>USED <text:s text:c="2"/>USED <text:s text:c="2"/>USED <text:s text:c="2"/>USED <text:s text:c="2"/>USED <text:s text:c="2"/>USED <text:s text:c="2"/>USED <text:s text:c="2"/>USED <text:s text:c="2"/>USED <text:s text:c="4"/>180-189</text:p>
            <text:p text:style-name="Preformatted_20_Text">USED <text:s text:c="2"/>USED <text:s text:c="2"/>USED <text:s text:c="2"/>USED <text:s text:c="2"/>USED <text:s text:c="2"/>USED <text:s text:c="2"/>USED <text:s text:c="2"/>USED <text:s text:c="2"/>USED <text:s text:c="2"/>USED <text:s text:c="4"/>190-199</text:p>
            <text:p text:style-name="Preformatted_20_Text">USED <text:s text:c="2"/>USED <text:s text:c="2"/>USED <text:s text:c="2"/>USED <text:s text:c="2"/>USED <text:s text:c="2"/>USED <text:s text:c="2"/>USED <text:s text:c="2"/>USED <text:s text:c="2"/>USED <text:s text:c="2"/>USED <text:s text:c="4"/>200-209</text:p>
            <text:p text:style-name="Preformatted_20_Text">USED <text:s text:c="2"/>USED <text:s text:c="2"/>USED <text:s text:c="2"/>USED <text:s text:c="2"/>USED <text:s text:c="2"/>USED <text:s text:c="2"/>USED <text:s text:c="2"/>USED <text:s text:c="18"/>210-217</text:p>
            <text:p text:style-name="Preformatted_20_Text"/>
            <text:p text:style-name="Preformatted_20_Text">[...]</text:p>
            <text:p text:style-name="Preformatted_20_Text"/>
            <text:p text:style-name="Preformatted_20_Text">USED <text:s text:c="2"/>USED <text:s text:c="2"/>USED <text:s text:c="2"/>USED <text:s text:c="2"/>USED <text:s text:c="2"/>USED <text:s text:c="2"/>USED <text:s text:c="2"/>USED <text:s text:c="2"/>USED <text:s text:c="2"/>USED <text:s text:c="4"/>434-443</text:p>
            <text:p text:style-name="Preformatted_20_Text">USED <text:s text:c="2"/>USED <text:s text:c="2"/>USED <text:s text:c="2"/>USED <text:s text:c="2"/>USED <text:s text:c="2"/>USED <text:s text:c="2"/>USED <text:s text:c="2"/>USED <text:s text:c="2"/>USED <text:s text:c="2"/>USED <text:s text:c="4"/>444-453</text:p>
            <text:p text:style-name="Preformatted_20_Text">USED <text:s text:c="2"/>USED <text:s text:c="2"/>USED <text:s text:c="2"/>USED <text:s text:c="2"/>USED <text:s text:c="2"/>USED <text:s text:c="2"/>USED <text:s text:c="2"/>USED <text:s text:c="2"/>USED <text:s text:c="2"/>USED <text:s text:c="4"/>454-463</text:p>
            <text:p text:style-name="Preformatted_20_Text">USED <text:s text:c="2"/>USED <text:s text:c="2"/>USED <text:s text:c="2"/>USED <text:s text:c="2"/>USED <text:s text:c="2"/>USED <text:s text:c="2"/>USED <text:s text:c="2"/>USED <text:s text:c="2"/>USED <text:s text:c="2"/>USED <text:s text:c="4"/>464-473</text:p>
            <text:p text:style-name="Preformatted_20_Text">USED <text:s text:c="2"/>USED <text:s text:c="2"/>USED <text:s text:c="2"/>USED <text:s text:c="2"/>USED <text:s text:c="2"/>USED <text:s text:c="2"/>USED <text:s text:c="2"/>USED <text:s text:c="2"/>USED <text:s text:c="2"/>USED <text:s text:c="4"/>474-483</text:p>
            <text:p text:style-name="Preformatted_20_Text">USED <text:s text:c="2"/>USED <text:s text:c="2"/>USED <text:s text:c="2"/>USED <text:s text:c="2"/>USED <text:s text:c="2"/>USED <text:s text:c="2"/>USED <text:s text:c="2"/>USED <text:s text:c="2"/>USED <text:s text:c="2"/>USED <text:s text:c="4"/>484-493</text:p>
            <text:p text:style-name="Preformatted_20_Text">USED <text:s text:c="2"/>USED <text:s text:c="2"/>USED <text:s text:c="2"/>USED <text:s text:c="2"/>USED <text:s text:c="2"/>USED <text:s text:c="2"/>USED <text:s text:c="2"/>USED <text:s text:c="2"/>USED <text:s text:c="2"/>USED <text:s text:c="4"/>494-503</text:p>
            <text:p text:style-name="Preformatted_20_Text">USED <text:s text:c="2"/>USED <text:s text:c="2"/>USED <text:s text:c="2"/>USED <text:s text:c="2"/>USED <text:s text:c="2"/>USED <text:s text:c="2"/>USED <text:s text:c="2"/>USED <text:s text:c="2"/>USED <text:s text:c="2"/>USED <text:s text:c="4"/>504-513</text:p>
            <text:p text:style-name="Preformatted_20_Text">FREE <text:s text:c="2"/>FREE <text:s text:c="2"/>FREE <text:s text:c="2"/>FREE <text:s text:c="2"/>FREE <text:s text:c="2"/>FREE <text:s text:c="2"/>FREE <text:s text:c="2"/>FREE <text:s text:c="2"/>FREE <text:s text:c="2"/>FREE <text:s text:c="4"/>514-523</text:p>
            <text:p text:style-name="Preformatted_20_Text">FREE <text:s text:c="2"/>FREE <text:s text:c="2"/>FREE <text:s text:c="2"/>FREE <text:s text:c="2"/>FREE <text:s text:c="2"/>FREE <text:s text:c="2"/>FREE <text:s text:c="2"/>FREE <text:s text:c="2"/>FREE <text:s text:c="2"/>FREE <text:s text:c="4"/>524-533</text:p>
            <text:p text:style-name="Preformatted_20_Text">FREE <text:s text:c="2"/>FREE <text:s text:c="2"/>FREE <text:s text:c="2"/>FREE <text:s text:c="2"/>FREE <text:s text:c="2"/>FREE <text:s text:c="2"/>FREE <text:s text:c="2"/>FREE <text:s text:c="2"/>FREE <text:s text:c="11"/>534-542</text:p>
            <text:p text:style-name="P53">#</text:p>
          </table:table-cell>
        </table:table-row>
      </table:table>
      <text:p text:style-name="Text_20_body">Affiche la carte d'allocation du LV hd2 sur le disque hdisk0 (le nombre de LPs allouées au LV est affiché) : </text:p>
      <table:table table:name="Tableau46" table:style-name="Tableau46">
        <table:table-column table:style-name="Tableau46.A"/>
        <table:table-row>
          <table:table-cell table:style-name="Tableau46.A1" office:value-type="string">
            <text:p text:style-name="Preformatted_20_Text"># lslv -p hdisk0 hd2</text:p>
            <text:p text:style-name="Preformatted_20_Text">hdisk0:hd2:/usr</text:p>
            <text:p text:style-name="Preformatted_20_Text">USED <text:s text:c="2"/>FREE <text:s text:c="2"/>FREE <text:s text:c="2"/>FREE <text:s text:c="2"/>FREE <text:s text:c="2"/>FREE <text:s text:c="2"/>FREE <text:s text:c="2"/>FREE <text:s text:c="2"/>FREE <text:s text:c="2"/>FREE <text:s text:c="6"/>1-10</text:p>
            <text:p text:style-name="Preformatted_20_Text">FREE <text:s text:c="2"/>FREE <text:s text:c="2"/>FREE <text:s text:c="2"/>FREE <text:s text:c="2"/>FREE <text:s text:c="2"/>FREE <text:s text:c="2"/>FREE <text:s text:c="2"/>FREE <text:s text:c="2"/>FREE <text:s text:c="2"/>FREE <text:s text:c="5"/>11-20</text:p>
            <text:p text:style-name="Preformatted_20_Text">FREE <text:s text:c="2"/>FREE <text:s text:c="2"/>FREE <text:s text:c="2"/>FREE <text:s text:c="2"/>FREE <text:s text:c="2"/>FREE <text:s text:c="2"/>FREE <text:s text:c="2"/>FREE <text:s text:c="2"/>FREE <text:s text:c="2"/>FREE <text:s text:c="5"/>21-30</text:p>
            <text:p text:style-name="Preformatted_20_Text">0026 <text:s text:c="2"/>0027 <text:s text:c="2"/>0028 <text:s text:c="2"/>0029 <text:s text:c="2"/>0030 <text:s text:c="2"/>0031 <text:s text:c="2"/>0032 <text:s text:c="2"/>USED <text:s text:c="2"/>USED <text:s text:c="2"/>USED <text:s text:c="5"/>31-40</text:p>
            <text:p text:style-name="Preformatted_20_Text">USED <text:s text:c="2"/>USED <text:s text:c="2"/>USED <text:s text:c="2"/>USED <text:s text:c="2"/>USED <text:s text:c="2"/>USED <text:s text:c="2"/>USED <text:s text:c="2"/>USED <text:s text:c="2"/>USED <text:s text:c="2"/>USED <text:s text:c="5"/>41-50</text:p>
            <text:p text:style-name="Preformatted_20_Text">USED <text:s text:c="2"/>USED <text:s text:c="2"/>USED <text:s text:c="2"/>USED <text:s text:c="2"/>USED <text:s text:c="2"/>USED <text:s text:c="2"/>USED <text:s text:c="2"/>USED <text:s text:c="2"/>USED <text:s text:c="2"/>USED <text:s text:c="5"/>51-60</text:p>
            <text:p text:style-name="Preformatted_20_Text">USED <text:s text:c="2"/>USED <text:s text:c="2"/>USED <text:s text:c="2"/>USED <text:s text:c="2"/>USED <text:s text:c="2"/>USED <text:s text:c="2"/>USED <text:s text:c="2"/>USED <text:s text:c="2"/>USED <text:s text:c="2"/>USED <text:s text:c="5"/>61-70</text:p>
            <text:p text:style-name="Preformatted_20_Text">USED <text:s text:c="2"/>USED <text:s text:c="2"/>USED <text:s text:c="2"/>USED <text:s text:c="2"/>USED <text:s text:c="2"/>USED <text:s text:c="2"/>USED <text:s text:c="2"/>USED <text:s text:c="2"/>USED <text:s text:c="2"/>USED <text:s text:c="5"/>71-80</text:p>
            <text:p text:style-name="Preformatted_20_Text">USED <text:s text:c="2"/>USED <text:s text:c="2"/>USED <text:s text:c="2"/>USED <text:s text:c="2"/>USED <text:s text:c="2"/>USED <text:s text:c="2"/>USED <text:s text:c="2"/>USED <text:s text:c="2"/>USED <text:s text:c="2"/>USED <text:s text:c="5"/>81-90</text:p>
            <text:p text:style-name="Preformatted_20_Text">USED <text:s text:c="2"/>USED <text:s text:c="2"/>USED <text:s text:c="2"/>USED <text:s text:c="2"/>USED <text:s text:c="2"/>USED <text:s text:c="2"/>USED <text:s text:c="2"/>USED <text:s text:c="2"/>USED <text:s text:c="2"/>USED <text:s text:c="5"/>91-100</text:p>
            <text:p text:style-name="Preformatted_20_Text">USED <text:s text:c="2"/>USED <text:s text:c="2"/>USED <text:s text:c="2"/>USED <text:s text:c="2"/>USED <text:s text:c="2"/>USED <text:s text:c="2"/>USED <text:s text:c="2"/>USED <text:s text:c="2"/>USED <text:s text:c="11"/>101-109</text:p>
            <text:p text:style-name="Preformatted_20_Text"/>
            <text:p text:style-name="Preformatted_20_Text">USED <text:s text:c="2"/>USED <text:s text:c="2"/>USED <text:s text:c="2"/>USED <text:s text:c="2"/>USED <text:s text:c="2"/>USED <text:s text:c="2"/>USED <text:s text:c="2"/>USED <text:s text:c="2"/>USED <text:s text:c="2"/>USED <text:s text:c="4"/>110-119</text:p>
            <text:p text:style-name="Preformatted_20_Text">USED <text:s text:c="2"/>USED <text:s text:c="2"/>USED <text:s text:c="2"/>USED <text:s text:c="2"/>USED <text:s text:c="2"/>USED <text:s text:c="2"/>USED <text:s text:c="2"/>USED <text:s text:c="2"/>USED <text:s text:c="2"/>USED <text:s text:c="4"/>120-129</text:p>
            <text:p text:style-name="Preformatted_20_Text">USED <text:s text:c="2"/>USED <text:s text:c="2"/>USED <text:s text:c="2"/>USED <text:s text:c="2"/>USED <text:s text:c="2"/>USED <text:s text:c="2"/>USED <text:s text:c="2"/>USED <text:s text:c="2"/>USED <text:s text:c="2"/>USED <text:s text:c="4"/>130-139</text:p>
            <text:p text:style-name="Preformatted_20_Text">USED <text:s text:c="2"/>USED <text:s text:c="2"/>USED <text:s text:c="2"/>USED <text:s text:c="2"/>USED <text:s text:c="2"/>USED <text:s text:c="2"/>USED <text:s text:c="2"/>USED <text:s text:c="2"/>USED <text:s text:c="2"/>USED <text:s text:c="4"/>140-149</text:p>
            <text:p text:style-name="Preformatted_20_Text">USED <text:s text:c="2"/>USED <text:s text:c="2"/>USED <text:s text:c="2"/>USED <text:s text:c="2"/>USED <text:s text:c="2"/>USED <text:s text:c="2"/>USED <text:s text:c="2"/>USED <text:s text:c="2"/>USED <text:s text:c="2"/>USED <text:s text:c="4"/>150-159</text:p>
            <text:p text:style-name="Preformatted_20_Text">USED <text:s text:c="2"/>USED <text:s text:c="2"/>USED <text:s text:c="2"/>USED <text:s text:c="2"/>USED <text:s text:c="2"/>USED <text:s text:c="2"/>USED <text:s text:c="2"/>USED <text:s text:c="2"/>USED <text:s text:c="2"/>USED <text:s text:c="4"/>160-169</text:p>
            <text:p text:style-name="Preformatted_20_Text">USED <text:s text:c="2"/>USED <text:s text:c="2"/>USED <text:s text:c="2"/>USED <text:s text:c="2"/>USED <text:s text:c="2"/>USED <text:s text:c="2"/>USED <text:s text:c="2"/>USED <text:s text:c="2"/>USED <text:s text:c="2"/>USED <text:s text:c="4"/>170-179</text:p>
            <text:p text:style-name="Preformatted_20_Text">USED <text:s text:c="2"/>USED <text:s text:c="2"/>USED <text:s text:c="2"/>USED <text:s text:c="2"/>USED <text:s text:c="2"/>USED <text:s text:c="2"/>USED <text:s text:c="2"/>USED <text:s text:c="2"/>USED <text:s text:c="2"/>USED <text:s text:c="4"/>180-189</text:p>
            <text:p text:style-name="Preformatted_20_Text">USED <text:s text:c="2"/>USED <text:s text:c="2"/>USED <text:s text:c="2"/>USED <text:s text:c="2"/>USED <text:s text:c="2"/>USED <text:s text:c="2"/>USED <text:s text:c="2"/>USED <text:s text:c="2"/>USED <text:s text:c="2"/>USED <text:s text:c="4"/>190-199</text:p>
            <text:p text:style-name="Preformatted_20_Text">USED <text:s text:c="2"/>USED <text:s text:c="2"/>USED <text:s text:c="2"/>USED <text:s text:c="2"/>USED <text:s text:c="2"/>USED <text:s text:c="2"/>USED <text:s text:c="2"/>USED <text:s text:c="2"/>0016 <text:s text:c="2"/>0017 <text:s text:c="4"/>200-209</text:p>
            <text:p text:style-name="Preformatted_20_Text">0018 <text:s text:c="2"/>0019 <text:s text:c="2"/>0020 <text:s text:c="2"/>0021 <text:s text:c="2"/>0022 <text:s text:c="2"/>0023 <text:s text:c="2"/>0024 <text:s text:c="2"/>0025 <text:s text:c="18"/>210-217</text:p>
            <text:p text:style-name="Preformatted_20_Text"/>
            <text:p text:style-name="Preformatted_20_Text">[...]</text:p>
            <text:p text:style-name="Preformatted_20_Text"/>
            <text:p text:style-name="Preformatted_20_Text">USED <text:s text:c="2"/>USED <text:s text:c="2"/>USED <text:s text:c="2"/>USED <text:s text:c="2"/>USED <text:s text:c="2"/>USED <text:s text:c="2"/>USED <text:s text:c="2"/>USED <text:s text:c="2"/>USED <text:s text:c="2"/>USED <text:s text:c="4"/>434-443</text:p>
            <text:p text:style-name="Preformatted_20_Text">USED <text:s text:c="2"/>USED <text:s text:c="2"/>USED <text:s text:c="2"/>USED <text:s text:c="2"/>USED <text:s text:c="2"/>USED <text:s text:c="2"/>USED <text:s text:c="2"/>USED <text:s text:c="2"/>USED <text:s text:c="2"/>USED <text:s text:c="4"/>444-453</text:p>
            <text:p text:style-name="Preformatted_20_Text">USED <text:s text:c="2"/>USED <text:s text:c="2"/>USED <text:s text:c="2"/>USED <text:s text:c="2"/>USED <text:s text:c="2"/>USED <text:s text:c="2"/>USED <text:s text:c="2"/>USED <text:s text:c="2"/>USED <text:s text:c="2"/>USED <text:s text:c="4"/>454-463</text:p>
            <text:p text:style-name="Preformatted_20_Text">USED <text:s text:c="2"/>USED <text:s text:c="2"/>USED <text:s text:c="2"/>USED <text:s text:c="2"/>USED <text:s text:c="2"/>USED <text:s text:c="2"/>USED <text:s text:c="2"/>USED <text:s text:c="2"/>USED <text:s text:c="2"/>USED <text:s text:c="4"/>464-473</text:p>
            <text:p text:style-name="Preformatted_20_Text">USED <text:s text:c="2"/>USED <text:s text:c="2"/>USED <text:s text:c="2"/>USED <text:s text:c="2"/>USED <text:s text:c="2"/>USED <text:s text:c="2"/>USED <text:s text:c="2"/>USED <text:s text:c="2"/>USED <text:s text:c="2"/>USED <text:s text:c="4"/>474-483</text:p>
            <text:p text:style-name="Preformatted_20_Text">USED <text:s text:c="2"/>USED <text:s text:c="2"/>USED <text:s text:c="2"/>USED <text:s text:c="2"/>USED <text:s text:c="2"/>USED <text:s text:c="2"/>USED <text:s text:c="2"/>USED <text:s text:c="2"/>USED <text:s text:c="2"/>USED <text:s text:c="4"/>484-493</text:p>
            <text:p text:style-name="Preformatted_20_Text">USED <text:s text:c="2"/>USED <text:s text:c="2"/>USED <text:s text:c="2"/>USED <text:s text:c="2"/>USED <text:s text:c="2"/>USED <text:s text:c="2"/>USED <text:s text:c="2"/>USED <text:s text:c="2"/>USED <text:s text:c="2"/>USED <text:s text:c="4"/>494-503</text:p>
            <text:p text:style-name="Preformatted_20_Text">USED <text:s text:c="2"/>USED <text:s text:c="2"/>USED <text:s text:c="2"/>USED <text:s text:c="2"/>USED <text:s text:c="2"/>USED <text:s text:c="2"/>USED <text:s text:c="2"/>USED <text:s text:c="2"/>USED <text:s text:c="2"/>USED <text:s text:c="4"/>504-513</text:p>
            <text:p text:style-name="Preformatted_20_Text">FREE <text:s text:c="2"/>FREE <text:s text:c="2"/>FREE <text:s text:c="2"/>FREE <text:s text:c="2"/>FREE <text:s text:c="2"/>FREE <text:s text:c="2"/>FREE <text:s text:c="2"/>FREE <text:s text:c="2"/>FREE <text:s text:c="2"/>FREE <text:s text:c="4"/>514-523</text:p>
            <text:p text:style-name="Preformatted_20_Text">FREE <text:s text:c="2"/>FREE <text:s text:c="2"/>FREE <text:s text:c="2"/>FREE <text:s text:c="2"/>FREE <text:s text:c="2"/>FREE <text:s text:c="2"/>FREE <text:s text:c="2"/>FREE <text:s text:c="2"/>FREE <text:s text:c="2"/>FREE <text:s text:c="4"/>524-533</text:p>
            <text:p text:style-name="Preformatted_20_Text">FREE <text:s text:c="2"/>FREE <text:s text:c="2"/>FREE <text:s text:c="2"/>FREE <text:s text:c="2"/>FREE <text:s text:c="2"/>FREE <text:s text:c="2"/>FREE <text:s text:c="2"/>FREE <text:s text:c="2"/>FREE <text:s text:c="11"/>534-542</text:p>
            <text:p text:style-name="P53">#</text:p>
          </table:table-cell>
        </table:table-row>
      </table:table>
      <text:p text:style-name="Text_20_body">Affiche les informations du LV hd2 sur le disque hdisk0 : </text:p>
      <table:table table:name="Tableau47" table:style-name="Tableau47">
        <table:table-column table:style-name="Tableau47.A"/>
        <table:table-row>
          <table:table-cell table:style-name="Tableau47.A1" office:value-type="string">
            <text:p text:style-name="Preformatted_20_Text"># lslv -n hdisk0 hd2</text:p>
            <text:p text:style-name="Preformatted_20_Text">LOGICAL VOLUME: <text:s text:c="4"/>hd2 <text:s text:c="19"/>VOLUME GROUP: <text:s text:c="2"/>rootvg</text:p>
            <text:p text:style-name="Preformatted_20_Text">LV IDENTIFIER: <text:s text:c="5"/>0057498a00004c00000000fb8bb01139.5 PERMISSION: <text:s text:c="4"/>read/write</text:p>
            <text:p text:style-name="Preformatted_20_Text">VG STATE: <text:s text:c="10"/>active/complete <text:s text:c="7"/>LV STATE: <text:s text:c="6"/>closed/syncd</text:p>
            <text:p text:style-name="Preformatted_20_Text">TYPE: <text:s text:c="14"/>jfs <text:s text:c="19"/>WRITE VERIFY: <text:s text:c="2"/>off</text:p>
            <text:p text:style-name="Preformatted_20_Text">MAX LPs: <text:s text:c="11"/>32512 <text:s text:c="17"/>PP SIZE: <text:s text:c="7"/>32 megabyte(s)</text:p>
            <text:p text:style-name="Preformatted_20_Text">COPIES: <text:s text:c="12"/>2 <text:s text:c="21"/>SCHED POLICY: <text:s text:c="2"/>parallel</text:p>
            <text:p text:style-name="Preformatted_20_Text">LPs: <text:s text:c="15"/>32 <text:s text:c="20"/>PPs: <text:s text:c="11"/>64</text:p>
            <text:p text:style-name="Preformatted_20_Text">STALE PPs: <text:s text:c="9"/>0 <text:s text:c="21"/>BB POLICY: <text:s text:c="5"/>relocatable</text:p>
            <text:p text:style-name="Preformatted_20_Text">INTER-POLICY: <text:s text:c="6"/>minimum <text:s text:c="15"/>RELOCATABLE: <text:s text:c="3"/>yes</text:p>
            <text:p text:style-name="Preformatted_20_Text">INTRA-POLICY: <text:s text:c="6"/>center <text:s text:c="16"/>UPPER BOUND: <text:s text:c="3"/>32</text:p>
            <text:p text:style-name="Preformatted_20_Text">MOUNT POINT: <text:s text:c="7"/>/usr <text:s text:c="18"/>LABEL: <text:s text:c="9"/>/usr</text:p>
            <text:p text:style-name="Preformatted_20_Text">MIRROR WRITE CONSISTENCY: on/ACTIVE <text:s text:c="29"/></text:p>
            <text:p text:style-name="Preformatted_20_Text">EACH LP COPY ON A SEPARATE PV ?: yes <text:s text:c="35"/></text:p>
            <text:p text:style-name="P53">#</text:p>
          </table:table-cell>
        </table:table-row>
      </table:table>
      <text:p text:style-name="Text_20_body">Affiche les information sur le LV hd2 par PV : </text:p>
      <table:table table:name="Tableau48" table:style-name="Tableau48">
        <table:table-column table:style-name="Tableau48.A"/>
        <table:table-row>
          <table:table-cell table:style-name="Tableau48.A1" office:value-type="string">
            <text:p text:style-name="Preformatted_20_Text"># lslv -l hd2</text:p>
            <text:p text:style-name="Preformatted_20_Text">hd2:/usr</text:p>
            <text:p text:style-name="Preformatted_20_Text">PV <text:s text:c="15"/>COPIES <text:s text:c="7"/>IN BAND <text:s text:c="6"/>DISTRIBUTION <text:s/></text:p>
            <text:p text:style-name="Preformatted_20_Text">hdisk0 <text:s text:c="11"/>032:000:000 <text:s text:c="2"/>46% <text:s text:c="10"/>007:010:015:000:000 </text:p>
            <text:p text:style-name="Preformatted_20_Text">hdisk1 <text:s text:c="11"/>032:000:000 <text:s text:c="2"/>100% <text:s text:c="9"/>000:000:032:000:000 </text:p>
            <text:p text:style-name="P53">#</text:p>
          </table:table-cell>
        </table:table-row>
      </table:table>
      <text:p text:style-name="Text_20_body"><text:a xlink:type="simple" xlink:href="http://www.linux-france.org/%7Emdecore/aix/memo-aix/memo-aix.html#top">Top</text:a><text:bookmark text:name="subsec7.2"/></text:p>
      <text:h text:style-name="Heading_20_3" text:outline-level="3">7.2. Ajout d'un LV</text:h>
      <text:p text:style-name="Text_20_body">Ajoute un LV nommé monlv dans datavg de taille 3 Go (unités possibles : b|B|k|K|m|M|g|G) : </text:p>
      <table:table table:name="Tableau49" table:style-name="Tableau49">
        <table:table-column table:style-name="Tableau49.A"/>
        <table:table-row>
          <table:table-cell table:style-name="Tableau49.A1" office:value-type="string">
            <text:p text:style-name="Preformatted_20_Text"># mklv -y monlv datavg 3G</text:p>
            <text:p text:style-name="Preformatted_20_Text">monlv</text:p>
            <text:p text:style-name="P53">#</text:p>
          </table:table-cell>
        </table:table-row>
      </table:table>
      <text:p text:style-name="Text_20_body">Ajoute un LV dans datavg de taille 1 PP au bord du disque : </text:p>
      <table:table table:name="Tableau50" table:style-name="Tableau50">
        <table:table-column table:style-name="Tableau50.A"/>
        <table:table-row>
          <table:table-cell table:style-name="Tableau50.A1" office:value-type="string">
            <text:p text:style-name="Preformatted_20_Text"># mklv -a e datavg 1</text:p>
            <text:p text:style-name="Preformatted_20_Text">lv00</text:p>
            <text:p text:style-name="P53">#</text:p>
          </table:table-cell>
        </table:table-row>
      </table:table>
      <text:p text:style-name="Text_20_body"><text:a xlink:type="simple" xlink:href="http://www.linux-france.org/%7Emdecore/aix/memo-aix/memo-aix.html#top">Top</text:a><text:bookmark text:name="subsec7.3"/></text:p>
      <text:h text:style-name="Heading_20_3" text:outline-level="3">7.3. Modifications d'un LV</text:h>
      <text:p text:style-name="Text_20_body">Renomme le LV lv00 en logvg : </text:p>
      <table:table table:name="Tableau51" table:style-name="Tableau51">
        <table:table-column table:style-name="Tableau51.A"/>
        <table:table-row>
          <table:table-cell table:style-name="Tableau51.A1" office:value-type="string">
            <text:p text:style-name="Preformatted_20_Text"># chlv -n loglv lv00</text:p>
            <text:p text:style-name="P53">#</text:p>
          </table:table-cell>
        </table:table-row>
      </table:table>
      <text:p text:style-name="Text_20_body">Agrandit le LV logvg d'une PP : </text:p>
      <table:table table:name="Tableau52" table:style-name="Tableau52">
        <table:table-column table:style-name="Tableau52.A"/>
        <table:table-row>
          <table:table-cell table:style-name="Tableau52.A1" office:value-type="string">
            <text:p text:style-name="Preformatted_20_Text"># extendlv loglv 1</text:p>
            <text:p text:style-name="P53">#</text:p>
          </table:table-cell>
        </table:table-row>
      </table:table>
      <text:p text:style-name="Text_20_body">Met comme police de miroir des écritures séquentielles pour le LV loglv : </text:p>
      <table:table table:name="Tableau53" table:style-name="Tableau53">
        <table:table-column table:style-name="Tableau53.A"/>
        <table:table-row>
          <table:table-cell table:style-name="Tableau53.A1" office:value-type="string">
            <text:p text:style-name="Preformatted_20_Text"># chlv -d s loglv</text:p>
            <text:p text:style-name="P53">#</text:p>
          </table:table-cell>
        </table:table-row>
      </table:table>
      <text:p text:style-name="Text_20_body"><text:a xlink:type="simple" xlink:href="http://www.linux-france.org/%7Emdecore/aix/memo-aix/memo-aix.html#top">Top</text:a><text:bookmark text:name="subsec7.4"/></text:p>
      <text:h text:style-name="Heading_20_3" text:outline-level="3">7.4. Suppression d'un LV</text:h>
      <text:p text:style-name="Text_20_body">Supprime le volume logique loglv (ne supprime pas les entrées dans la base ODM ou /etc/filesystems) : </text:p>
      <table:table table:name="Tableau54" table:style-name="Tableau54">
        <table:table-column table:style-name="Tableau54.A"/>
        <table:table-row>
          <table:table-cell table:style-name="Tableau54.A1" office:value-type="string">
            <text:p text:style-name="Preformatted_20_Text"># rmlv -f loglv</text:p>
            <text:p text:style-name="Preformatted_20_Text">rmlv : le volume logique loglv est supprimé.</text:p>
            <text:p text:style-name="P53">#</text:p>
          </table:table-cell>
        </table:table-row>
      </table:table>
      <text:p text:style-name="Text_20_body"><text:a xlink:type="simple" xlink:href="http://www.linux-france.org/%7Emdecore/aix/memo-aix/memo-aix.html#top">Top</text:a><text:bookmark text:name="sec8"/></text:p>
      <text:h text:style-name="Heading_20_2" text:outline-level="2">8. Création d'un mirroir</text:h>
      <text:p text:style-name="Text_20_body">Un mirroir signifie que une LP est associée à plusieurs PP. </text:p>
      <text:p text:style-name="Text_20_body"><text:a xlink:type="simple" xlink:href="http://www.linux-france.org/%7Emdecore/aix/memo-aix/memo-aix.html#top">Top</text:a><text:bookmark text:name="subsec8.1"/></text:p>
      <text:h text:style-name="Heading_20_3" text:outline-level="3">8.1. Mirroir d'un disque entier</text:h>
      <text:p text:style-name="Text_20_body">Le groupe de volume datavg contient un volume logique (monlv) : </text:p>
      <table:table table:name="Tableau55" table:style-name="Tableau55">
        <table:table-column table:style-name="Tableau55.A"/>
        <table:table-row>
          <table:table-cell table:style-name="Tableau55.A1" office:value-type="string">
            <text:p text:style-name="Preformatted_20_Text"># lsvg -l datavg</text:p>
            <text:p text:style-name="Preformatted_20_Text">datavg:</text:p>
            <text:p text:style-name="Preformatted_20_Text">LV NAME <text:s text:c="12"/>TYPE <text:s text:c="6"/>LPs <text:s text:c="2"/>PPs <text:s text:c="2"/>PVs <text:s/>LV STATE <text:s text:c="5"/>MOUNT POINT</text:p>
            <text:p text:style-name="Preformatted_20_Text">monlv <text:s text:c="14"/>jfs <text:s text:c="7"/>48 <text:s text:c="3"/>48 <text:s text:c="3"/>1 <text:s text:c="3"/>closed/syncd <text:s/>N/A</text:p>
            <text:p text:style-name="P53">#</text:p>
          </table:table-cell>
        </table:table-row>
      </table:table>
      <text:p text:style-name="Text_20_body">Le groupe de volume datavg est sur le disque hdisk2 : </text:p>
      <table:table table:name="Tableau56" table:style-name="Tableau56">
        <table:table-column table:style-name="Tableau56.A"/>
        <table:table-row>
          <table:table-cell table:style-name="Tableau56.A1" office:value-type="string">
            <text:p text:style-name="Preformatted_20_Text"># lsvg -p datavg</text:p>
            <text:p text:style-name="Preformatted_20_Text">datavg:</text:p>
            <text:p text:style-name="Preformatted_20_Text">PV_NAME <text:s text:c="10"/>PV STATE <text:s text:c="9"/>TOTAL PPs <text:s text:c="2"/>FREE PPs <text:s text:c="3"/>FREE DISTRIBUTION</text:p>
            <text:p text:style-name="Preformatted_20_Text">hdisk2 <text:s text:c="11"/>active <text:s text:c="11"/>542 <text:s text:c="8"/>494 <text:s text:c="8"/>109..60..108..108..109</text:p>
            <text:p text:style-name="P53">#</text:p>
          </table:table-cell>
        </table:table-row>
      </table:table>
      <text:p text:style-name="Text_20_body">Rajout du disque hdisk3 dans le groupe de volume datavg : </text:p>
      <table:table table:name="Tableau57" table:style-name="Tableau57">
        <table:table-column table:style-name="Tableau57.A"/>
        <table:table-row>
          <table:table-cell table:style-name="Tableau57.A1" office:value-type="string">
            <text:p text:style-name="Preformatted_20_Text"># extendvg datavg hdisk3</text:p>
            <text:p text:style-name="P53">#</text:p>
          </table:table-cell>
        </table:table-row>
      </table:table>
      <text:p text:style-name="Text_20_body">Vérification : </text:p>
      <table:table table:name="Tableau58" table:style-name="Tableau58">
        <table:table-column table:style-name="Tableau58.A"/>
        <table:table-row>
          <table:table-cell table:style-name="Tableau58.A1" office:value-type="string">
            <text:p text:style-name="Preformatted_20_Text"># lsvg -p datavg</text:p>
            <text:p text:style-name="Preformatted_20_Text">datavg:</text:p>
            <text:p text:style-name="Preformatted_20_Text">PV_NAME <text:s text:c="10"/>PV STATE <text:s text:c="9"/>TOTAL PPs <text:s text:c="2"/>FREE PPs <text:s text:c="3"/>FREE DISTRIBUTION</text:p>
            <text:p text:style-name="Preformatted_20_Text">hdisk2 <text:s text:c="11"/>active <text:s text:c="11"/>542 <text:s text:c="8"/>494 <text:s text:c="8"/>109..60..108..108..109</text:p>
            <text:p text:style-name="Preformatted_20_Text">hdisk3 <text:s text:c="11"/>active <text:s text:c="11"/>542 <text:s text:c="8"/>542 <text:s text:c="8"/>109..108..108..108..109</text:p>
            <text:p text:style-name="P53">#</text:p>
          </table:table-cell>
        </table:table-row>
      </table:table>
      <text:p text:style-name="Text_20_body">Mise en place du miroir sur le disque hdisk3 : </text:p>
      <table:table table:name="Tableau59" table:style-name="Tableau59">
        <table:table-column table:style-name="Tableau59.A"/>
        <table:table-row>
          <table:table-cell table:style-name="Tableau59.A1" office:value-type="string">
            <text:p text:style-name="Preformatted_20_Text"># mirrorvg datavg hdisk3</text:p>
            <text:p text:style-name="Preformatted_20_Text">0516-1125 mirrorvg : Condition de quorum désactivée ; exécutez varyoff et varyon</text:p>
            <text:p text:style-name="Preformatted_20_Text"><text:s text:c="8"/>sur le groupe de volumes pour pour que cette définition prenne effet.</text:p>
            <text:p text:style-name="P53">#</text:p>
          </table:table-cell>
        </table:table-row>
      </table:table>
      <text:p text:style-name="Text_20_body">Vérification (une LP est sur deux PPs) : </text:p>
      <table:table table:name="Tableau60" table:style-name="Tableau60">
        <table:table-column table:style-name="Tableau60.A"/>
        <table:table-row>
          <table:table-cell table:style-name="Tableau60.A1" office:value-type="string">
            <text:p text:style-name="Preformatted_20_Text"># lsvg -l datavg</text:p>
            <text:p text:style-name="Preformatted_20_Text">datavg:</text:p>
            <text:p text:style-name="Preformatted_20_Text">LV NAME <text:s text:c="12"/>TYPE <text:s text:c="6"/>LPs <text:s text:c="2"/>PPs <text:s text:c="2"/>PVs <text:s/>LV STATE <text:s text:c="5"/>MOUNT POINT</text:p>
            <text:p text:style-name="Preformatted_20_Text">monlv <text:s text:c="14"/>jfs <text:s text:c="7"/>48 <text:s text:c="3"/>96 <text:s text:c="3"/>2 <text:s text:c="3"/>closed/syncd <text:s/>N/A</text:p>
            <text:p text:style-name="P53">#</text:p>
          </table:table-cell>
        </table:table-row>
      </table:table>
      <text:p text:style-name="Text_20_body">Création de l'image de boot sur le disque hdisk1 : </text:p>
      <table:table table:name="Tableau61" table:style-name="Tableau61">
        <table:table-column table:style-name="Tableau61.A"/>
        <table:table-row>
          <table:table-cell table:style-name="Tableau61.A1" office:value-type="string">
            <text:p text:style-name="Preformatted_20_Text"># bosboot -ad /dev/hdisk1</text:p>
            <text:p text:style-name="P53">#</text:p>
          </table:table-cell>
        </table:table-row>
      </table:table>
      <text:p text:style-name="Text_20_body">Création de la liste des périphériques de démarrage pour les modes normal et service (disques hdisk0 et hdisk1) : </text:p>
      <table:table table:name="Tableau62" table:style-name="Tableau62">
        <table:table-column table:style-name="Tableau62.A"/>
        <table:table-row>
          <table:table-cell table:style-name="Tableau62.A1" office:value-type="string">
            <text:p text:style-name="Preformatted_20_Text"># bootlist -m normal hdisk0 hdisk1</text:p>
            <text:p text:style-name="P53">#</text:p>
          </table:table-cell>
        </table:table-row>
      </table:table>
      <table:table table:name="Tableau63" table:style-name="Tableau63">
        <table:table-column table:style-name="Tableau63.A"/>
        <table:table-row>
          <table:table-cell table:style-name="Tableau63.A1" office:value-type="string">
            <text:p text:style-name="Preformatted_20_Text"># bootlist -m service hdisk0 hdisk1</text:p>
            <text:p text:style-name="P53">#</text:p>
          </table:table-cell>
        </table:table-row>
      </table:table>
      <text:p text:style-name="Text_20_body">Vérifications finale : </text:p>
      <text:p text:style-name="Text_20_body">Le volume logique de démarrage hd5 se trouve bien sur les disques hdisk0 et hdisk1 : </text:p>
      <table:table table:name="Tableau64" table:style-name="Tableau64">
        <table:table-column table:style-name="Tableau64.A"/>
        <table:table-row>
          <table:table-cell table:style-name="Tableau64.A1" office:value-type="string">
            <text:p text:style-name="Preformatted_20_Text"># lslv -m hd5</text:p>
            <text:p text:style-name="Preformatted_20_Text">hd5:N/A</text:p>
            <text:p text:style-name="Preformatted_20_Text">LP <text:s text:c="3"/>PP1 <text:s/>PV1 <text:s text:c="14"/>PP2 <text:s/>PV2 <text:s text:c="14"/>PP3 <text:s/>PV3</text:p>
            <text:p text:style-name="Preformatted_20_Text">0001 <text:s/>0001 hdisk0 <text:s text:c="11"/>0001 hdisk1</text:p>
            <text:p text:style-name="P53">#</text:p>
          </table:table-cell>
        </table:table-row>
      </table:table>
      <text:p text:style-name="Text_20_body">La liste des périphériques de démarrage affiche les disques hdisk0 et hdisk1 pour les modes normal et service : </text:p>
      <table:table table:name="Tableau65" table:style-name="Tableau65">
        <table:table-column table:style-name="Tableau65.A"/>
        <table:table-row>
          <table:table-cell table:style-name="Tableau65.A1" office:value-type="string">
            <text:p text:style-name="Preformatted_20_Text"># bootlist -om both</text:p>
            <text:p text:style-name="Preformatted_20_Text">hdisk0</text:p>
            <text:p text:style-name="Preformatted_20_Text">hdisk1</text:p>
            <text:p text:style-name="Preformatted_20_Text">hdisk0</text:p>
            <text:p text:style-name="Preformatted_20_Text">hdisk1</text:p>
            <text:p text:style-name="P53">#</text:p>
          </table:table-cell>
        </table:table-row>
      </table:table>
      <text:p text:style-name="Text_20_body"><text:a xlink:type="simple" xlink:href="http://www.linux-france.org/%7Emdecore/aix/memo-aix/memo-aix.html#top">Top</text:a><text:bookmark text:name="subsec8.2"/></text:p>
      <text:h text:style-name="Heading_20_3" text:outline-level="3">8.2. Mirroir du LV et création du système de fichiers</text:h>
      <text:list xml:id="list37347518" text:style-name="L18">
        <text:list-item>
          <text:p text:style-name="P40">Nom du Volume Groupe = datavg </text:p>
        </text:list-item>
        <text:list-item>
          <text:p text:style-name="P40">Disque principal = hdisk2 </text:p>
        </text:list-item>
        <text:list-item>
          <text:p text:style-name="P40">Disque mirroir = hdisk3 </text:p>
        </text:list-item>
        <text:list-item>
          <text:p text:style-name="P40">Granule d'allocation = 16 </text:p>
        </text:list-item>
        <text:list-item>
          <text:p text:style-name="P40">Volume Logique LV = hd32 </text:p>
        </text:list-item>
        <text:list-item>
          <text:p text:style-name="P40">Nombre de PP = 80 </text:p>
        </text:list-item>
        <text:list-item>
          <text:p text:style-name="P18">Point de Montage = /Data </text:p>
        </text:list-item>
      </text:list>
      <text:p text:style-name="Text_20_body">Création du VG datavg sur le disque hdisk2 : </text:p>
      <table:table table:name="Tableau66" table:style-name="Tableau66">
        <table:table-column table:style-name="Tableau66.A"/>
        <table:table-row>
          <table:table-cell table:style-name="Tableau66.A1" office:value-type="string">
            <text:p text:style-name="Preformatted_20_Text"># mkvg -y datavg hdisk2</text:p>
            <text:p text:style-name="Preformatted_20_Text">datavg</text:p>
            <text:p text:style-name="P53">#</text:p>
          </table:table-cell>
        </table:table-row>
      </table:table>
      <text:p text:style-name="Text_20_body">Rajout du disque hdisk3 dans le VG datavg : </text:p>
      <table:table table:name="Tableau67" table:style-name="Tableau67">
        <table:table-column table:style-name="Tableau67.A"/>
        <table:table-row>
          <table:table-cell table:style-name="Tableau67.A1" office:value-type="string">
            <text:p text:style-name="Preformatted_20_Text"># extendvg datavg hdisk3</text:p>
            <text:p text:style-name="P53">#</text:p>
          </table:table-cell>
        </table:table-row>
      </table:table>
      <text:p text:style-name="Text_20_body">Création du volume logique sur le disque principal : </text:p>
      <table:table table:name="Tableau68" table:style-name="Tableau68">
        <table:table-column table:style-name="Tableau68.A"/>
        <table:table-row>
          <table:table-cell table:style-name="Tableau68.A1" office:value-type="string">
            <text:p text:style-name="Preformatted_20_Text"># mklv -y hd32 datavg 80 hdisk2</text:p>
            <text:p text:style-name="Preformatted_20_Text">hd32</text:p>
            <text:p text:style-name="P53">#</text:p>
          </table:table-cell>
        </table:table-row>
      </table:table>
      <text:p text:style-name="Text_20_body">Création du mirroir sur le disque secondaire : </text:p>
      <table:table table:name="Tableau69" table:style-name="Tableau69">
        <table:table-column table:style-name="Tableau69.A"/>
        <table:table-row>
          <table:table-cell table:style-name="Tableau69.A1" office:value-type="string">
            <text:p text:style-name="Preformatted_20_Text"># mklvcopy hd32 2 hdisk3</text:p>
            <text:p text:style-name="P53">#</text:p>
          </table:table-cell>
        </table:table-row>
      </table:table>
      <text:p text:style-name="Text_20_body">Synchronisation du LV hd32 : </text:p>
      <table:table table:name="Tableau70" table:style-name="Tableau70">
        <table:table-column table:style-name="Tableau70.A"/>
        <table:table-row>
          <table:table-cell table:style-name="Tableau70.A1" office:value-type="string">
            <text:p text:style-name="Preformatted_20_Text"># syncvg -l hd32</text:p>
            <text:p text:style-name="P53">#</text:p>
          </table:table-cell>
        </table:table-row>
      </table:table>
      <text:p text:style-name="Text_20_body">Création du file système associé : </text:p>
      <table:table table:name="Tableau71" table:style-name="Tableau71">
        <table:table-column table:style-name="Tableau71.A"/>
        <table:table-row>
          <table:table-cell table:style-name="Tableau71.A1" office:value-type="string">
            <text:p text:style-name="Preformatted_20_Text"># crfs -v jfs -a bf=true -d hd32 -m /Data -A yes -p rw -t no -a nbpi=4096 -a ag= 16</text:p>
            <text:p text:style-name="Preformatted_20_Text">Selon les paramètres définis, la taille maximale du nouveau</text:p>
            <text:p text:style-name="Preformatted_20_Text">système de fichiers journalisé /Data est de 134217728 (blocs de 512 octets).</text:p>
            <text:p text:style-name="Preformatted_20_Text"/>
            <text:p text:style-name="Preformatted_20_Text">Taille du nouveau système de fichiers : 10485760</text:p>
            <text:p text:style-name="P53">#</text:p>
          </table:table-cell>
        </table:table-row>
      </table:table>
      <text:p text:style-name="Text_20_body">Montage du Fichier système : </text:p>
      <table:table table:name="Tableau72" table:style-name="Tableau72">
        <table:table-column table:style-name="Tableau72.A"/>
        <table:table-row>
          <table:table-cell table:style-name="Tableau72.A1" office:value-type="string">
            <text:p text:style-name="Preformatted_20_Text"># mount /Data</text:p>
            <text:p text:style-name="P53">#</text:p>
          </table:table-cell>
        </table:table-row>
      </table:table>
      <text:p text:style-name="Text_20_body"><text:a xlink:type="simple" xlink:href="http://www.linux-france.org/%7Emdecore/aix/memo-aix/memo-aix.html#top">Top</text:a><text:bookmark text:name="sec9"/></text:p>
      <text:h text:style-name="Heading_20_2" text:outline-level="2">9. Ajout d'un disque de secours (Hot Spare)</text:h>
      <text:p text:style-name="Text_20_body">Un disque de secours remplace un disque défaillant. Pour mettre en place le disque de secours hdisk3 dans le VG datavg, il faut : </text:p>
      <text:p text:style-name="Text_20_body">Ajouter un disque aux groupes de volumes qu'il doit protéger : </text:p>
      <table:table table:name="Tableau73" table:style-name="Tableau73">
        <table:table-column table:style-name="Tableau73.A"/>
        <table:table-row>
          <table:table-cell table:style-name="Tableau73.A1" office:value-type="string">
            <text:p text:style-name="Preformatted_20_Text"># extendvg -f datavg hdisk4</text:p>
            <text:p text:style-name="P53">#</text:p>
          </table:table-cell>
        </table:table-row>
      </table:table>
      <text:p text:style-name="Text_20_body">Convertir les disques sélectionnés en unités de secours pour marquer le disque dur hdisk1 comme unité de secours : </text:p>
      <table:table table:name="Tableau74" table:style-name="Tableau74">
        <table:table-column table:style-name="Tableau74.A"/>
        <table:table-row>
          <table:table-cell table:style-name="Tableau74.A1" office:value-type="string">
            <text:p text:style-name="Preformatted_20_Text"># chpv -hy hdisk4</text:p>
            <text:p text:style-name="P53">#</text:p>
          </table:table-cell>
        </table:table-row>
      </table:table>
      <text:p text:style-name="Text_20_body">Définir une stratégie de migration automatique qui utilise la plus petite unité de secours suffisamment grande pour remplacer le disque défaillant (option -hy, voir aussi -hY dans le man) et synchronise automatiquement les partitions périmées (option -sy) : </text:p>
      <table:table table:name="Tableau75" table:style-name="Tableau75">
        <table:table-column table:style-name="Tableau75.A"/>
        <table:table-row>
          <table:table-cell table:style-name="Tableau75.A1" office:value-type="string">
            <text:p text:style-name="Preformatted_20_Text"># chvg -hy -sy datavg</text:p>
            <text:p text:style-name="P53">#</text:p>
          </table:table-cell>
        </table:table-row>
      </table:table>
      <text:p text:style-name="Text_20_body"><text:a xlink:type="simple" xlink:href="http://www.linux-france.org/%7Emdecore/aix/memo-aix/memo-aix.html#top">Top</text:a><text:bookmark text:name="sec10"/></text:p>
      <text:h text:style-name="Heading_20_2" text:outline-level="2">10. Système de fichiers</text:h>
      <text:p text:style-name="Text_20_body"><text:a xlink:type="simple" xlink:href="http://www.linux-france.org/%7Emdecore/aix/memo-aix/memo-aix.html#top">Top</text:a><text:bookmark text:name="subsec10.1"/></text:p>
      <text:h text:style-name="Heading_20_3" text:outline-level="3">10.1. Rappels</text:h>
      <text:p text:style-name="Text_20_body">Un système de fichiers permet d'accéder aux fichiers qui sont stockés sur le disque (disque dur, disquette, cdrom, ...). </text:p>
      <text:p text:style-name="Text_20_body">Sous UNIX en général le système de fichiers est composé ainsi : </text:p>
      <table:table table:name="Tableau76" table:style-name="Tableau76">
        <table:table-column table:style-name="Tableau76.A"/>
        <table:table-row>
          <table:table-cell table:style-name="Tableau76.A1" office:value-type="string">
            <text:p text:style-name="Preformatted_20_Text">+---+----+----+----+----+</text:p>
            <text:p text:style-name="Preformatted_20_Text">| S | I1 | I2 | I3 | .. |</text:p>
            <text:p text:style-name="Preformatted_20_Text">+---+----+----+----+----+</text:p>
            <text:p text:style-name="Preformatted_20_Text"><text:s text:c="7"/>| <text:s text:c="3"/>| <text:s text:c="3"/>|</text:p>
            <text:p text:style-name="Preformatted_20_Text"><text:s text:c="7"/>| <text:s text:c="3"/>| <text:s text:c="3"/>|</text:p>
            <text:p text:style-name="Preformatted_20_Text"><text:s text:c="3"/>+---+ <text:s text:c="3"/>| <text:s text:c="3"/>+---+</text:p>
            <text:p text:style-name="Preformatted_20_Text"><text:s text:c="3"/>| <text:s text:c="7"/>| <text:s text:c="7"/>|</text:p>
            <text:p text:style-name="Preformatted_20_Text"><text:s text:c="3"/>v <text:s text:c="7"/>v <text:s text:c="7"/>v</text:p>
            <text:p text:style-name="Preformatted_20_Text">+----+ <text:s text:c="2"/>+----+ <text:s text:c="2"/>+----+</text:p>
            <text:p text:style-name="Preformatted_20_Text">| <text:s text:c="3"/>| <text:s text:c="2"/>| <text:s text:c="3"/>| <text:s text:c="2"/>| <text:s text:c="3"/>|</text:p>
            <text:p text:style-name="Preformatted_20_Text">| <text:s text:c="3"/>| <text:s text:c="2"/>| <text:s text:c="3"/>| <text:s text:c="2"/>| <text:s text:c="3"/>|</text:p>
            <text:p text:style-name="Preformatted_20_Text">| B1 | <text:s text:c="2"/>| B2 | <text:s text:c="2"/>| B3 |</text:p>
            <text:p text:style-name="Preformatted_20_Text">| <text:s text:c="3"/>| <text:s text:c="2"/>| <text:s text:c="3"/>| <text:s text:c="2"/>| <text:s text:c="3"/>|</text:p>
            <text:p text:style-name="Preformatted_20_Text">| <text:s text:c="3"/>| <text:s text:c="2"/>| <text:s text:c="3"/>| <text:s text:c="2"/>| <text:s text:c="3"/>|</text:p>
            <text:p text:style-name="Preformatted_20_Text">| <text:s text:c="3"/>| <text:s text:c="2"/>| <text:s text:c="3"/>| <text:s text:c="2"/>| <text:s text:c="3"/>|</text:p>
            <text:p text:style-name="P53">+----+ <text:s text:c="2"/>+----+ <text:s text:c="2"/>+----+</text:p>
          </table:table-cell>
        </table:table-row>
      </table:table>
      <text:list xml:id="list37332019" text:style-name="L19">
        <text:list-item>
          <text:p text:style-name="P41">S : Super bloc, contient la taille et le type de système de fichiers, la liste des espaces libres, la taille des fragments, nombre de blocs par inode, ... Comme ce bloc est indispensable pour pouvoir utiliser le système de fichiers (et donc accéder aux fichiers), une copie de ce bloc est faite (au bloc 31 pour AIX). </text:p>
        </text:list-item>
        <text:list-item>
          <text:p text:style-name="P41">I1 : Inode 1. Contient des infos sur un fichier (taille, droits d'accès, dates de dernier accès, bref toute les infos accessibles par les commandes ls ou find). Contient également un pointeur vers le bloc de données (B1 pour l'inode 1). </text:p>
        </text:list-item>
        <text:list-item>
          <text:p text:style-name="P19">B1 : bloc 1, contenant les données d'un fichier </text:p>
        </text:list-item>
      </text:list>
      <text:p text:style-name="Text_20_body">Le système de fichiers étant créé sur un LV, il doit avoir comme taille un multiple de la taille d'une LP du LV. Les blocs de données sont formés de blocs logiques de 4 Ko. Si il y a beaucoup de fichiers de taille inférieurs à 4 Ko (ou de répertoires et de liens), on peut fragmenter un bloc logique en blocs de 0,5, 1, 2 ou 4 Ko (par défaut) pour que un bloc logique soit utilisé par plusieurs fichiers. Cela permet de gagner de la place sur le disque. La même taille de fragment est appliquée pour tout le système de fichiers. Mais ça donne plus de blocs à gérer d'où une surcharge système. A utiliser avec précaution, donc. </text:p>
      <text:p text:style-name="Text_20_body"><text:a xlink:type="simple" xlink:href="http://www.linux-france.org/%7Emdecore/aix/memo-aix/memo-aix.html#top">Top</text:a><text:bookmark text:name="subsec10.2"/></text:p>
      <text:h text:style-name="Heading_20_3" text:outline-level="3">10.2. Affichage des FS</text:h>
      <text:p text:style-name="Text_20_body">Affichage de tous les systèmes de fichiers créés (affichage du fichier /etc/filesystems sous forme plus lisible, plus CDROM et NFS) : </text:p>
      <table:table table:name="Tableau77" table:style-name="Tableau77">
        <table:table-column table:style-name="Tableau77.A"/>
        <table:table-row>
          <table:table-cell table:style-name="Tableau77.A1" office:value-type="string">
            <text:p text:style-name="Preformatted_20_Text"># lsfs</text:p>
            <text:p text:style-name="Preformatted_20_Text">Name <text:s text:c="11"/>Nodename <text:s text:c="2"/>Mount Pt <text:s text:c="14"/>VFS <text:s text:c="2"/>Size <text:s text:c="3"/>Options <text:s text:c="3"/>Auto Accounting</text:p>
            <text:p text:style-name="Preformatted_20_Text">/dev/hd4 <text:s text:c="7"/>-- <text:s text:c="8"/>/ <text:s text:c="21"/>jfs <text:s text:c="2"/>65536 <text:s text:c="2"/>-- <text:s text:c="8"/>yes <text:s/>no </text:p>
            <text:p text:style-name="Preformatted_20_Text">/dev/hd1 <text:s text:c="7"/>-- <text:s text:c="8"/>/home <text:s text:c="17"/>jfs <text:s text:c="2"/>65536 <text:s text:c="2"/>-- <text:s text:c="8"/>yes <text:s/>no </text:p>
            <text:p text:style-name="Preformatted_20_Text">/dev/hd2 <text:s text:c="7"/>-- <text:s text:c="8"/>/usr <text:s text:c="18"/>jfs <text:s text:c="2"/>2097152 -- <text:s text:c="8"/>yes <text:s/>no </text:p>
            <text:p text:style-name="Preformatted_20_Text">/dev/hd9var <text:s text:c="4"/>-- <text:s text:c="8"/>/var <text:s text:c="18"/>jfs <text:s text:c="2"/>65536 <text:s text:c="2"/>-- <text:s text:c="8"/>yes <text:s/>no </text:p>
            <text:p text:style-name="Preformatted_20_Text">/dev/hd3 <text:s text:c="7"/>-- <text:s text:c="8"/>/tmp <text:s text:c="18"/>jfs <text:s text:c="2"/>65536 <text:s text:c="2"/>-- <text:s text:c="8"/>yes <text:s/>no </text:p>
            <text:p text:style-name="Preformatted_20_Text">/proc <text:s text:c="10"/>-- <text:s text:c="8"/>/proc <text:s text:c="17"/>procfs -- <text:s text:c="5"/>-- <text:s text:c="8"/>yes <text:s/>no </text:p>
            <text:p text:style-name="Preformatted_20_Text">/dev/hd10opt <text:s text:c="3"/>-- <text:s text:c="8"/>/opt <text:s text:c="18"/>jfs <text:s text:c="2"/>458752 <text:s/>-- <text:s text:c="8"/>yes <text:s/>no </text:p>
            <text:p text:style-name="Preformatted_20_Text">/dev/lv00 <text:s text:c="6"/>-- <text:s text:c="8"/>/mnt1 <text:s text:c="17"/>jfs <text:s text:c="2"/>26083328 rw <text:s text:c="8"/>yes <text:s/>no </text:p>
            <text:p text:style-name="Preformatted_20_Text">/dev/lv01 <text:s text:c="6"/>-- <text:s text:c="8"/>/mnt1/dump <text:s text:c="12"/>jfs <text:s text:c="2"/>26214400 rw <text:s text:c="8"/>yes <text:s/>no </text:p>
            <text:p text:style-name="P53">#</text:p>
          </table:table-cell>
        </table:table-row>
      </table:table>
      <text:p text:style-name="Text_20_body">Affichage de tous les systèmes de fichiers montés : </text:p>
      <table:table table:name="Tableau78" table:style-name="Tableau78">
        <table:table-column table:style-name="Tableau78.A"/>
        <table:table-row>
          <table:table-cell table:style-name="Tableau78.A1" office:value-type="string">
            <text:p text:style-name="Preformatted_20_Text"># mount</text:p>
            <text:p text:style-name="Preformatted_20_Text"><text:s text:c="2"/>node <text:s text:c="6"/>mounted <text:s text:c="7"/>mounted over <text:s text:c="3"/>vfs <text:s text:c="6"/>date <text:s text:c="7"/>options <text:s text:c="5"/></text:p>
            <text:p text:style-name="Preformatted_20_Text">-------- --------------- <text:s/>--------------- <text:s/>------ ------------ --------------- </text:p>
            <text:p text:style-name="Preformatted_20_Text"><text:s text:c="9"/>/dev/hd4 <text:s text:c="8"/>/ <text:s text:c="15"/>jfs <text:s text:c="3"/>Mar 28 08:57 rw,log=/dev/hd8 </text:p>
            <text:p text:style-name="Preformatted_20_Text"><text:s text:c="9"/>/dev/hd2 <text:s text:c="8"/>/usr <text:s text:c="12"/>jfs <text:s text:c="3"/>Mar 28 08:57 rw,log=/dev/hd8 </text:p>
            <text:p text:style-name="Preformatted_20_Text"><text:s text:c="9"/>/dev/hd9var <text:s text:c="5"/>/var <text:s text:c="12"/>jfs <text:s text:c="3"/>Mar 28 08:57 rw,log=/dev/hd8 </text:p>
            <text:p text:style-name="Preformatted_20_Text"><text:s text:c="9"/>/dev/hd3 <text:s text:c="8"/>/tmp <text:s text:c="12"/>jfs <text:s text:c="3"/>Mar 28 08:57 rw,log=/dev/hd8 </text:p>
            <text:p text:style-name="Preformatted_20_Text"><text:s text:c="9"/>/dev/hd1 <text:s text:c="8"/>/home <text:s text:c="11"/>jfs <text:s text:c="3"/>Mar 28 08:58 rw,log=/dev/hd8 </text:p>
            <text:p text:style-name="Preformatted_20_Text"><text:s text:c="9"/>/proc <text:s text:c="11"/>/proc <text:s text:c="11"/>procfs Mar 28 08:58 rw <text:s text:c="13"/></text:p>
            <text:p text:style-name="Preformatted_20_Text"><text:s text:c="9"/>/dev/hd10opt <text:s text:c="4"/>/opt <text:s text:c="12"/>jfs <text:s text:c="3"/>Mar 28 08:58 rw,log=/dev/hd8 </text:p>
            <text:p text:style-name="Preformatted_20_Text"><text:s text:c="9"/>/dev/lv00 <text:s text:c="7"/>/mnt1 <text:s text:c="11"/>jfs <text:s text:c="3"/>Mar 28 08:58 rw,log=/dev/hd8 </text:p>
            <text:p text:style-name="Preformatted_20_Text"><text:s text:c="9"/>/dev/lv01 <text:s text:c="7"/>/mnt1/dump <text:s text:c="6"/>jfs <text:s text:c="3"/>Mar 28 15:23 rw,log=/dev/loglv00</text:p>
            <text:p text:style-name="P53">#</text:p>
          </table:table-cell>
        </table:table-row>
      </table:table>
      <text:p text:style-name="Text_20_body">Affichage de l'espace disque disponible : </text:p>
      <table:table table:name="Tableau79" table:style-name="Tableau79">
        <table:table-column table:style-name="Tableau79.A"/>
        <table:table-row>
          <table:table-cell table:style-name="Tableau79.A1" office:value-type="string">
            <text:p text:style-name="Preformatted_20_Text"># df</text:p>
            <text:p text:style-name="Preformatted_20_Text">Système de fichiers Blocs 512 octets <text:s text:c="4"/>Libre %Util <text:s text:c="3"/>Iutil %Iutil <text:s/>Monté sur</text:p>
            <text:p text:style-name="Preformatted_20_Text">/dev/hd4 <text:s text:c="21"/>131072 <text:s text:c="3"/>107464 <text:s text:c="2"/>19% <text:s text:c="4"/>1533 <text:s text:c="3"/>12% /</text:p>
            <text:p text:style-name="Preformatted_20_Text">/dev/hd2 <text:s text:c="20"/>1835008 <text:s text:c="3"/>595984 <text:s text:c="2"/>68% <text:s text:c="3"/>21811 <text:s text:c="3"/>25% /usr</text:p>
            <text:p text:style-name="Preformatted_20_Text">/dev/hd9var <text:s text:c="18"/>131072 <text:s text:c="3"/>102400 <text:s text:c="2"/>22% <text:s text:c="5"/>589 <text:s text:c="4"/>5% /var</text:p>
            <text:p text:style-name="Preformatted_20_Text">/dev/hd3 <text:s text:c="20"/>1048576 <text:s text:c="3"/>320552 <text:s text:c="2"/>70% <text:s text:c="5"/>249 <text:s text:c="4"/>1% /tmp</text:p>
            <text:p text:style-name="Preformatted_20_Text">/dev/hd1 <text:s text:c="20"/>1048576 <text:s text:c="3"/>383160 <text:s text:c="2"/>64% <text:s text:c="5"/>171 <text:s text:c="4"/>1% /home</text:p>
            <text:p text:style-name="Preformatted_20_Text">/proc <text:s text:c="29"/>- <text:s text:c="8"/>- <text:s text:c="3"/>- <text:s text:c="8"/>- <text:s text:c="4"/>- <text:s/>/proc</text:p>
            <text:p text:style-name="Preformatted_20_Text">/dev/hd10opt <text:s text:c="17"/>131072 <text:s text:c="4"/>60288 <text:s text:c="2"/>55% <text:s text:c="4"/>1303 <text:s text:c="3"/>16% /opt</text:p>
            <text:p text:style-name="P53">#</text:p>
          </table:table-cell>
        </table:table-row>
      </table:table>
      <text:p text:style-name="Text_20_body">Affichage de l'espace disque disponible en ko : </text:p>
      <table:table table:name="Tableau80" table:style-name="Tableau80">
        <table:table-column table:style-name="Tableau80.A"/>
        <table:table-row>
          <table:table-cell table:style-name="Tableau80.A1" office:value-type="string">
            <text:p text:style-name="Preformatted_20_Text"># df -k</text:p>
            <text:p text:style-name="Preformatted_20_Text">Système de fichiers Blocs 1024 octets <text:s text:c="4"/>Libre %Util <text:s text:c="3"/>Iutil %Iutil <text:s/>Monté sur</text:p>
            <text:p text:style-name="Preformatted_20_Text">/dev/hd4 <text:s text:c="23"/>65536 <text:s text:c="4"/>53732 <text:s text:c="2"/>19% <text:s text:c="4"/>1533 <text:s text:c="3"/>12% /</text:p>
            <text:p text:style-name="Preformatted_20_Text">/dev/hd2 <text:s text:c="22"/>917504 <text:s text:c="3"/>297992 <text:s text:c="2"/>68% <text:s text:c="3"/>21811 <text:s text:c="3"/>25% /usr</text:p>
            <text:p text:style-name="Preformatted_20_Text">/dev/hd9var <text:s text:c="20"/>65536 <text:s text:c="4"/>51200 <text:s text:c="2"/>22% <text:s text:c="5"/>589 <text:s text:c="4"/>5% /var</text:p>
            <text:p text:style-name="Preformatted_20_Text">/dev/hd3 <text:s text:c="22"/>524288 <text:s text:c="3"/>160276 <text:s text:c="2"/>70% <text:s text:c="5"/>249 <text:s text:c="4"/>1% /tmp</text:p>
            <text:p text:style-name="Preformatted_20_Text">/dev/hd1 <text:s text:c="22"/>524288 <text:s text:c="3"/>191580 <text:s text:c="2"/>64% <text:s text:c="5"/>171 <text:s text:c="4"/>1% /home</text:p>
            <text:p text:style-name="Preformatted_20_Text">/proc <text:s text:c="30"/>- <text:s text:c="8"/>- <text:s text:c="3"/>- <text:s text:c="8"/>- <text:s text:c="4"/>- <text:s/>/proc</text:p>
            <text:p text:style-name="Preformatted_20_Text">/dev/hd10opt <text:s text:c="19"/>65536 <text:s text:c="4"/>30144 <text:s text:c="2"/>55% <text:s text:c="4"/>1303 <text:s text:c="3"/>16% /opt</text:p>
            <text:p text:style-name="P53">#</text:p>
          </table:table-cell>
        </table:table-row>
      </table:table>
      <text:p text:style-name="Text_20_body"><text:a xlink:type="simple" xlink:href="http://www.linux-france.org/%7Emdecore/aix/memo-aix/memo-aix.html#top">Top</text:a><text:bookmark text:name="subsec10.3"/></text:p>
      <text:h text:style-name="Heading_20_3" text:outline-level="3">10.3. Création d'un FS</text:h>
      <text:list xml:id="list37340258" text:style-name="L20">
        <text:list-item>
          <text:p text:style-name="P42">Création d'un système de fichiers : mkfs </text:p>
        </text:list-item>
        <text:list-item>
          <text:p text:style-name="P20">Création d'un système de fichiers + création éventuelle du LV (mklv) + mise à jour de la base ODM et du fichier /etc/filesystems : crfs </text:p>
        </text:list-item>
      </text:list>
      <text:p text:style-name="Text_20_body">Création d'un système de fichiers sur le VG logvg (-g logvg) de taille 32768 blocs de 512 octets - 16M ou 3G sont également possibles ? - (-a size=32768), monté dans le répertoire /Log (-m /Log), d'une taille de fragmentation de 512 octets (-a frag=512) et avec 1024 octets par inode - ce nombre est inversement proportionnel au nombre d'inodes sur le système de fichiers (-a nbpi=1024) : </text:p>
      <table:table table:name="Tableau81" table:style-name="Tableau81">
        <table:table-column table:style-name="Tableau81.A"/>
        <table:table-row>
          <table:table-cell table:style-name="Tableau81.A1" office:value-type="string">
            <text:p text:style-name="Preformatted_20_Text"># crfs -v jfs -g logvg -m /Log -a size=32768 -a frag=512 -a nbpi=1024</text:p>
            <text:p text:style-name="Preformatted_20_Text">Selon les paramètres définis, la taille maximale du nouveau</text:p>
            <text:p text:style-name="Preformatted_20_Text">système de fichiers journalisé /Log est de 33554432 (blocs de 512 octets).</text:p>
            <text:p text:style-name="Preformatted_20_Text"/>
            <text:p text:style-name="Preformatted_20_Text">Taille du nouveau système de fichiers : 131072</text:p>
            <text:p text:style-name="P53">#</text:p>
          </table:table-cell>
        </table:table-row>
      </table:table>
      <text:p text:style-name="Text_20_body">Autres options : </text:p>
      <text:list xml:id="list37336934" text:style-name="L21">
        <text:list-item>
          <text:p text:style-name="P43">-d monlv : sur quel LV (doit exister) </text:p>
        </text:list-item>
        <text:list-item>
          <text:p text:style-name="P43">-A yes : montage au démarrage du système </text:p>
        </text:list-item>
        <text:list-item>
          <text:p text:style-name="P21">-p rw : met les permissions lecture / écriture </text:p>
        </text:list-item>
      </text:list>
      <text:p text:style-name="Text_20_body">Pouur les répertoires utilisateurs (/home), ne pas oublier : </text:p>
      <text:list xml:id="list37349919" text:style-name="L22">
        <text:list-item>
          <text:p text:style-name="P44">chown </text:p>
        </text:list-item>
        <text:list-item>
          <text:p text:style-name="P22">cp -r /usr/samples </text:p>
        </text:list-item>
      </text:list>
      <text:p text:style-name="Text_20_body"><text:a xlink:type="simple" xlink:href="http://www.linux-france.org/%7Emdecore/aix/memo-aix/memo-aix.html#top">Top</text:a><text:bookmark text:name="subsec10.4"/></text:p>
      <text:h text:style-name="Heading_20_3" text:outline-level="3">10.4. Modifications d'un FS</text:h>
      <text:p text:style-name="Text_20_body">Agrandir le système de fichiers monté dans /Log de 16 Mo (si pas de M la taille est d'une PP) : </text:p>
      <table:table table:name="Tableau82" table:style-name="Tableau82">
        <table:table-column table:style-name="Tableau82.A"/>
        <table:table-row>
          <table:table-cell table:style-name="Tableau82.A1" office:value-type="string">
            <text:p text:style-name="Preformatted_20_Text"># chfs -a size=+16M /Log</text:p>
            <text:p text:style-name="Preformatted_20_Text">La taille du système de fichiers a été portée à 262144</text:p>
            <text:p text:style-name="P53">#</text:p>
          </table:table-cell>
        </table:table-row>
      </table:table>
      <text:p text:style-name="Text_20_body">Changer le point de montage de /Log en /LogTrace : </text:p>
      <table:table table:name="Tableau83" table:style-name="Tableau83">
        <table:table-column table:style-name="Tableau83.A"/>
        <table:table-row>
          <table:table-cell table:style-name="Tableau83.A1" office:value-type="string">
            <text:p text:style-name="Preformatted_20_Text"># chfs -m /LogTrace /Log</text:p>
            <text:p text:style-name="P53">#</text:p>
          </table:table-cell>
        </table:table-row>
      </table:table>
      <text:p text:style-name="Text_20_body"><text:a xlink:type="simple" xlink:href="http://www.linux-france.org/%7Emdecore/aix/memo-aix/memo-aix.html#top">Top</text:a><text:bookmark text:name="subsec10.5"/></text:p>
      <text:h text:style-name="Heading_20_3" text:outline-level="3">10.5. Supprimer un FS</text:h>
      <text:p text:style-name="Text_20_body">Supprimer un système de fichiers (+ effacement de la base ODM et du fichier /etc/filesystems) avec le point de montage (-r) : </text:p>
      <table:table table:name="Tableau84" table:style-name="Tableau84">
        <table:table-column table:style-name="Tableau84.A"/>
        <table:table-row>
          <table:table-cell table:style-name="Tableau84.A1" office:value-type="string">
            <text:p text:style-name="Preformatted_20_Text"># fuser -k /Data</text:p>
            <text:p text:style-name="Preformatted_20_Text">/Data:</text:p>
            <text:p text:style-name="Preformatted_20_Text"># umount /Data</text:p>
            <text:p text:style-name="Preformatted_20_Text"># rmfs -r /Data</text:p>
            <text:p text:style-name="Preformatted_20_Text">rmlv : le volume logique hd32 est supprimé.</text:p>
            <text:p text:style-name="P53">#</text:p>
          </table:table-cell>
        </table:table-row>
      </table:table>
      <text:p text:style-name="Text_20_body"><text:a xlink:type="simple" xlink:href="http://www.linux-france.org/%7Emdecore/aix/memo-aix/memo-aix.html#top">Top</text:a><text:bookmark text:name="subsec10.6"/></text:p>
      <text:h text:style-name="Heading_20_3" text:outline-level="3">10.6. Ménage dans les systèmes de fichiers</text:h>
      <text:p text:style-name="Text_20_body">Il y a quelque fichiers dont la taille augmente tout le temps, et qu'il faut vider de temps en temps : </text:p>
      <text:list xml:id="list37346137" text:style-name="L23">
        <text:list-item>
          <text:p text:style-name="P45">/var/adm/wtmp, /etc/security/failedlogin : who -a /var/adm/wtmp &gt; /SVG/wtmp.log ; cat /dev/null &gt; /var/adm/wtmp </text:p>
        </text:list-item>
        <text:list-item>
          <text:p text:style-name="P45">/var/spool/*/* (cron, mail, impressions, ...) : stopsrc -s qdaemon ; rm -f /var/spool/lpd/qdir/* ; rm -f /var/spool/lpd/stat/* ; rm -f /var/spool/qdaemon/* ; startsrc -s qdaemon </text:p>
        </text:list-item>
        <text:list-item>
          <text:p text:style-name="P45">/var/adm/sulog </text:p>
        </text:list-item>
        <text:list-item>
          <text:p text:style-name="P45">$HOME/smit.log, $HOME/smit.script, $HOME/websm.log, $HOME/websm.script </text:p>
        </text:list-item>
        <text:list-item>
          <text:p text:style-name="P45">/usr/HTTPServer/logs : logs Apache </text:p>
        </text:list-item>
        <text:list-item>
          <text:p text:style-name="P23">/var/adm/sa : logs sar (rotation circulaire sur un mois), compression possible dans la crontab de root : </text:p>
        </text:list-item>
      </text:list>
      <table:table table:name="Tableau85" table:style-name="Tableau85">
        <table:table-column table:style-name="Tableau85.A"/>
        <table:table-row>
          <table:table-cell table:style-name="Tableau85.A1" office:value-type="string">
            <text:p text:style-name="P53">10 6 * * * find /var/adm/sa -type f ! -name "*.gz" -mtime +1 -exec gzip -f {} \\;</text:p>
          </table:table-cell>
        </table:table-row>
      </table:table>
      <text:p text:style-name="Text_20_body">Ménage dans le système de fichiers : /usr/sbin/skulker. Script shell à éditer pour personnaliser. </text:p>
      <text:p text:style-name="Text_20_body"><text:a xlink:type="simple" xlink:href="http://www.linux-france.org/%7Emdecore/aix/memo-aix/memo-aix.html#top">Top</text:a><text:bookmark text:name="subsec10.7"/></text:p>
      <text:h text:style-name="Heading_20_3" text:outline-level="3">10.7. Défragmentation d'un FS</text:h>
      <text:p text:style-name="Text_20_body">Défragmenter le système de fichiers monté dans /Log : </text:p>
      <table:table table:name="Tableau86" table:style-name="Tableau86">
        <table:table-column table:style-name="Tableau86.A"/>
        <table:table-row>
          <table:table-cell table:style-name="Tableau86.A1" office:value-type="string">
            <text:p text:style-name="Preformatted_20_Text"># defragfs /Log</text:p>
            <text:p text:style-name="Preformatted_20_Text">statistiques avant exécution de defragfs :</text:p>
            <text:p text:style-name="Preformatted_20_Text">nombre de fragments libres : 114502</text:p>
            <text:p text:style-name="Preformatted_20_Text">nombre de segments alloués : 16570</text:p>
            <text:p text:style-name="Preformatted_20_Text">nombre d'espaces libres inférieurs à un bloc : 0</text:p>
            <text:p text:style-name="Preformatted_20_Text">nombre de fragments libres dans de petits espaces libres : 0</text:p>
            <text:p text:style-name="Preformatted_20_Text"/>
            <text:p text:style-name="Preformatted_20_Text">statistiques après exécution de defragfs :</text:p>
            <text:p text:style-name="Preformatted_20_Text">nombre d'espaces libres inférieurs à un bloc : 0</text:p>
            <text:p text:style-name="Preformatted_20_Text">nombre de fragments libres dans de petits espaces libres : 0</text:p>
            <text:p text:style-name="Preformatted_20_Text"/>
            <text:p text:style-name="Preformatted_20_Text">autres statistiques :</text:p>
            <text:p text:style-name="Preformatted_20_Text">nombre de fragments déplacés : 0</text:p>
            <text:p text:style-name="Preformatted_20_Text">nombre de blocs logiques déplacés : 0</text:p>
            <text:p text:style-name="Preformatted_20_Text">nombre de tentatives d'attribution : 0</text:p>
            <text:p text:style-name="Preformatted_20_Text">nombre d'équivalences : 0</text:p>
            <text:p text:style-name="P53">#</text:p>
          </table:table-cell>
        </table:table-row>
      </table:table>
      <text:p text:style-name="Text_20_body">Afficher l'état en cours de la fragmentation du système de fichiers : </text:p>
      <table:table table:name="Tableau87" table:style-name="Tableau87">
        <table:table-column table:style-name="Tableau87.A"/>
        <table:table-row>
          <table:table-cell table:style-name="Tableau87.A1" office:value-type="string">
            <text:p text:style-name="Preformatted_20_Text"># defragfs -q /usr</text:p>
            <text:p text:style-name="Preformatted_20_Text">statistics before running defragfs:</text:p>
            <text:p text:style-name="Preformatted_20_Text">number of free fragments 57106</text:p>
            <text:p text:style-name="Preformatted_20_Text">number of allocated fragments 205038</text:p>
            <text:p text:style-name="Preformatted_20_Text">number of free spaces shorter than a block 0</text:p>
            <text:p text:style-name="Preformatted_20_Text">number of free fragments in short free spaces 0</text:p>
            <text:p text:style-name="P53">#</text:p>
          </table:table-cell>
        </table:table-row>
      </table:table>
      <text:p text:style-name="Text_20_body">Afficher un rapport sur la fragmentation du système de fichiers monté dans /Data : </text:p>
      <table:table table:name="Tableau88" table:style-name="Tableau88">
        <table:table-column table:style-name="Tableau88.A"/>
        <table:table-row>
          <table:table-cell table:style-name="Tableau88.A1" office:value-type="string">
            <text:p text:style-name="Preformatted_20_Text"># defragfs -r /usr</text:p>
            <text:p text:style-name="Preformatted_20_Text">statistics before running defragfs:</text:p>
            <text:p text:style-name="Preformatted_20_Text">number of free fragments 57106</text:p>
            <text:p text:style-name="Preformatted_20_Text">number of allocated fragments 205038</text:p>
            <text:p text:style-name="Preformatted_20_Text">number of free spaces shorter than a block 0</text:p>
            <text:p text:style-name="Preformatted_20_Text">number of free fragments in short free spaces 0</text:p>
            <text:p text:style-name="Preformatted_20_Text"/>
            <text:p text:style-name="Preformatted_20_Text">statistics after running defragfs:</text:p>
            <text:p text:style-name="Preformatted_20_Text">number of free spaces shorter than a block 0</text:p>
            <text:p text:style-name="Preformatted_20_Text">number of free fragments in short free spaces 0</text:p>
            <text:p text:style-name="Preformatted_20_Text"/>
            <text:p text:style-name="Preformatted_20_Text">other statistics:</text:p>
            <text:p text:style-name="Preformatted_20_Text">number of fragments moved 276</text:p>
            <text:p text:style-name="Preformatted_20_Text">number of logical blocks moved 276</text:p>
            <text:p text:style-name="Preformatted_20_Text">number of allocation attempts 182</text:p>
            <text:p text:style-name="Preformatted_20_Text">number of exact matches 137</text:p>
            <text:p text:style-name="P53">#</text:p>
          </table:table-cell>
        </table:table-row>
      </table:table>
      <text:p text:style-name="Text_20_body">Vérification due tous les systèmes de fichiers dont l'entrée du fichiers /etc/filesystems contient l'option check=true : </text:p>
      <table:table table:name="Tableau89" table:style-name="Tableau89">
        <table:table-column table:style-name="Tableau89.A"/>
        <table:table-row>
          <table:table-cell table:style-name="Tableau89.A1" office:value-type="string">
            <text:p text:style-name="Preformatted_20_Text"># fsck</text:p>
            <text:p text:style-name="Preformatted_20_Text"/>
            <text:p text:style-name="Preformatted_20_Text">****************</text:p>
            <text:p text:style-name="Preformatted_20_Text">The current volume is: /dev/hd1</text:p>
            <text:p text:style-name="Preformatted_20_Text">File system is currently mounted.</text:p>
            <text:p text:style-name="Preformatted_20_Text">fsck: Performing read-only processing does not produce dependable results.</text:p>
            <text:p text:style-name="Preformatted_20_Text">**Phase 1 - Check Blocks, Files/Directories, and Directory Entries</text:p>
            <text:p text:style-name="Preformatted_20_Text">**Phase 2 - Count links</text:p>
            <text:p text:style-name="Preformatted_20_Text">**Phase 3 - Duplicate Block Rescan and Directory Connectedness</text:p>
            <text:p text:style-name="Preformatted_20_Text">Inodes not connected to the root directory</text:p>
            <text:p text:style-name="Preformatted_20_Text"><text:s text:c="9"/>tree have been detected.</text:p>
            <text:p text:style-name="Preformatted_20_Text">**Phase 4 - Report Problems</text:p>
            <text:p text:style-name="Preformatted_20_Text">**Phase 7 - Verify File/Directory Allocation Maps</text:p>
            <text:p text:style-name="Preformatted_20_Text">Errors detected in the file system inode allocation</text:p>
            <text:p text:style-name="Preformatted_20_Text"><text:s text:c="9"/>map control information.</text:p>
            <text:p text:style-name="Preformatted_20_Text">Errors detected in the file system inode allocation map.</text:p>
            <text:p text:style-name="Preformatted_20_Text">**Phase 8 - Verify Disk Allocation Maps</text:p>
            <text:p text:style-name="Preformatted_20_Text">Incorrect data detected in disk allocation structures.</text:p>
            <text:p text:style-name="Preformatted_20_Text">Incorrect data detected in disk allocation control structures.</text:p>
            <text:p text:style-name="Preformatted_20_Text"><text:s text:c="3"/>524288 kilobytes total disk space.</text:p>
            <text:p text:style-name="Preformatted_20_Text"><text:s text:c="7"/>46 kilobytes in 29 directories.</text:p>
            <text:p text:style-name="Preformatted_20_Text"><text:s text:c="3"/>332186 kilobytes in 140 user files.</text:p>
            <text:p text:style-name="Preformatted_20_Text">191580 kilobytes are available for use.</text:p>
            <text:p text:style-name="Preformatted_20_Text">fsck: Performing read-only processing does not produce dependable results.</text:p>
            <text:p text:style-name="Preformatted_20_Text">File system is dirty.</text:p>
            <text:p text:style-name="Preformatted_20_Text">File system is dirty but is marked clean. <text:s/>In its present state,</text:p>
            <text:p text:style-name="Preformatted_20_Text"><text:s text:c="9"/>the results of accessing /dev/hd1 (except by this command) are undefined.</text:p>
            <text:p text:style-name="Preformatted_20_Text"/>
            <text:p text:style-name="Preformatted_20_Text">****************</text:p>
            <text:p text:style-name="Preformatted_20_Text">The current volume is: /dev/hd10opt</text:p>
            <text:p text:style-name="Preformatted_20_Text">File system is currently mounted.</text:p>
            <text:p text:style-name="Preformatted_20_Text">fsck: Performing read-only processing does not produce dependable results.</text:p>
            <text:p text:style-name="Preformatted_20_Text">**Phase 1 - Check Blocks, Files/Directories, and Directory Entries</text:p>
            <text:p text:style-name="Preformatted_20_Text">**Phase 2 - Count links</text:p>
            <text:p text:style-name="Preformatted_20_Text">**Phase 3 - Duplicate Block Rescan and Directory Connectedness</text:p>
            <text:p text:style-name="Preformatted_20_Text">**Phase 4 - Report Problems</text:p>
            <text:p text:style-name="Preformatted_20_Text">**Phase 7 - Verify File/Directory Allocation Maps</text:p>
            <text:p text:style-name="Preformatted_20_Text">**Phase 8 - Verify Disk Allocation Maps</text:p>
            <text:p text:style-name="Preformatted_20_Text"><text:s text:c="4"/>65536 kilobytes total disk space.</text:p>
            <text:p text:style-name="Preformatted_20_Text"><text:s text:c="6"/>236 kilobytes in 168 directories.</text:p>
            <text:p text:style-name="Preformatted_20_Text"><text:s text:c="4"/>34678 kilobytes in 1100 user files.</text:p>
            <text:p text:style-name="Preformatted_20_Text"><text:s text:c="4"/>30144 kilobytes are available for use.</text:p>
            <text:p text:style-name="Preformatted_20_Text">fsck: Performing read-only processing does not produce dependable results.</text:p>
            <text:p text:style-name="Preformatted_20_Text">File system is clean.</text:p>
            <text:p text:style-name="P53">#</text:p>
          </table:table-cell>
        </table:table-row>
      </table:table>
      <text:p text:style-name="Text_20_body">Vérification du système de fichiers /dev/hd3, avec des modifications mineures sans intervention de l'utilisateur (-p) : </text:p>
      <table:table table:name="Tableau90" table:style-name="Tableau90">
        <table:table-column table:style-name="Tableau90.A"/>
        <table:table-row>
          <table:table-cell table:style-name="Tableau90.A1" office:value-type="string">
            <text:p text:style-name="Preformatted_20_Text"># fsck -p /dev/hd3</text:p>
            <text:p text:style-name="Preformatted_20_Text"/>
            <text:p text:style-name="Preformatted_20_Text"/>
            <text:p text:style-name="Preformatted_20_Text"/>
            <text:p text:style-name="Preformatted_20_Text">****************</text:p>
            <text:p text:style-name="Preformatted_20_Text">The current volume is: /dev/hd3</text:p>
            <text:p text:style-name="Preformatted_20_Text">File system is currently mounted.</text:p>
            <text:p text:style-name="Preformatted_20_Text">fsck: Performing read-only processing does not produce dependable results.</text:p>
            <text:p text:style-name="Preformatted_20_Text">**Phase 1 - Check Blocks, Files/Directories, and Directory Entries</text:p>
            <text:p text:style-name="Preformatted_20_Text">**Phase 2 - Count links</text:p>
            <text:p text:style-name="Preformatted_20_Text">**Phase 3 - Duplicate Block Rescan and Directory Connectedness</text:p>
            <text:p text:style-name="Preformatted_20_Text">**Phase 4 - Report Problems</text:p>
            <text:p text:style-name="Preformatted_20_Text">**Phase 7 - Verify File/Directory Allocation Maps</text:p>
            <text:p text:style-name="Preformatted_20_Text">Errors detected in the file system inode allocation</text:p>
            <text:p text:style-name="Preformatted_20_Text"><text:s text:c="9"/>map control information.</text:p>
            <text:p text:style-name="Preformatted_20_Text">Errors detected in the file system inode allocation map.</text:p>
            <text:p text:style-name="Preformatted_20_Text">**Phase 8 - Verify Disk Allocation Maps</text:p>
            <text:p text:style-name="Preformatted_20_Text">Incorrect data detected in disk allocation structures.</text:p>
            <text:p text:style-name="Preformatted_20_Text">Incorrect data detected in disk allocation control structures.</text:p>
            <text:p text:style-name="Preformatted_20_Text"><text:s text:c="3"/>524288 kilobytes total disk space.</text:p>
            <text:p text:style-name="Preformatted_20_Text"><text:s text:c="7"/>27 kilobytes in 23 directories.</text:p>
            <text:p text:style-name="Preformatted_20_Text"><text:s text:c="3"/>363385 kilobytes in 218 user files.</text:p>
            <text:p text:style-name="Preformatted_20_Text"><text:s text:c="3"/>160352 kilobytes are available for use.</text:p>
            <text:p text:style-name="Preformatted_20_Text">fsck: Performing read-only processing does not produce dependable results.</text:p>
            <text:p text:style-name="Preformatted_20_Text">File system is dirty.</text:p>
            <text:p text:style-name="Preformatted_20_Text">File system is dirty but is marked clean. <text:s/>In its present state,</text:p>
            <text:p text:style-name="Preformatted_20_Text"><text:s text:c="9"/>the results of accessing /dev/hd3 (except by this command) are undefined.</text:p>
            <text:p text:style-name="P53">#</text:p>
          </table:table-cell>
        </table:table-row>
      </table:table>
      <text:p text:style-name="Text_20_body"><text:a xlink:type="simple" xlink:href="http://www.linux-france.org/%7Emdecore/aix/memo-aix/memo-aix.html#top">Top</text:a><text:bookmark text:name="subsec10.8"/></text:p>
      <text:h text:style-name="Heading_20_3" text:outline-level="3">10.8. Création d'un ramdisk</text:h>
      <text:p text:style-name="Text_20_body">Pour améliorer les performances, il peut être utile de mettre des données temporaires dans la RAM (la tempdb d'une base de données, par exemple). La procédure qui suit est à exécuter à chaque démarrage du serveur. </text:p>
      <text:p text:style-name="Text_20_body">Génération du ramdisk de 4000 blocs de 512 bytes : </text:p>
      <table:table table:name="Tableau91" table:style-name="Tableau91">
        <table:table-column table:style-name="Tableau91.A"/>
        <table:table-row>
          <table:table-cell table:style-name="Tableau91.A1" office:value-type="string">
            <text:p text:style-name="Preformatted_20_Text"># mkramdisk 4000</text:p>
            <text:p text:style-name="Preformatted_20_Text">/dev/rramdisk0</text:p>
            <text:p text:style-name="P53">#</text:p>
          </table:table-cell>
        </table:table-row>
      </table:table>
      <text:p text:style-name="Text_20_body">Recherche du device ramdisk créé : </text:p>
      <table:table table:name="Tableau92" table:style-name="Tableau92">
        <table:table-column table:style-name="Tableau92.A"/>
        <table:table-row>
          <table:table-cell table:style-name="Tableau92.A1" office:value-type="string">
            <text:p text:style-name="Preformatted_20_Text"># ls -l /dev | grep ramdisk</text:p>
            <text:p text:style-name="Preformatted_20_Text">brw------- <text:s text:c="2"/>1 root <text:s text:c="4"/>system <text:s text:c="6"/>47, <text:s/>0 01 sep 15:25 ramdisk0</text:p>
            <text:p text:style-name="Preformatted_20_Text">crw------- <text:s text:c="2"/>1 root <text:s text:c="4"/>system <text:s text:c="6"/>47, <text:s/>0 01 sep 15:25 rramdisk0</text:p>
            <text:p text:style-name="P53">#</text:p>
          </table:table-cell>
        </table:table-row>
      </table:table>
      <text:p text:style-name="Text_20_body">Création du système de fichiers sur ce ramdisk : </text:p>
      <table:table table:name="Tableau93" table:style-name="Tableau93">
        <table:table-column table:style-name="Tableau93.A"/>
        <table:table-row>
          <table:table-cell table:style-name="Tableau93.A1" office:value-type="string">
            <text:p text:style-name="Preformatted_20_Text"># mkfs -V jfs /dev/ramdisk0</text:p>
            <text:p text:style-name="Preformatted_20_Text">mkfs: destroy /dev/ramdisk0 (y)? y</text:p>
            <text:p text:style-name="Preformatted_20_Text">Device /dev/ramdisk0:</text:p>
            <text:p text:style-name="Preformatted_20_Text"><text:s text:c="2"/>Standard empty file system</text:p>
            <text:p text:style-name="Preformatted_20_Text"><text:s text:c="2"/>Size: <text:s text:c="10"/>4000 512-byte (UBSIZE) blocks</text:p>
            <text:p text:style-name="Preformatted_20_Text"><text:s text:c="2"/>Initial Inodes: 512</text:p>
            <text:p text:style-name="P53">#</text:p>
          </table:table-cell>
        </table:table-row>
      </table:table>
      <text:p text:style-name="Text_20_body">Création du répertoire de montage : </text:p>
      <table:table table:name="Tableau94" table:style-name="Tableau94">
        <table:table-column table:style-name="Tableau94.A"/>
        <table:table-row>
          <table:table-cell table:style-name="Tableau94.A1" office:value-type="string">
            <text:p text:style-name="Preformatted_20_Text"># mkdir /ramdisk0</text:p>
            <text:p text:style-name="P53">#</text:p>
          </table:table-cell>
        </table:table-row>
      </table:table>
      <text:p text:style-name="Text_20_body">Montage du ramdisk : </text:p>
      <table:table table:name="Tableau95" table:style-name="Tableau95">
        <table:table-column table:style-name="Tableau95.A"/>
        <table:table-row>
          <table:table-cell table:style-name="Tableau95.A1" office:value-type="string">
            <text:p text:style-name="Preformatted_20_Text"># mount -V jfs -o nointegrity /dev/ramdisk0 /ramdisk0</text:p>
            <text:p text:style-name="P53">#</text:p>
          </table:table-cell>
        </table:table-row>
      </table:table>
      <text:p text:style-name="Text_20_body">Pour mettre la tempdb (base de données temporaire) dans ce ramdisk, il suffit de faire : </text:p>
      <table:table table:name="Tableau96" table:style-name="Tableau96">
        <table:table-column table:style-name="Tableau96.A"/>
        <table:table-row>
          <table:table-cell table:style-name="Tableau96.A1" office:value-type="string">
            <text:p text:style-name="Preformatted_20_Text"># touch /ramdisk0/tempdbram.dat</text:p>
            <text:p text:style-name="P53">#</text:p>
          </table:table-cell>
        </table:table-row>
      </table:table>
      <text:p text:style-name="Text_20_body">puis de faire pointer la tempdb vers /ramdisk0/tempdbram.dat. </text:p>
      <text:p text:style-name="Text_20_body">Pour supprimer le device de la tempdb (Sybase) : </text:p>
      <text:list xml:id="list37332332" text:style-name="L24">
        <text:list-item>
          <text:p text:style-name="P46">enlever la segmentation sur chacun des segment </text:p>
        </text:list-item>
        <text:list-item>
          <text:p text:style-name="P46">disable mirroring --&gt; 0 + reboot moteur </text:p>
        </text:list-item>
        <text:list-item>
          <text:p text:style-name="P46">créer le miroir sur le ramdisk </text:p>
        </text:list-item>
        <text:list-item>
          <text:p text:style-name="P46">reboot du moteur </text:p>
        </text:list-item>
        <text:list-item>
          <text:p text:style-name="P46">suppression miroir primaire --&gt; suppression définitive </text:p>
        </text:list-item>
        <text:list-item>
          <text:p text:style-name="P24">reboot moteur + suppression device + disk </text:p>
        </text:list-item>
      </text:list>
      <text:p text:style-name="Text_20_body"><text:a xlink:type="simple" xlink:href="http://www.linux-france.org/%7Emdecore/aix/memo-aix/memo-aix.html#top">Top</text:a><text:bookmark text:name="subsec10.9"/></text:p>
      <text:h text:style-name="Heading_20_3" text:outline-level="3">10.9. Au secours !</text:h>
      <text:p text:style-name="Text_20_body">Restauration de la copie du superbloc (bloc 31) du système de fichiers /dev/hd4 : </text:p>
      <table:table table:name="Tableau97" table:style-name="Tableau97">
        <table:table-column table:style-name="Tableau97.A"/>
        <table:table-row>
          <table:table-cell table:style-name="Tableau97.A1" office:value-type="string">
            <text:p text:style-name="Preformatted_20_Text"># dd count=1 bs=4k skip=31 seek=1 if=/dev/hd4 of=/dev/hd4</text:p>
            <text:p text:style-name="Preformatted_20_Text">1+0 enregistrements en entrée.</text:p>
            <text:p text:style-name="Preformatted_20_Text">1+0 enregistrements en sortie.</text:p>
            <text:p text:style-name="P53">#</text:p>
          </table:table-cell>
        </table:table-row>
      </table:table>
      <text:p text:style-name="Text_20_body"><text:a xlink:type="simple" xlink:href="http://www.linux-france.org/%7Emdecore/aix/memo-aix/memo-aix.html#top">Top</text:a><text:bookmark text:name="sec11"/></text:p>
      <text:h text:style-name="Heading_20_2" text:outline-level="2">11. Quotas</text:h>
      <text:p text:style-name="Text_20_body">Ajout des quotas sur le répertoire /home : </text:p>
      <table:table table:name="Tableau98" table:style-name="Tableau98">
        <table:table-column table:style-name="Tableau98.A"/>
        <table:table-row>
          <table:table-cell table:style-name="Tableau98.A1" office:value-type="string">
            <text:p text:style-name="Preformatted_20_Text"># chfs -a quota=userquota,groupquota /home</text:p>
            <text:p text:style-name="P53">#</text:p>
          </table:table-cell>
        </table:table-row>
      </table:table>
      <table:table table:name="Tableau99" table:style-name="Tableau99">
        <table:table-column table:style-name="Tableau99.A"/>
        <table:table-row>
          <table:table-cell table:style-name="Tableau99.A1" office:value-type="string">
            <text:p text:style-name="Preformatted_20_Text"># edquota -u mdecore</text:p>
            <text:p text:style-name="Preformatted_20_Text">[A COMPLETER...]</text:p>
            <text:p text:style-name="P53">#</text:p>
          </table:table-cell>
        </table:table-row>
      </table:table>
      <table:table table:name="Tableau100" table:style-name="Tableau100">
        <table:table-column table:style-name="Tableau100.A"/>
        <table:table-row>
          <table:table-cell table:style-name="Tableau100.A1" office:value-type="string">
            <text:p text:style-name="Preformatted_20_Text"># edquota -t</text:p>
            <text:p text:style-name="Preformatted_20_Text">[A COMPLETER...]</text:p>
            <text:p text:style-name="P53">#</text:p>
          </table:table-cell>
        </table:table-row>
      </table:table>
      <table:table table:name="Tableau101" table:style-name="Tableau101">
        <table:table-column table:style-name="Tableau101.A"/>
        <table:table-row>
          <table:table-cell table:style-name="Tableau101.A1" office:value-type="string">
            <text:p text:style-name="Preformatted_20_Text"># quotaon /home</text:p>
            <text:p text:style-name="Preformatted_20_Text">[A COMPLETER...]</text:p>
            <text:p text:style-name="P53">#</text:p>
          </table:table-cell>
        </table:table-row>
      </table:table>
      <table:table table:name="Tableau102" table:style-name="Tableau102">
        <table:table-column table:style-name="Tableau102.A"/>
        <table:table-row>
          <table:table-cell table:style-name="Tableau102.A1" office:value-type="string">
            <text:p text:style-name="Preformatted_20_Text"># quotacheck -a</text:p>
            <text:p text:style-name="Preformatted_20_Text">[A COMPLETER...]</text:p>
            <text:p text:style-name="P53">#</text:p>
          </table:table-cell>
        </table:table-row>
      </table:table>
      <table:table table:name="Tableau103" table:style-name="Tableau103">
        <table:table-column table:style-name="Tableau103.A"/>
        <table:table-row>
          <table:table-cell table:style-name="Tableau103.A1" office:value-type="string">
            <text:p text:style-name="Preformatted_20_Text"># repquota -a</text:p>
            <text:p text:style-name="Preformatted_20_Text">[A COMPLETER...]</text:p>
            <text:p text:style-name="P53">#</text:p>
          </table:table-cell>
        </table:table-row>
      </table:table>
      <text:p text:style-name="Text_20_body"><text:a xlink:type="simple" xlink:href="http://www.linux-france.org/%7Emdecore/aix/memo-aix/memo-aix.html#top">Top</text:a><text:bookmark text:name="sec12"/></text:p>
      <text:h text:style-name="Heading_20_2" text:outline-level="2">12. Resource Monitoring and Control (RMC)</text:h>
      <text:p text:style-name="Text_20_body">[AIX 5.1] Associe une condition (eg. file system full) à un événement (eg. envoi d'un mail). Package rsct.core, exécutables dans /usr/sbin/rsct. Au démarrage un startsrc -s ctrmc doit être fait. Configuration avec wsm -&gt; Contrôle -&gt; Généralités sur le contrôle -&gt; Contrôle des conditions </text:p>
      <text:p text:style-name="Text_20_body"><text:a xlink:type="simple" xlink:href="http://www.linux-france.org/%7Emdecore/aix/memo-aix/memo-aix.html#top">Top</text:a><text:bookmark text:name="sec13"/></text:p>
      <text:h text:style-name="Heading_20_2" text:outline-level="2">13. Espace de pagination (swap)</text:h>
      <text:p text:style-name="Text_20_body">L'espace de pagination (hd6) sert à stocker temporairement sur disque des pages non utilisées dans la RAM. Si il n'y a pas assez de RAM, il faut augmenter la taille de la RAM et non de l'espace de pagination, car ce dernier ne sert que au stockage des pages non utilisées. </text:p>
      <text:p text:style-name="Text_20_body">En général il faut mettre deux fois plus d'espace de pagination que de RAM (512 Mo si il y a plus de 256 Mo de RAM). Il ne peut y avoir moins de 64 Mo sur hd6. Le mieux est d'avoir un seul espace de pagination par disque, sur les disques les moins sollicités, de tailles similaires (les espaces de pagination sont utilisés en accès "round robin", si les tailles sont différentes les petites zones se remplissent plus vites que les grandes), non partagées sur plusieurs disques (pour bien répartir l'activité uniformément sur les disques), sur des contrôleurs différents (pour améliorer les opérations de lecture / écriture). </text:p>
      <text:p text:style-name="Text_20_body"><text:a xlink:type="simple" xlink:href="http://www.linux-france.org/%7Emdecore/aix/memo-aix/memo-aix.html#top">Top</text:a><text:bookmark text:name="subsec13.1"/></text:p>
      <text:h text:style-name="Heading_20_3" text:outline-level="3">13.1. Affichage de l'espace de pagination</text:h>
      <text:p text:style-name="Text_20_body">Affichage des informations sur les espaces de pagination : </text:p>
      <table:table table:name="Tableau104" table:style-name="Tableau104">
        <table:table-column table:style-name="Tableau104.A"/>
        <table:table-row>
          <table:table-cell table:style-name="Tableau104.A1" office:value-type="string">
            <text:p text:style-name="Preformatted_20_Text"># lsps -a</text:p>
            <text:p text:style-name="Preformatted_20_Text">Page Space <text:s/>Physical Volume <text:s text:c="2"/>Volume Group <text:s text:c="3"/>Size <text:s text:c="2"/>%Used <text:s/>Active <text:s/>Auto <text:s/>Type</text:p>
            <text:p text:style-name="Preformatted_20_Text">paging00 <text:s text:c="3"/>hdisk1 <text:s text:c="11"/>rootvg <text:s text:c="8"/>224MB <text:s text:c="6"/>1 <text:s text:c="4"/>yes <text:s text:c="2"/>yes <text:s text:c="3"/>lv</text:p>
            <text:p text:style-name="Preformatted_20_Text">hd6 <text:s text:c="8"/>hdisk0 <text:s text:c="11"/>rootvg <text:s text:c="8"/>288MB <text:s text:c="6"/>2 <text:s text:c="4"/>yes <text:s text:c="2"/>yes <text:s text:c="3"/>lv</text:p>
            <text:p text:style-name="P53">#</text:p>
          </table:table-cell>
        </table:table-row>
      </table:table>
      <text:p text:style-name="Text_20_body">Affichage des caractéristiques de tous les espaces de pagination : </text:p>
      <table:table table:name="Tableau105" table:style-name="Tableau105">
        <table:table-column table:style-name="Tableau105.A"/>
        <table:table-row>
          <table:table-cell table:style-name="Tableau105.A1" office:value-type="string">
            <text:p text:style-name="Preformatted_20_Text"># lsps -s</text:p>
            <text:p text:style-name="Preformatted_20_Text">Total Paging Space <text:s text:c="2"/>Percent Used</text:p>
            <text:p text:style-name="Preformatted_20_Text"><text:s text:c="6"/>512MB <text:s text:c="14"/>1%</text:p>
            <text:p text:style-name="P53">#</text:p>
          </table:table-cell>
        </table:table-row>
      </table:table>
      <text:p text:style-name="Text_20_body">RAM totale : </text:p>
      <table:table table:name="Tableau106" table:style-name="Tableau106">
        <table:table-column table:style-name="Tableau106.A"/>
        <table:table-row>
          <table:table-cell table:style-name="Tableau106.A1" office:value-type="string">
            <text:p text:style-name="Preformatted_20_Text"># bootinfo -r</text:p>
            <text:p text:style-name="Preformatted_20_Text">8388608</text:p>
            <text:p text:style-name="P53">#</text:p>
          </table:table-cell>
        </table:table-row>
      </table:table>
      <text:p text:style-name="Text_20_body">Espace de pagination activé au démarrage : </text:p>
      <table:table table:name="Tableau107" table:style-name="Tableau107">
        <table:table-column table:style-name="Tableau107.A"/>
        <table:table-row>
          <table:table-cell table:style-name="Tableau107.A1" office:value-type="string">
            <text:p text:style-name="Preformatted_20_Text"># cat /etc/swapspaces</text:p>
            <text:p text:style-name="Preformatted_20_Text">* /etc/swapspaces</text:p>
            <text:p text:style-name="Preformatted_20_Text">*</text:p>
            <text:p text:style-name="Preformatted_20_Text">* This file lists all the paging spaces that are automatically put into</text:p>
            <text:p text:style-name="Preformatted_20_Text">* service on each system restart (the 'swapon -a' command executed from</text:p>
            <text:p text:style-name="Preformatted_20_Text">* /etc/rc swaps on every device listed here).</text:p>
            <text:p text:style-name="Preformatted_20_Text">*</text:p>
            <text:p text:style-name="Preformatted_20_Text">* WARNING: Only paging space devices should be listed here.</text:p>
            <text:p text:style-name="Preformatted_20_Text">*</text:p>
            <text:p text:style-name="Preformatted_20_Text">* This file is modified by the chps, mkps and rmps commands and referenced</text:p>
            <text:p text:style-name="Preformatted_20_Text">* by the lsps and swapon commands.</text:p>
            <text:p text:style-name="Preformatted_20_Text"/>
            <text:p text:style-name="Preformatted_20_Text">hd6:</text:p>
            <text:p text:style-name="Preformatted_20_Text"><text:s text:c="8"/>dev = /dev/hd6</text:p>
            <text:p text:style-name="Preformatted_20_Text"/>
            <text:p text:style-name="Preformatted_20_Text"/>
            <text:p text:style-name="Preformatted_20_Text"/>
            <text:p text:style-name="Preformatted_20_Text">paging00:</text:p>
            <text:p text:style-name="Preformatted_20_Text"><text:s text:c="8"/>dev = /dev/paging00</text:p>
            <text:p text:style-name="Preformatted_20_Text"/>
            <text:p text:style-name="Preformatted_20_Text"/>
            <text:p text:style-name="P53">#</text:p>
          </table:table-cell>
        </table:table-row>
      </table:table>
      <text:p text:style-name="Text_20_body"><text:a xlink:type="simple" xlink:href="http://www.linux-france.org/%7Emdecore/aix/memo-aix/memo-aix.html#top">Top</text:a><text:bookmark text:name="subsec13.2"/></text:p>
      <text:h text:style-name="Heading_20_3" text:outline-level="3">13.2. Ajout d'un espace de pagination</text:h>
      <text:p text:style-name="Text_20_body">Ajout d'un espace de pagination de 4 LP (-s 4), avec activation immédiate (-n) et au démarrage (-a) sur le VG datavg : </text:p>
      <table:table table:name="Tableau108" table:style-name="Tableau108">
        <table:table-column table:style-name="Tableau108.A"/>
        <table:table-row>
          <table:table-cell table:style-name="Tableau108.A1" office:value-type="string">
            <text:p text:style-name="Preformatted_20_Text"># mkps -s 4 -n -a datavg</text:p>
            <text:p text:style-name="Preformatted_20_Text">paging00</text:p>
            <text:p text:style-name="P53">#</text:p>
          </table:table-cell>
        </table:table-row>
      </table:table>
      <text:p text:style-name="Text_20_body">Ajout d'un espace de pagination de 4 LP (-s 4), avec activation immédiate (-n) et au démarrage (-a) sur le disque hdisk4 du VG logvg : </text:p>
      <table:table table:name="Tableau109" table:style-name="Tableau109">
        <table:table-column table:style-name="Tableau109.A"/>
        <table:table-row>
          <table:table-cell table:style-name="Tableau109.A1" office:value-type="string">
            <text:p text:style-name="Preformatted_20_Text"># mkps -s 4 -n -a logvg hdisk4</text:p>
            <text:p text:style-name="Preformatted_20_Text">paging01</text:p>
            <text:p text:style-name="P53">#</text:p>
          </table:table-cell>
        </table:table-row>
      </table:table>
      <text:p text:style-name="Text_20_body"><text:a xlink:type="simple" xlink:href="http://www.linux-france.org/%7Emdecore/aix/memo-aix/memo-aix.html#top">Top</text:a><text:bookmark text:name="subsec13.3"/></text:p>
      <text:h text:style-name="Heading_20_3" text:outline-level="3">13.3. Modification d'un espace de pagination</text:h>
      <text:p text:style-name="Text_20_body">Augmentation de la taille de l'espace de pagination paging00 de 4 LPs : </text:p>
      <table:table table:name="Tableau110" table:style-name="Tableau110">
        <table:table-column table:style-name="Tableau110.A"/>
        <table:table-row>
          <table:table-cell table:style-name="Tableau110.A1" office:value-type="string">
            <text:p text:style-name="Preformatted_20_Text"># lsvg datavg | grep FREE</text:p>
            <text:p text:style-name="Preformatted_20_Text">MAX LVs: <text:s text:c="7"/>256 <text:s text:c="21"/>FREE PPs: <text:s text:c="6"/>1075 (68800 megabytes)</text:p>
            <text:p text:style-name="Preformatted_20_Text"># chps -s 4 paging00</text:p>
            <text:p text:style-name="P53">#</text:p>
          </table:table-cell>
        </table:table-row>
      </table:table>
      <text:p text:style-name="Text_20_body">[AIX 5.1] Diminution de la taille d l'espace de pagination paging00 de 4 LPs : </text:p>
      <table:table table:name="Tableau111" table:style-name="Tableau111">
        <table:table-column table:style-name="Tableau111.A"/>
        <table:table-row>
          <table:table-cell table:style-name="Tableau111.A1" office:value-type="string">
            <text:p text:style-name="Preformatted_20_Text"># chps -d 4 paging00</text:p>
            <text:p text:style-name="P53">#</text:p>
          </table:table-cell>
        </table:table-row>
      </table:table>
      <text:p text:style-name="Text_20_body"><text:a xlink:type="simple" xlink:href="http://www.linux-france.org/%7Emdecore/aix/memo-aix/memo-aix.html#top">Top</text:a><text:bookmark text:name="subsec13.4"/></text:p>
      <text:h text:style-name="Heading_20_3" text:outline-level="3">13.4. Activation / désactivation d'un espace de pagination</text:h>
      <text:p text:style-name="Text_20_body">Activation de l'espace de pagination /dev/paging00 : </text:p>
      <table:table table:name="Tableau112" table:style-name="Tableau112">
        <table:table-column table:style-name="Tableau112.A"/>
        <table:table-row>
          <table:table-cell table:style-name="Tableau112.A1" office:value-type="string">
            <text:p text:style-name="Preformatted_20_Text"># swapon /dev/paging00</text:p>
            <text:p text:style-name="P53">#</text:p>
          </table:table-cell>
        </table:table-row>
      </table:table>
      <text:p text:style-name="Text_20_body">Activation de tous les espaces de pagination définis dans le fichier /etc/swapspaces : </text:p>
      <table:table table:name="Tableau113" table:style-name="Tableau113">
        <table:table-column table:style-name="Tableau113.A"/>
        <table:table-row>
          <table:table-cell table:style-name="Tableau113.A1" office:value-type="string">
            <text:p text:style-name="Preformatted_20_Text"># swapon -a</text:p>
            <text:p text:style-name="P53">#</text:p>
          </table:table-cell>
        </table:table-row>
      </table:table>
      <text:p text:style-name="Text_20_body">Désactivation de l'espace de pagination /dev/paging00 : </text:p>
      <table:table table:name="Tableau114" table:style-name="Tableau114">
        <table:table-column table:style-name="Tableau114.A"/>
        <table:table-row>
          <table:table-cell table:style-name="Tableau114.A1" office:value-type="string">
            <text:p text:style-name="Preformatted_20_Text"># swapoff /dev/paging01</text:p>
            <text:p text:style-name="Preformatted_20_Text"># rmps paging01</text:p>
            <text:p text:style-name="Preformatted_20_Text">rmlv : le volume logique paging01 est supprimé.</text:p>
            <text:p text:style-name="P53">#</text:p>
          </table:table-cell>
        </table:table-row>
      </table:table>
      <text:p text:style-name="Text_20_body"><text:a xlink:type="simple" xlink:href="http://www.linux-france.org/%7Emdecore/aix/memo-aix/memo-aix.html#top">Top</text:a><text:bookmark text:name="sec14"/></text:p>
      <text:h text:style-name="Heading_20_2" text:outline-level="2">14. Gestion des périphériques</text:h>
      <text:p text:style-name="Text_20_body"><text:a xlink:type="simple" xlink:href="http://www.linux-france.org/%7Emdecore/aix/memo-aix/memo-aix.html#top">Top</text:a><text:bookmark text:name="subsec14.1"/></text:p>
      <text:h text:style-name="Heading_20_3" text:outline-level="3">14.1. Affichage des périphériques</text:h>
      <text:p text:style-name="Text_20_body">Affichage de toute les unités prises en charge par le système (-P) avec les en-têtes de la sortie (-H) : </text:p>
      <table:table table:name="Tableau115" table:style-name="Tableau115">
        <table:table-column table:style-name="Tableau115.A"/>
        <table:table-row>
          <table:table-cell table:style-name="Tableau115.A1" office:value-type="string">
            <text:p text:style-name="Preformatted_20_Text"># lsdev -P -H</text:p>
            <text:p text:style-name="Preformatted_20_Text">class <text:s text:c="9"/>type <text:s text:c="10"/>subclass <text:s text:c="2"/>description</text:p>
            <text:p text:style-name="Preformatted_20_Text"/>
            <text:p text:style-name="Preformatted_20_Text">logical_volume vgtype <text:s text:c="8"/>vgsubclass N/A</text:p>
            <text:p text:style-name="Preformatted_20_Text">logical_volume lvtype <text:s text:c="8"/>lvsubclass N/A</text:p>
            <text:p text:style-name="Preformatted_20_Text">lvm <text:s text:c="11"/>lvdd <text:s text:c="10"/>lvm <text:s text:c="7"/>LVM Device Driver</text:p>
            <text:p text:style-name="Preformatted_20_Text">aio <text:s text:c="11"/>aio <text:s text:c="11"/>node <text:s text:c="6"/>Asynchronous I/O</text:p>
            <text:p text:style-name="Preformatted_20_Text">pty <text:s text:c="11"/>pty <text:s text:c="11"/>pty <text:s text:c="7"/>Asynchronous Pseudo-Terminal</text:p>
            <text:p text:style-name="Preformatted_20_Text">[...]</text:p>
            <text:p text:style-name="P53">#</text:p>
          </table:table-cell>
        </table:table-row>
      </table:table>
      <text:p text:style-name="Text_20_body">Affichage de toute les unités pré définies (-P) pour la classe de l'unité tape (-c tape) : </text:p>
      <table:table table:name="Tableau116" table:style-name="Tableau116">
        <table:table-column table:style-name="Tableau116.A"/>
        <table:table-row>
          <table:table-cell table:style-name="Tableau116.A1" office:value-type="string">
            <text:p text:style-name="Preformatted_20_Text"># lsdev -P -c tape</text:p>
            <text:p text:style-name="Preformatted_20_Text">tape 1200mb-c scsi 1.2 GB 1/4-Inch Tape Drive</text:p>
            <text:p text:style-name="Preformatted_20_Text">tape 150mb <text:s text:c="3"/>scsi 150 MB 1/4-Inch Tape Drive</text:p>
            <text:p text:style-name="Preformatted_20_Text">tape 3490e <text:s text:c="3"/>scsi 3490E Autoloading Tape Drive</text:p>
            <text:p text:style-name="Preformatted_20_Text">tape 4mm2gb <text:s text:c="2"/>scsi 2.0 GB 4mm Tape Drive</text:p>
            <text:p text:style-name="Preformatted_20_Text">tape 4mm4gb <text:s text:c="2"/>scsi 4.0 GB 4mm Tape Drive</text:p>
            <text:p text:style-name="Preformatted_20_Text">tape 525mb <text:s text:c="3"/>scsi 525 MB 1/4-Inch Tape Drive</text:p>
            <text:p text:style-name="Preformatted_20_Text">tape 8mm <text:s text:c="5"/>scsi 2.3 GB 8mm Tape Drive</text:p>
            <text:p text:style-name="Preformatted_20_Text">tape 8mm5gb <text:s text:c="2"/>scsi 5.0 GB 8mm Tape Drive</text:p>
            <text:p text:style-name="Preformatted_20_Text">tape 8mm7gb <text:s text:c="2"/>scsi 7.0 GB 8mm Tape Drive</text:p>
            <text:p text:style-name="Preformatted_20_Text">tape 9trk <text:s text:c="4"/>scsi 1/2-inch 9-Track Tape Drive</text:p>
            <text:p text:style-name="Preformatted_20_Text">tape ost <text:s text:c="5"/>scsi Other SCSI Tape Drive</text:p>
            <text:p text:style-name="Preformatted_20_Text">tape scsd <text:s text:c="4"/>scsi SCSI Tape Drive</text:p>
            <text:p text:style-name="Preformatted_20_Text">tape 4mm2gb2 <text:s/>scsi 2.0 GB 4mm Tape Drive</text:p>
            <text:p text:style-name="P53">#</text:p>
          </table:table-cell>
        </table:table-row>
      </table:table>
      <text:p text:style-name="Text_20_body">Affichage de toute les unités configurées (-C) avec les en-têtes de la sortie (-H) : </text:p>
      <table:table table:name="Tableau117" table:style-name="Tableau117">
        <table:table-column table:style-name="Tableau117.A"/>
        <table:table-row>
          <table:table-cell table:style-name="Tableau117.A1" office:value-type="string">
            <text:p text:style-name="Preformatted_20_Text"># lsdev -C -H</text:p>
            <text:p text:style-name="Preformatted_20_Text">name <text:s text:c="9"/>status <text:s text:c="3"/>location <text:s text:c="5"/>description</text:p>
            <text:p text:style-name="Preformatted_20_Text"/>
            <text:p text:style-name="Preformatted_20_Text">sys0 <text:s text:c="9"/>Available 00-00 <text:s text:c="8"/>System Object</text:p>
            <text:p text:style-name="Preformatted_20_Text">sysplanar0 <text:s text:c="3"/>Available 00-00 <text:s text:c="8"/>System Planar</text:p>
            <text:p text:style-name="Preformatted_20_Text">pci0 <text:s text:c="9"/>Available 00-fff7f09000 PCI Bus</text:p>
            <text:p text:style-name="Preformatted_20_Text">pci1 <text:s text:c="9"/>Available 00-fff7f0a000 PCI Bus</text:p>
            <text:p text:style-name="Preformatted_20_Text">isa0 <text:s text:c="9"/>Available 10-80 <text:s text:c="8"/>ISA Bus</text:p>
            <text:p text:style-name="Preformatted_20_Text">sa0 <text:s text:c="10"/>Available 01-S1 <text:s text:c="8"/>Standard I/O Serial Port</text:p>
            <text:p text:style-name="Preformatted_20_Text">sa1 <text:s text:c="10"/>Available 01-S2 <text:s text:c="8"/>Standard I/O Serial Port</text:p>
            <text:p text:style-name="Preformatted_20_Text">sa2 <text:s text:c="10"/>Available 01-S3 <text:s text:c="8"/>Standard I/O Serial Port</text:p>
            <text:p text:style-name="Preformatted_20_Text">sa3 <text:s text:c="10"/>Available 01-S4 <text:s text:c="8"/>Standard I/O Serial Port</text:p>
            <text:p text:style-name="Preformatted_20_Text">siokma0 <text:s text:c="6"/>Available 01-K1 <text:s text:c="8"/>Keyboard/Mouse Adapter</text:p>
            <text:p text:style-name="Preformatted_20_Text">fda0 <text:s text:c="9"/>Available 01-D1 <text:s text:c="8"/>Standard I/O Diskette Adapter</text:p>
            <text:p text:style-name="Preformatted_20_Text">pci2 <text:s text:c="9"/>Available 10-58 <text:s text:c="8"/>PCI Bus</text:p>
            <text:p text:style-name="Preformatted_20_Text">scsi0 <text:s text:c="8"/>Available 11-08 <text:s text:c="8"/>Wide/Ultra-2 SCSI I/O Controller</text:p>
            <text:p text:style-name="Preformatted_20_Text">scsi1 <text:s text:c="8"/>Available 11-09 <text:s text:c="8"/>Wide/Ultra-2 SCSI I/O Controller</text:p>
            <text:p text:style-name="Preformatted_20_Text">[...]</text:p>
            <text:p text:style-name="P53">#</text:p>
          </table:table-cell>
        </table:table-row>
      </table:table>
      <text:p text:style-name="Text_20_body">Les unités ont le statut disponible (prête et pouvant être utilisée), définie (non disponible, mise hors tension ou n'existant plus dans le système, bref non accessible) ou non définie (supportée mais non configurée). </text:p>
      <text:p text:style-name="Text_20_body">Affichage de toute les unités de la classe tape (-c tape) configurées (-C) : </text:p>
      <table:table table:name="Tableau118" table:style-name="Tableau118">
        <table:table-column table:style-name="Tableau118.A"/>
        <table:table-row>
          <table:table-cell table:style-name="Tableau118.A1" office:value-type="string">
            <text:p text:style-name="Preformatted_20_Text"># lsdev -C -c tape</text:p>
            <text:p text:style-name="Preformatted_20_Text">rmt0 Disponible 1S-08-00-0,0 Unité de bande 4 mm SCSI différentielle</text:p>
            <text:p text:style-name="P53">#</text:p>
          </table:table-cell>
        </table:table-row>
      </table:table>
      <text:p text:style-name="Text_20_body">Affichage de toute les unités pré définies (-C) ayant une connexion au système de type scsi (-s scsi) : </text:p>
      <table:table table:name="Tableau119" table:style-name="Tableau119">
        <table:table-column table:style-name="Tableau119.A"/>
        <table:table-row>
          <table:table-cell table:style-name="Tableau119.A1" office:value-type="string">
            <text:p text:style-name="Preformatted_20_Text"># lsdev -C -s scsi</text:p>
            <text:p text:style-name="Preformatted_20_Text">rmt0 <text:s text:c="3"/>Available 11-08-00-0,0 SCSI 8mm Tape Drive</text:p>
            <text:p text:style-name="Preformatted_20_Text">cd0 <text:s text:c="4"/>Available 11-08-00-1,0 16 Bit SCSI Multimedia CD-ROM Drive</text:p>
            <text:p text:style-name="Preformatted_20_Text">hdisk0 <text:s/>Available 11-08-00-2,0 16 Bit LVD SCSI Disk Drive</text:p>
            <text:p text:style-name="Preformatted_20_Text">hdisk1 <text:s/>Available 11-08-00-4,0 16 Bit LVD SCSI Disk Drive</text:p>
            <text:p text:style-name="Preformatted_20_Text">hdisk2 <text:s/>Available 27-08-00-0,0 Other SCSI Disk Drive</text:p>
            <text:p text:style-name="Preformatted_20_Text">hdisk3 <text:s/>Available 27-08-00-1,0 Other SCSI Disk Drive</text:p>
            <text:p text:style-name="Preformatted_20_Text">hdisk4 <text:s/>Available 27-08-00-2,0 Other SCSI Disk Drive</text:p>
            <text:p text:style-name="Preformatted_20_Text">hdisk5 <text:s/>Available 27-08-00-3,0 Other SCSI Disk Drive</text:p>
            <text:p text:style-name="Preformatted_20_Text">hdisk6 <text:s/>Available 27-08-00-4,0 Other SCSI Disk Drive</text:p>
            <text:p text:style-name="Preformatted_20_Text">hdisk7 <text:s/>Available 27-08-00-5,0 Other SCSI Disk Drive</text:p>
            <text:p text:style-name="Preformatted_20_Text">hdisk8 <text:s/>Available 27-08-00-6,0 Other SCSI Disk Drive</text:p>
            <text:p text:style-name="Preformatted_20_Text">hdisk9 <text:s/>Available 3A-08-00-0,0 Other SCSI Disk Drive</text:p>
            <text:p text:style-name="Preformatted_20_Text">hdisk10 Available 3A-08-00-1,0 Other SCSI Disk Drive</text:p>
            <text:p text:style-name="Preformatted_20_Text">hdisk11 Available 3A-08-00-2,0 Other SCSI Disk Drive</text:p>
            <text:p text:style-name="Preformatted_20_Text">hdisk12 Available 3A-08-00-3,0 Other SCSI Disk Drive</text:p>
            <text:p text:style-name="Preformatted_20_Text">hdisk13 Available 3A-08-00-4,0 Other SCSI Disk Drive</text:p>
            <text:p text:style-name="Preformatted_20_Text">hdisk14 Available 3A-08-00-5,0 Other SCSI Disk Drive</text:p>
            <text:p text:style-name="Preformatted_20_Text">hdisk15 Available 3A-08-00-6,0 Other SCSI Disk Drive</text:p>
            <text:p text:style-name="P53">#</text:p>
          </table:table-cell>
        </table:table-row>
      </table:table>
      <text:p text:style-name="Text_20_body">Affichage de toute les unités de la classe adapter (-c adapter) qui sont définies (-C) et disponibles (-S a) : </text:p>
      <table:table table:name="Tableau120" table:style-name="Tableau120">
        <table:table-column table:style-name="Tableau120.A"/>
        <table:table-row>
          <table:table-cell table:style-name="Tableau120.A1" office:value-type="string">
            <text:p text:style-name="Preformatted_20_Text"># lsdev -C -c adapter -S a</text:p>
            <text:p text:style-name="Preformatted_20_Text">sa0 <text:s text:c="6"/>Disponible 01-S1 <text:s text:c="3"/>Port d'E-S série standard</text:p>
            <text:p text:style-name="Preformatted_20_Text">sa1 <text:s text:c="6"/>Disponible 01-S2 <text:s text:c="3"/>Port d'E-S série standard</text:p>
            <text:p text:style-name="Preformatted_20_Text">sa2 <text:s text:c="6"/>Disponible 01-S3 <text:s text:c="3"/>Port d'E-S série standard</text:p>
            <text:p text:style-name="Preformatted_20_Text">siokma0 <text:s text:c="2"/>Disponible 01-K1 <text:s text:c="3"/>Carte de clavier/souris</text:p>
            <text:p text:style-name="Preformatted_20_Text">fda0 <text:s text:c="5"/>Disponible 01-D1 <text:s text:c="3"/>Carte d'unité de disquette standard</text:p>
            <text:p text:style-name="Preformatted_20_Text">ide0 <text:s text:c="5"/>Disponible 1G-19 <text:s text:c="3"/>Contrôleur ATA/IDE</text:p>
            <text:p text:style-name="Preformatted_20_Text">sisscsia0 Disponible 1S-08 <text:s text:c="3"/>PCI-X Dual Channel Ultra320 SCSI Adapter</text:p>
            <text:p text:style-name="Preformatted_20_Text">lai0 <text:s text:c="5"/>Disponible 1a-00 <text:s text:c="3"/>Carte graphique GXT135P</text:p>
            <text:p text:style-name="Preformatted_20_Text">sisscsia1 Disponible 1n-08 <text:s text:c="3"/>PCI-X Dual Channel Ultra320 SCSI Adapter</text:p>
            <text:p text:style-name="Preformatted_20_Text">sioka0 <text:s text:c="3"/>Disponible 01-K1-00 Carte de clavier</text:p>
            <text:p text:style-name="Preformatted_20_Text">ppa0 <text:s text:c="5"/>Disponible 01-R1 <text:s text:c="3"/>Carte de port parallèle CHRP IEEE1284 (ECP)</text:p>
            <text:p text:style-name="Preformatted_20_Text">ent0 <text:s text:c="5"/>Disponible 1L-08 <text:s text:c="3"/>10/100 Mbps Ethernet PCI Adapter II (1410ff01)</text:p>
            <text:p text:style-name="Preformatted_20_Text">ent1 <text:s text:c="5"/>Disponible 1j-08 <text:s text:c="3"/>10/100/1000 Base-TX PCI-X Adapter (14106902)</text:p>
            <text:p text:style-name="Preformatted_20_Text">sioma0 <text:s text:c="3"/>Disponible 01-K1-01 Carte souris</text:p>
            <text:p text:style-name="P53">#</text:p>
          </table:table-cell>
        </table:table-row>
      </table:table>
      <text:p text:style-name="Text_20_body">Affichage des caractéristiques par défaut (-D) de l'unité rmt0 (-l rmt0) : </text:p>
      <table:table table:name="Tableau121" table:style-name="Tableau121">
        <table:table-column table:style-name="Tableau121.A"/>
        <table:table-row>
          <table:table-cell table:style-name="Tableau121.A1" office:value-type="string">
            <text:p text:style-name="Preformatted_20_Text"># lsattr -l rmt0 -D</text:p>
            <text:p text:style-name="Preformatted_20_Text">mode <text:s text:c="9"/>yes Use DEVICE BUFFERS during writes <text:s text:c="4"/>True</text:p>
            <text:p text:style-name="Preformatted_20_Text">block_size <text:s text:c="7"/>BLOCK size (0=variable length) <text:s text:c="6"/>True</text:p>
            <text:p text:style-name="Preformatted_20_Text">extfm <text:s text:c="8"/>no <text:s/>Use EXTENDED file marks <text:s text:c="13"/>True</text:p>
            <text:p text:style-name="Preformatted_20_Text">ret <text:s text:c="10"/>yes RETENSION on tape change or reset <text:s text:c="3"/>True</text:p>
            <text:p text:style-name="Preformatted_20_Text">density_set_1 <text:s text:c="4"/>DENSITY setting #1 <text:s text:c="18"/>True</text:p>
            <text:p text:style-name="Preformatted_20_Text">density_set_2 <text:s text:c="4"/>DENSITY setting #2 <text:s text:c="18"/>True</text:p>
            <text:p text:style-name="Preformatted_20_Text">compress <text:s text:c="5"/>yes Use data COMPRESSION <text:s text:c="16"/>True</text:p>
            <text:p text:style-name="Preformatted_20_Text">size_in_mb <text:s text:c="3"/>0 <text:s text:c="2"/>Size in Megabytes <text:s text:c="19"/>False</text:p>
            <text:p text:style-name="Preformatted_20_Text">ret_error <text:s text:c="4"/>no <text:s/>RETURN error on tape change or reset True</text:p>
            <text:p text:style-name="P53">#</text:p>
          </table:table-cell>
        </table:table-row>
      </table:table>
      <text:p text:style-name="Text_20_body">Affichage des caractéristiques courantes (-E) de l'unité rmt0 (-l rmt0) avec les en-têtes de la sortie (-H) : </text:p>
      <table:table table:name="Tableau122" table:style-name="Tableau122">
        <table:table-column table:style-name="Tableau122.A"/>
        <table:table-row>
          <table:table-cell table:style-name="Tableau122.A1" office:value-type="string">
            <text:p text:style-name="Preformatted_20_Text"># lsattr -l rmt0 -E -H</text:p>
            <text:p text:style-name="Preformatted_20_Text">attribute <text:s text:c="4"/>value description <text:s text:c="25"/>user_settable</text:p>
            <text:p text:style-name="Preformatted_20_Text"/>
            <text:p text:style-name="Preformatted_20_Text">mode <text:s text:c="9"/>yes <text:s text:c="2"/>Use DEVICE BUFFERS during writes <text:s text:c="4"/>True</text:p>
            <text:p text:style-name="Preformatted_20_Text">block_size <text:s text:c="3"/>1024 <text:s/>BLOCK size (0=variable length) <text:s text:c="6"/>True</text:p>
            <text:p text:style-name="Preformatted_20_Text">extfm <text:s text:c="8"/>no <text:s text:c="3"/>Use EXTENDED file marks <text:s text:c="13"/>True</text:p>
            <text:p text:style-name="Preformatted_20_Text">ret <text:s text:c="10"/>no <text:s text:c="3"/>RETENSION on tape change or reset <text:s text:c="3"/>True</text:p>
            <text:p text:style-name="Preformatted_20_Text">density_set_1 39 <text:s text:c="3"/>DENSITY setting #1 <text:s text:c="18"/>True</text:p>
            <text:p text:style-name="Preformatted_20_Text">density_set_2 39 <text:s text:c="3"/>DENSITY setting #2 <text:s text:c="18"/>True</text:p>
            <text:p text:style-name="Preformatted_20_Text">compress <text:s text:c="5"/>yes <text:s text:c="2"/>Use data COMPRESSION <text:s text:c="16"/>True</text:p>
            <text:p text:style-name="Preformatted_20_Text">size_in_mb <text:s text:c="3"/>20000 Size in Megabytes <text:s text:c="19"/>False</text:p>
            <text:p text:style-name="Preformatted_20_Text">ret_error <text:s text:c="4"/>no <text:s text:c="3"/>RETURN error on tape change or reset True</text:p>
            <text:p text:style-name="P53">#</text:p>
          </table:table-cell>
        </table:table-row>
      </table:table>
      <text:p text:style-name="Text_20_body">Affichage des valeurs possibles (-R) pour l'attribut login (-a login) du périphérique tty0 (-l tty0) : </text:p>
      <table:table table:name="Tableau123" table:style-name="Tableau123">
        <table:table-column table:style-name="Tableau123.A"/>
        <table:table-row>
          <table:table-cell table:style-name="Tableau123.A1" office:value-type="string">
            <text:p text:style-name="Preformatted_20_Text"># lsattr -l tty0 -a login -R</text:p>
            <text:p text:style-name="Preformatted_20_Text">enable</text:p>
            <text:p text:style-name="Preformatted_20_Text">disable</text:p>
            <text:p text:style-name="Preformatted_20_Text">share</text:p>
            <text:p text:style-name="Preformatted_20_Text">delay</text:p>
            <text:p text:style-name="Preformatted_20_Text">hold</text:p>
            <text:p text:style-name="P53">#</text:p>
          </table:table-cell>
        </table:table-row>
      </table:table>
      <text:p text:style-name="Text_20_body">Affichage effectif des attributs système : </text:p>
      <table:table table:name="Tableau124" table:style-name="Tableau124">
        <table:table-column table:style-name="Tableau124.A"/>
        <table:table-row>
          <table:table-cell table:style-name="Tableau124.A1" office:value-type="string">
            <text:p text:style-name="Preformatted_20_Text"># lsattr -E -l sys0</text:p>
            <text:p text:style-name="Preformatted_20_Text">keylock <text:s text:c="5"/>normal <text:s text:c="7"/>State of system keylock at boot time <text:s text:c="13"/>False</text:p>
            <text:p text:style-name="Preformatted_20_Text">maxbuf <text:s text:c="6"/>20 <text:s text:c="11"/>Maximum number of pages in block I/O BUFFER CACHE True</text:p>
            <text:p text:style-name="Preformatted_20_Text">maxmbuf <text:s text:c="5"/>0 <text:s text:c="12"/>Maximum Kbytes of real memory allowed for MBUFS <text:s text:c="2"/>True</text:p>
            <text:p text:style-name="Preformatted_20_Text">maxuproc <text:s text:c="4"/>128 <text:s text:c="10"/>Maximum number of PROCESSES allowed per user <text:s text:c="5"/>True</text:p>
            <text:p text:style-name="Preformatted_20_Text">autorestart <text:s/>false <text:s text:c="8"/>Automatically REBOOT system after a crash <text:s text:c="8"/>True</text:p>
            <text:p text:style-name="Preformatted_20_Text">iostat <text:s text:c="6"/>false <text:s text:c="8"/>Continuously maintain DISK I/O history <text:s text:c="11"/>True</text:p>
            <text:p text:style-name="Preformatted_20_Text">realmem <text:s text:c="5"/>8388608 <text:s text:c="6"/>Amount of usable physical memory in Kbytes <text:s text:c="7"/>False</text:p>
            <text:p text:style-name="Preformatted_20_Text">conslogin <text:s text:c="3"/>enable <text:s text:c="7"/>System Console Login <text:s text:c="29"/>False</text:p>
            <text:p text:style-name="Preformatted_20_Text">fwversion <text:s text:c="3"/>IBM,M2P021208 Firmware version and revision levels <text:s text:c="13"/>False</text:p>
            <text:p text:style-name="Preformatted_20_Text">maxpout <text:s text:c="5"/>0 <text:s text:c="12"/>HIGH water mark for pending write I/Os per file <text:s text:c="2"/>True</text:p>
            <text:p text:style-name="Preformatted_20_Text">minpout <text:s text:c="5"/>0 <text:s text:c="12"/>LOW water mark for pending write I/Os per file <text:s text:c="3"/>True</text:p>
            <text:p text:style-name="Preformatted_20_Text">fullcore <text:s text:c="4"/>false <text:s text:c="8"/>Enable full CORE dump <text:s text:c="28"/>True</text:p>
            <text:p text:style-name="Preformatted_20_Text">pre430core <text:s text:c="2"/>false <text:s text:c="8"/>Use pre-430 style CORE dump <text:s text:c="22"/>True</text:p>
            <text:p text:style-name="Preformatted_20_Text">ncargs <text:s text:c="6"/>6 <text:s text:c="12"/>ARG/ENV list size in 4K byte blocks <text:s text:c="14"/>True</text:p>
            <text:p text:style-name="Preformatted_20_Text">rtasversion <text:s/>1 <text:s text:c="12"/>Open Firmware RTAS version <text:s text:c="23"/>False</text:p>
            <text:p text:style-name="Preformatted_20_Text">modelname <text:s text:c="3"/>IBM,7025-6F1 <text:s/>Machine name <text:s text:c="37"/>False</text:p>
            <text:p text:style-name="Preformatted_20_Text">systemid <text:s text:c="4"/>IBM,01657498A Hardware system identifier <text:s text:c="23"/>False</text:p>
            <text:p text:style-name="Preformatted_20_Text">boottype <text:s text:c="4"/>disk <text:s text:c="9"/>N/A <text:s text:c="46"/>False</text:p>
            <text:p text:style-name="Preformatted_20_Text">SW_dist_intr false <text:s text:c="8"/>Enable SW distribution of interrupts <text:s text:c="13"/>True</text:p>
            <text:p text:style-name="Preformatted_20_Text">cpuguard <text:s text:c="4"/>disable <text:s text:c="6"/>CPU Guard <text:s text:c="40"/>True</text:p>
            <text:p text:style-name="Preformatted_20_Text">frequency <text:s text:c="3"/>150400000 <text:s text:c="4"/>System Bus Frequency <text:s text:c="29"/>False</text:p>
            <text:p text:style-name="P53">#</text:p>
          </table:table-cell>
        </table:table-row>
      </table:table>
      <text:p text:style-name="Text_20_body">Affichage effectif des attributs de la mémoire : </text:p>
      <table:table table:name="Tableau125" table:style-name="Tableau125">
        <table:table-column table:style-name="Tableau125.A"/>
        <table:table-row>
          <table:table-cell table:style-name="Tableau125.A1" office:value-type="string">
            <text:p text:style-name="Preformatted_20_Text"># lsattr -E -l mem0</text:p>
            <text:p text:style-name="Preformatted_20_Text">size <text:s text:c="4"/>8192 Total amount of physical memory in Mbytes <text:s/>False</text:p>
            <text:p text:style-name="Preformatted_20_Text">goodsize 8192 Amount of usable physical memory in Mbytes False</text:p>
            <text:p text:style-name="P53">#</text:p>
          </table:table-cell>
        </table:table-row>
      </table:table>
      <text:p text:style-name="Text_20_body">Affichage effectif de l'attribut système realmem (-a realmem ) : </text:p>
      <table:table table:name="Tableau126" table:style-name="Tableau126">
        <table:table-column table:style-name="Tableau126.A"/>
        <table:table-row>
          <table:table-cell table:style-name="Tableau126.A1" office:value-type="string">
            <text:p text:style-name="Preformatted_20_Text"># lsattr -E -l sys0 -a realmem</text:p>
            <text:p text:style-name="Preformatted_20_Text">realmem 8388608 Amount of usable physical memory in Kbytes False</text:p>
            <text:p text:style-name="P53">#</text:p>
          </table:table-cell>
        </table:table-row>
      </table:table>
      <text:p text:style-name="Text_20_body">Affichage des attributs de toutes les unités : </text:p>
      <table:table table:name="Tableau127" table:style-name="Tableau127">
        <table:table-column table:style-name="Tableau127.A"/>
        <table:table-row>
          <table:table-cell table:style-name="Tableau127.A1" office:value-type="string">
            <text:p text:style-name="Preformatted_20_Text"># lsdev -C | while read dev foo ; do echo "*** $dev ***" ; lsattr -E -l $dev ; echo ; done</text:p>
            <text:p text:style-name="Preformatted_20_Text">*** sys0 ***</text:p>
            <text:p text:style-name="Preformatted_20_Text">keylock <text:s text:c="5"/>normal <text:s text:c="7"/>State of system keylock at boot time <text:s text:c="13"/>False</text:p>
            <text:p text:style-name="Preformatted_20_Text">maxbuf <text:s text:c="6"/>20 <text:s text:c="11"/>Maximum number of pages in block I/O BUFFER CACHE True</text:p>
            <text:p text:style-name="Preformatted_20_Text">maxmbuf <text:s text:c="5"/>0 <text:s text:c="12"/>Maximum Kbytes of real memory allowed for MBUFS <text:s text:c="2"/>True</text:p>
            <text:p text:style-name="Preformatted_20_Text">maxuproc <text:s text:c="4"/>128 <text:s text:c="10"/>Maximum number of PROCESSES allowed per user <text:s text:c="5"/>True</text:p>
            <text:p text:style-name="Preformatted_20_Text">autorestart <text:s/>false <text:s text:c="8"/>Automatically REBOOT system after a crash <text:s text:c="8"/>True</text:p>
            <text:p text:style-name="Preformatted_20_Text">iostat <text:s text:c="6"/>false <text:s text:c="8"/>Continuously maintain DISK I/O history <text:s text:c="11"/>True</text:p>
            <text:p text:style-name="Preformatted_20_Text">realmem <text:s text:c="5"/>8388608 <text:s text:c="6"/>Amount of usable physical memory in Kbytes <text:s text:c="7"/>False</text:p>
            <text:p text:style-name="Preformatted_20_Text">conslogin <text:s text:c="3"/>enable <text:s text:c="7"/>System Console Login <text:s text:c="29"/>False</text:p>
            <text:p text:style-name="Preformatted_20_Text">fwversion <text:s text:c="3"/>IBM,M2P021208 Firmware version and revision levels <text:s text:c="13"/>False</text:p>
            <text:p text:style-name="Preformatted_20_Text">maxpout <text:s text:c="5"/>0 <text:s text:c="12"/>HIGH water mark for pending write I/Os per file <text:s text:c="2"/>True</text:p>
            <text:p text:style-name="Preformatted_20_Text">minpout <text:s text:c="5"/>0 <text:s text:c="12"/>LOW water mark for pending write I/Os per file <text:s text:c="3"/>True</text:p>
            <text:p text:style-name="Preformatted_20_Text">fullcore <text:s text:c="4"/>false <text:s text:c="8"/>Enable full CORE dump <text:s text:c="28"/>True</text:p>
            <text:p text:style-name="Preformatted_20_Text">pre430core <text:s text:c="2"/>false <text:s text:c="8"/>Use pre-430 style CORE dump <text:s text:c="22"/>True</text:p>
            <text:p text:style-name="Preformatted_20_Text">ncargs <text:s text:c="6"/>6 <text:s text:c="12"/>ARG/ENV list size in 4K byte blocks <text:s text:c="14"/>True</text:p>
            <text:p text:style-name="Preformatted_20_Text">rtasversion <text:s/>1 <text:s text:c="12"/>Open Firmware RTAS version <text:s text:c="23"/>False</text:p>
            <text:p text:style-name="Preformatted_20_Text">modelname <text:s text:c="3"/>IBM,7025-6F1 <text:s/>Machine name <text:s text:c="37"/>False</text:p>
            <text:p text:style-name="Preformatted_20_Text">systemid <text:s text:c="4"/>IBM,01657498A Hardware system identifier <text:s text:c="23"/>False</text:p>
            <text:p text:style-name="Preformatted_20_Text">boottype <text:s text:c="4"/>disk <text:s text:c="9"/>N/A <text:s text:c="46"/>False</text:p>
            <text:p text:style-name="Preformatted_20_Text">SW_dist_intr false <text:s text:c="8"/>Enable SW distribution of interrupts <text:s text:c="13"/>True</text:p>
            <text:p text:style-name="Preformatted_20_Text">cpuguard <text:s text:c="4"/>disable <text:s text:c="6"/>CPU Guard <text:s text:c="40"/>True</text:p>
            <text:p text:style-name="Preformatted_20_Text">frequency <text:s text:c="3"/>150400000 <text:s text:c="4"/>System Bus Frequency <text:s text:c="29"/>False</text:p>
            <text:p text:style-name="Preformatted_20_Text"/>
            <text:p text:style-name="Preformatted_20_Text">*** sysplanar0 ***</text:p>
            <text:p text:style-name="Preformatted_20_Text"/>
            <text:p text:style-name="Preformatted_20_Text">*** pci0 ***</text:p>
            <text:p text:style-name="Preformatted_20_Text">bus_id <text:s text:c="4"/>0x900000c0 Bus Identifier False</text:p>
            <text:p text:style-name="Preformatted_20_Text">bus_number 0x0 <text:s text:c="7"/>PCI Bus Number False</text:p>
            <text:p text:style-name="Preformatted_20_Text"/>
            <text:p text:style-name="Preformatted_20_Text">*** pci1 ***</text:p>
            <text:p text:style-name="Preformatted_20_Text">bus_id <text:s text:c="4"/>0x900000c1 Bus Identifier False</text:p>
            <text:p text:style-name="Preformatted_20_Text">bus_number 0x10 <text:s text:c="6"/>PCI Bus Number False</text:p>
            <text:p text:style-name="Preformatted_20_Text"/>
            <text:p text:style-name="Preformatted_20_Text">*** isa0 ***</text:p>
            <text:p text:style-name="Preformatted_20_Text">bus_id 0x90000100 Bus Identifier False</text:p>
            <text:p text:style-name="Preformatted_20_Text"/>
            <text:p text:style-name="Preformatted_20_Text">*** sa0 ***</text:p>
            <text:p text:style-name="Preformatted_20_Text">bus_io_addr <text:s text:c="2"/>0x3f8 Bus I/O address <text:s text:c="4"/>False</text:p>
            <text:p text:style-name="Preformatted_20_Text">bus_intr_lvl <text:s/>4 <text:s text:c="4"/>Bus interrupt level False</text:p>
            <text:p text:style-name="Preformatted_20_Text">intr_priority 1 <text:s text:c="4"/>Interrupt priority <text:s/>False</text:p>
            <text:p text:style-name="Preformatted_20_Text"/>
            <text:p text:style-name="Preformatted_20_Text">[...]</text:p>
            <text:p text:style-name="P53">#</text:p>
          </table:table-cell>
        </table:table-row>
      </table:table>
      <text:p text:style-name="Text_20_body">Affichage des informations relatives aux unités configurées : </text:p>
      <table:table table:name="Tableau128" table:style-name="Tableau128">
        <table:table-column table:style-name="Tableau128.A"/>
        <table:table-row>
          <table:table-cell table:style-name="Tableau128.A1" office:value-type="string">
            <text:p text:style-name="Preformatted_20_Text"># lscfg</text:p>
            <text:p text:style-name="Preformatted_20_Text">INSTALLED RESOURCE LIST</text:p>
            <text:p text:style-name="Preformatted_20_Text"/>
            <text:p text:style-name="Preformatted_20_Text">The following resources are installed on the machine.</text:p>
            <text:p text:style-name="Preformatted_20_Text">+/- = Added or deleted from Resource List.</text:p>
            <text:p text:style-name="Preformatted_20_Text">* <text:s text:c="2"/>= Diagnostic support not available.</text:p>
            <text:p text:style-name="Preformatted_20_Text"><text:s text:c="8"/></text:p>
            <text:p text:style-name="Preformatted_20_Text"><text:s text:c="2"/>Model Architecture: chrp</text:p>
            <text:p text:style-name="Preformatted_20_Text"><text:s text:c="2"/>Model Implementation: Multiple Processor, PCI bus</text:p>
            <text:p text:style-name="Preformatted_20_Text"><text:s text:c="8"/></text:p>
            <text:p text:style-name="Preformatted_20_Text">+ sys0 <text:s text:c="13"/>00-00 <text:s text:c="12"/>System Object</text:p>
            <text:p text:style-name="Preformatted_20_Text">+ sysplanar0 <text:s text:c="7"/>00-00 <text:s text:c="12"/>System Planar</text:p>
            <text:p text:style-name="Preformatted_20_Text">+ mem0 <text:s text:c="13"/>00-00 <text:s text:c="12"/>Memory</text:p>
            <text:p text:style-name="Preformatted_20_Text">+ proc0 <text:s text:c="12"/>00-00 <text:s text:c="12"/>Processor</text:p>
            <text:p text:style-name="Preformatted_20_Text">+ L2cache0 <text:s text:c="9"/>00-00 <text:s text:c="12"/>L2 Cache</text:p>
            <text:p text:style-name="Preformatted_20_Text">* pmc0 <text:s text:c="13"/>00-00 <text:s text:c="12"/>n/a</text:p>
            <text:p text:style-name="Preformatted_20_Text">+ proc2 <text:s text:c="12"/>00-02 <text:s text:c="12"/>Processor</text:p>
            <text:p text:style-name="Preformatted_20_Text">* pci0 <text:s text:c="13"/>00-fff7f09000 <text:s text:c="4"/>PCI Bus</text:p>
            <text:p text:style-name="Preformatted_20_Text">* isa0 <text:s text:c="13"/>10-80 <text:s text:c="12"/>ISA Bus</text:p>
            <text:p text:style-name="Preformatted_20_Text">+ fda0 <text:s text:c="13"/>01-D1 <text:s text:c="12"/>Standard I/O Diskette Adapter</text:p>
            <text:p text:style-name="Preformatted_20_Text">+ fd0 <text:s text:c="14"/>01-D1-00-00 <text:s text:c="6"/>Diskette Drive</text:p>
            <text:p text:style-name="Preformatted_20_Text">* siokma0 <text:s text:c="10"/>01-K1 <text:s text:c="12"/>Keyboard/Mouse Adapter</text:p>
            <text:p text:style-name="Preformatted_20_Text">+ sioka0 <text:s text:c="11"/>01-K1-00 <text:s text:c="9"/>Keyboard Adapter</text:p>
            <text:p text:style-name="Preformatted_20_Text">+ sioma0 <text:s text:c="11"/>01-K1-01 <text:s text:c="9"/>Mouse Adapter</text:p>
            <text:p text:style-name="Preformatted_20_Text">+ ppa0 <text:s text:c="13"/>01-R1 <text:s text:c="12"/>CHRP IEEE1284 (ECP) Parallel Port</text:p>
            <text:p text:style-name="Preformatted_20_Text"><text:s text:c="38"/>Adapter</text:p>
            <text:p text:style-name="Preformatted_20_Text">+ sa0 <text:s text:c="14"/>01-S1 <text:s text:c="12"/>Standard I/O Serial Port</text:p>
            <text:p text:style-name="Preformatted_20_Text">+ tty0 <text:s text:c="13"/>01-S1-00-00 <text:s text:c="6"/>Asynchronous Terminal</text:p>
            <text:p text:style-name="Preformatted_20_Text">+ sa1 <text:s text:c="14"/>01-S2 <text:s text:c="12"/>Standard I/O Serial Port</text:p>
            <text:p text:style-name="Preformatted_20_Text">+ sa2 <text:s text:c="14"/>01-S3 <text:s text:c="12"/>Standard I/O Serial Port</text:p>
            <text:p text:style-name="Preformatted_20_Text">+ sa3 <text:s text:c="14"/>01-S4 <text:s text:c="12"/>Standard I/O Serial Port</text:p>
            <text:p text:style-name="Preformatted_20_Text">* pci2 <text:s text:c="13"/>10-58 <text:s text:c="12"/>PCI Bus</text:p>
            <text:p text:style-name="Preformatted_20_Text">+ scsi0 <text:s text:c="12"/>11-08 <text:s text:c="12"/>Wide/Ultra-2 SCSI I/O Controller</text:p>
            <text:p text:style-name="Preformatted_20_Text">+ rmt0 <text:s text:c="13"/>11-08-00-0,0 <text:s text:c="5"/>SCSI 8mm Tape Drive (20000 MB)</text:p>
            <text:p text:style-name="Preformatted_20_Text">+ cd0 <text:s text:c="14"/>11-08-00-1,0 <text:s text:c="5"/>16 Bit SCSI Multimedia CD-ROM Drive</text:p>
            <text:p text:style-name="Preformatted_20_Text"><text:s text:c="38"/>(650 MB)</text:p>
            <text:p text:style-name="Preformatted_20_Text">+ hdisk0 <text:s text:c="11"/>11-08-00-2,0 <text:s text:c="5"/>16 Bit LVD SCSI Disk Drive (18200</text:p>
            <text:p text:style-name="Preformatted_20_Text"><text:s text:c="38"/>MB)</text:p>
            <text:p text:style-name="Preformatted_20_Text">+ hdisk1 <text:s text:c="11"/>11-08-00-4,0 <text:s text:c="5"/>16 Bit LVD SCSI Disk Drive (18200</text:p>
            <text:p text:style-name="Preformatted_20_Text"><text:s text:c="38"/>MB)</text:p>
            <text:p text:style-name="Preformatted_20_Text">+ scsi1 <text:s text:c="12"/>11-09 <text:s text:c="12"/>Wide/Ultra-2 SCSI I/O Controller</text:p>
            <text:p text:style-name="Preformatted_20_Text">* pci3 <text:s text:c="13"/>10-5a <text:s text:c="12"/>PCI Bus </text:p>
            <text:p text:style-name="Preformatted_20_Text">+ ent0 <text:s text:c="13"/>1A-08 <text:s text:c="12"/>IBM 10/100 Mbps Ethernet PCI Adapter</text:p>
            <text:p text:style-name="Preformatted_20_Text"><text:s text:c="38"/>(23100020)</text:p>
            <text:p text:style-name="Preformatted_20_Text">* pci1 <text:s text:c="13"/>00-fff7f0a000 <text:s text:c="4"/>PCI Bus </text:p>
            <text:p text:style-name="Preformatted_20_Text">+ ent1 <text:s text:c="13"/>21-08 <text:s text:c="12"/>IBM 10/100 Mbps Ethernet PCI Adapter</text:p>
            <text:p text:style-name="Preformatted_20_Text"><text:s text:c="38"/>(231000 </text:p>
            <text:p text:style-name="Preformatted_20_Text">+ scsi2 <text:s text:c="12"/>27-08 <text:s text:c="12"/>Wide/Fast-20 SCSI I/O Controller</text:p>
            <text:p text:style-name="Preformatted_20_Text">+ hdisk2 <text:s text:c="11"/>27-08-00-0,0 <text:s text:c="5"/>Other SCSI Disk Drive</text:p>
            <text:p text:style-name="Preformatted_20_Text">+ hdisk3 <text:s text:c="11"/>27-08-00-1,0 <text:s text:c="5"/>Other S </text:p>
            <text:p text:style-name="Preformatted_20_Text">+ scsi3 <text:s text:c="12"/>3A-08 <text:s text:c="12"/>Wide/Fast-20 SCSI I/O Controller</text:p>
            <text:p text:style-name="P53">#</text:p>
          </table:table-cell>
        </table:table-row>
      </table:table>
      <text:p text:style-name="Text_20_body">Affichage des informations relatives aux unités configurées avec en plus les VPD " vital product data " (-v) : </text:p>
      <table:table table:name="Tableau129" table:style-name="Tableau129">
        <table:table-column table:style-name="Tableau129.A"/>
        <table:table-row>
          <table:table-cell table:style-name="Tableau129.A1" office:value-type="string">
            <text:p text:style-name="Preformatted_20_Text"># lscfg -v</text:p>
            <text:p text:style-name="Preformatted_20_Text">INSTALLED RESOURCE LIST WITH VPD</text:p>
            <text:p text:style-name="Preformatted_20_Text"/>
            <text:p text:style-name="Preformatted_20_Text">The following resources are installed on your machine.</text:p>
            <text:p text:style-name="Preformatted_20_Text"><text:s text:c="8"/></text:p>
            <text:p text:style-name="Preformatted_20_Text"><text:s text:c="2"/>Model Architecture: chrp</text:p>
            <text:p text:style-name="Preformatted_20_Text"><text:s text:c="2"/>Model Implementation: Multiple Processor, PCI bus</text:p>
            <text:p text:style-name="Preformatted_20_Text"/>
            <text:p text:style-name="Preformatted_20_Text"><text:s text:c="2"/>sys0 <text:s text:c="13"/>00-00 <text:s text:c="12"/>System Object</text:p>
            <text:p text:style-name="Preformatted_20_Text"><text:s text:c="2"/>sysplanar0 <text:s text:c="7"/>00-00 <text:s text:c="12"/>System Planar</text:p>
            <text:p text:style-name="Preformatted_20_Text"><text:s text:c="2"/>mem0 <text:s text:c="13"/>00-00 <text:s text:c="12"/>Memory</text:p>
            <text:p text:style-name="Preformatted_20_Text"><text:s text:c="2"/>proc0 <text:s text:c="12"/>00-00 <text:s text:c="12"/>Processor</text:p>
            <text:p text:style-name="Preformatted_20_Text"/>
            <text:p text:style-name="Preformatted_20_Text"><text:s text:c="8"/>Device Specific.(YL)........P1-C1</text:p>
            <text:p text:style-name="Preformatted_20_Text"/>
            <text:p text:style-name="Preformatted_20_Text"><text:s text:c="2"/>L2cache0 <text:s text:c="9"/>00-00 <text:s text:c="12"/>L2 Cache</text:p>
            <text:p text:style-name="Preformatted_20_Text"><text:s text:c="2"/>pmc0 <text:s text:c="13"/>00-00 <text:s text:c="12"/>n/a</text:p>
            <text:p text:style-name="Preformatted_20_Text"><text:s text:c="2"/>proc2 <text:s text:c="12"/>00-02 <text:s text:c="12"/>Processor</text:p>
            <text:p text:style-name="Preformatted_20_Text"/>
            <text:p text:style-name="Preformatted_20_Text"><text:s text:c="8"/>Device Specific.(YL)........P1-C1</text:p>
            <text:p text:style-name="Preformatted_20_Text"/>
            <text:p text:style-name="Preformatted_20_Text"><text:s text:c="2"/>pci0 <text:s text:c="13"/>00-fff7f09000 <text:s text:c="4"/>PCI Bus</text:p>
            <text:p text:style-name="Preformatted_20_Text"/>
            <text:p text:style-name="Preformatted_20_Text"><text:s text:c="8"/>Device Specific.(YL)........P1</text:p>
            <text:p text:style-name="Preformatted_20_Text"/>
            <text:p text:style-name="Preformatted_20_Text"><text:s text:c="2"/>isa0 <text:s text:c="13"/>10-80 <text:s text:c="12"/>ISA Bus</text:p>
            <text:p text:style-name="Preformatted_20_Text"/>
            <text:p text:style-name="Preformatted_20_Text"><text:s text:c="8"/>Device Specific.(YL)........P1</text:p>
            <text:p text:style-name="Preformatted_20_Text"/>
            <text:p text:style-name="Preformatted_20_Text"><text:s text:c="2"/>fda0 <text:s text:c="13"/>01-D1 <text:s text:c="12"/>Standard I/O Diskette Adapter</text:p>
            <text:p text:style-name="Preformatted_20_Text"/>
            <text:p text:style-name="Preformatted_20_Text"><text:s text:c="8"/>Device Specific.(YL)........P1/D1</text:p>
            <text:p text:style-name="Preformatted_20_Text"/>
            <text:p text:style-name="Preformatted_20_Text"><text:s text:c="2"/>fd0 <text:s text:c="14"/>01-D1-00-00 <text:s text:c="6"/>Diskette Drive</text:p>
            <text:p text:style-name="Preformatted_20_Text"><text:s text:c="2"/>siokma0 <text:s text:c="10"/>01-K1 <text:s text:c="12"/>Keyboard/Mouse Adapter</text:p>
            <text:p text:style-name="Preformatted_20_Text"/>
            <text:p text:style-name="Preformatted_20_Text"><text:s text:c="8"/>Device Specific.(YL)........P1/K1</text:p>
            <text:p text:style-name="Preformatted_20_Text"/>
            <text:p text:style-name="Preformatted_20_Text"><text:s text:c="2"/>sioka0 <text:s text:c="11"/>01-K1-00 <text:s text:c="9"/>Keyboard Adapter</text:p>
            <text:p text:style-name="Preformatted_20_Text"><text:s text:c="2"/>sioma0 <text:s text:c="11"/>01-K1-01 <text:s text:c="9"/>Mouse Adapter</text:p>
            <text:p text:style-name="Preformatted_20_Text"><text:s text:c="2"/>ppa0 <text:s text:c="13"/>01-R1 <text:s text:c="12"/>CHRP IEEE1284 (ECP) Parallel Port</text:p>
            <text:p text:style-name="Preformatted_20_Text"><text:s text:c="38"/>Adapter</text:p>
            <text:p text:style-name="Preformatted_20_Text"/>
            <text:p text:style-name="Preformatted_20_Text"><text:s text:c="8"/>Device Specific.(YL)........P1/R1</text:p>
            <text:p text:style-name="Preformatted_20_Text"/>
            <text:p text:style-name="Preformatted_20_Text"><text:s text:c="2"/>sa0 <text:s text:c="14"/>01-S1 <text:s text:c="12"/>Standard I/O Serial Port</text:p>
            <text:p text:style-name="Preformatted_20_Text"/>
            <text:p text:style-name="Preformatted_20_Text"><text:s text:c="8"/>Device Specific.(YL)........P1/S1</text:p>
            <text:p text:style-name="Preformatted_20_Text"/>
            <text:p text:style-name="Preformatted_20_Text"><text:s text:c="2"/>tty0 <text:s text:c="13"/>01-S1-00-00 <text:s text:c="6"/>Asynchronous Terminal</text:p>
            <text:p text:style-name="Preformatted_20_Text"><text:s text:c="2"/>sa1 <text:s text:c="14"/>01-S2 <text:s text:c="12"/>Standard I/O Serial Port</text:p>
            <text:p text:style-name="Preformatted_20_Text"/>
            <text:p text:style-name="Preformatted_20_Text"><text:s text:c="8"/>Device Specific.(YL)........P1/S2</text:p>
            <text:p text:style-name="Preformatted_20_Text">[...]</text:p>
            <text:p text:style-name="P53">#</text:p>
          </table:table-cell>
        </table:table-row>
      </table:table>
      <text:p text:style-name="Text_20_body">Affichage des codes d'emplacement physique des unités : </text:p>
      <table:table table:name="Tableau130" table:style-name="Tableau130">
        <table:table-column table:style-name="Tableau130.A"/>
        <table:table-row>
          <table:table-cell table:style-name="Tableau130.A1" office:value-type="string">
            <text:p text:style-name="Preformatted_20_Text"># lscfg -p</text:p>
            <text:p text:style-name="Preformatted_20_Text">INSTALLED RESOURCE LIST</text:p>
            <text:p text:style-name="Preformatted_20_Text"/>
            <text:p text:style-name="Preformatted_20_Text">The following resources are installed on the machine.</text:p>
            <text:p text:style-name="Preformatted_20_Text"><text:s text:c="8"/></text:p>
            <text:p text:style-name="Preformatted_20_Text"><text:s text:c="2"/>Model Architecture: chrp</text:p>
            <text:p text:style-name="Preformatted_20_Text"><text:s text:c="2"/>Model Implementation: Multiple Processor, PCI bus</text:p>
            <text:p text:style-name="Preformatted_20_Text"/>
            <text:p text:style-name="Preformatted_20_Text"><text:s text:c="2"/>sys0 <text:s text:c="13"/>00-00 <text:s text:c="12"/>System Object</text:p>
            <text:p text:style-name="Preformatted_20_Text"><text:s text:c="2"/>sysplanar0 <text:s text:c="7"/>00-00 <text:s text:c="12"/>System Planar</text:p>
            <text:p text:style-name="Preformatted_20_Text"><text:s text:c="2"/>mem0 <text:s text:c="13"/>00-00 <text:s text:c="12"/>Memory</text:p>
            <text:p text:style-name="Preformatted_20_Text"><text:s text:c="2"/>proc0 <text:s text:c="12"/>00-00 <text:s text:c="12"/>Processor</text:p>
            <text:p text:style-name="Preformatted_20_Text"><text:s text:c="2"/>L2cache0 <text:s text:c="9"/>00-00 <text:s text:c="12"/>L2 Cache</text:p>
            <text:p text:style-name="Preformatted_20_Text"><text:s text:c="2"/>pmc0 <text:s text:c="13"/>00-00 <text:s text:c="12"/>n/a</text:p>
            <text:p text:style-name="Preformatted_20_Text"><text:s text:c="2"/>proc2 <text:s text:c="12"/>00-02 <text:s text:c="12"/>Processor</text:p>
            <text:p text:style-name="Preformatted_20_Text"><text:s text:c="2"/>proc4 <text:s text:c="12"/>00-04 <text:s text:c="12"/>Processor</text:p>
            <text:p text:style-name="Preformatted_20_Text"><text:s text:c="2"/>proc6 <text:s text:c="12"/>00-06 <text:s text:c="12"/>Processor</text:p>
            <text:p text:style-name="Preformatted_20_Text"><text:s text:c="2"/>pci0 <text:s text:c="13"/>00-fff7f09000 <text:s text:c="4"/>PCI Bus</text:p>
            <text:p text:style-name="Preformatted_20_Text"><text:s text:c="2"/>isa0 <text:s text:c="13"/>10-80 <text:s text:c="12"/>ISA Bus</text:p>
            <text:p text:style-name="Preformatted_20_Text">[...]</text:p>
            <text:p text:style-name="P53">#</text:p>
          </table:table-cell>
        </table:table-row>
      </table:table>
      <text:p text:style-name="Text_20_body">Affichage des informations relatives aux cartes réseau (-l ent\*) </text:p>
      <table:table table:name="Tableau131" table:style-name="Tableau131">
        <table:table-column table:style-name="Tableau131.A"/>
        <table:table-row>
          <table:table-cell table:style-name="Tableau131.A1" office:value-type="string">
            <text:p text:style-name="Preformatted_20_Text"># lscfg -v -l ent\*</text:p>
            <text:p text:style-name="Preformatted_20_Text"><text:s text:c="2"/>DEVICE <text:s text:c="11"/>LOCATION <text:s text:c="9"/>DESCRIPTION</text:p>
            <text:p text:style-name="Preformatted_20_Text"><text:s text:c="8"/></text:p>
            <text:p text:style-name="Preformatted_20_Text"><text:s text:c="2"/>ent0 <text:s text:c="13"/>1A-08 <text:s text:c="12"/>IBM 10/100 Mbps Ethernet PCI Adapter</text:p>
            <text:p text:style-name="Preformatted_20_Text"><text:s text:c="38"/>(23100020)</text:p>
            <text:p text:style-name="Preformatted_20_Text"/>
            <text:p text:style-name="Preformatted_20_Text"><text:s text:c="8"/>Serial Number...............16014311</text:p>
            <text:p text:style-name="Preformatted_20_Text"><text:s text:c="8"/>FRU Number..................091H0397</text:p>
            <text:p text:style-name="Preformatted_20_Text"><text:s text:c="8"/>Part Number.................091H0397</text:p>
            <text:p text:style-name="Preformatted_20_Text"><text:s text:c="8"/>Network Address.............00025509E8EC</text:p>
            <text:p text:style-name="Preformatted_20_Text"><text:s text:c="8"/>Displayable Message.........PCI Ethernet Adapter (23100020) </text:p>
            <text:p text:style-name="Preformatted_20_Text"><text:s text:c="8"/>Device Specific.(YL)........P1-I3/E1</text:p>
            <text:p text:style-name="Preformatted_20_Text"/>
            <text:p text:style-name="Preformatted_20_Text"><text:s text:c="2"/>ent1 <text:s text:c="13"/>21-08 <text:s text:c="12"/>IBM 10/100 Mbps Ethernet PCI Adapter</text:p>
            <text:p text:style-name="Preformatted_20_Text"><text:s text:c="38"/>(23100020)</text:p>
            <text:p text:style-name="Preformatted_20_Text"/>
            <text:p text:style-name="Preformatted_20_Text"><text:s text:c="8"/>Network Address.............00062984859F</text:p>
            <text:p text:style-name="Preformatted_20_Text"><text:s text:c="8"/>Displayable Message.........PCI Ethernet Adapter (23100020) </text:p>
            <text:p text:style-name="Preformatted_20_Text"><text:s text:c="8"/>Device Specific.(YL)........P1/E1</text:p>
            <text:p text:style-name="Preformatted_20_Text"/>
            <text:p text:style-name="P53">#</text:p>
          </table:table-cell>
        </table:table-row>
      </table:table>
      <text:p text:style-name="Text_20_body">Affichage des informations sur le modèle, le type de processeur, la taille de la mémoire, le réseau, la pagination, ... : </text:p>
      <table:table table:name="Tableau132" table:style-name="Tableau132">
        <table:table-column table:style-name="Tableau132.A"/>
        <table:table-row>
          <table:table-cell table:style-name="Tableau132.A1" office:value-type="string">
            <text:p text:style-name="Preformatted_20_Text"># prtconf</text:p>
            <text:p text:style-name="Preformatted_20_Text">System Model: IBM,7025-6F1</text:p>
            <text:p text:style-name="Preformatted_20_Text">Machine Serial Number: 657498A</text:p>
            <text:p text:style-name="Preformatted_20_Text">Processor Type: PowerPC_RS64-IV</text:p>
            <text:p text:style-name="Preformatted_20_Text">Number Of Processors: 4</text:p>
            <text:p text:style-name="Preformatted_20_Text">Processor Clock Speed: 602 MHz</text:p>
            <text:p text:style-name="Preformatted_20_Text">CPU Type: 64-bit</text:p>
            <text:p text:style-name="Preformatted_20_Text">Kernel Type: 32-bit</text:p>
            <text:p text:style-name="Preformatted_20_Text">LPAR Info: -1 NULL</text:p>
            <text:p text:style-name="Preformatted_20_Text">Memory Size: 8192 MB</text:p>
            <text:p text:style-name="Preformatted_20_Text">Good Memory Size: 8192 MB</text:p>
            <text:p text:style-name="Preformatted_20_Text">Firmware Version: IBM,M2P021208</text:p>
            <text:p text:style-name="Preformatted_20_Text">Console Login: enable</text:p>
            <text:p text:style-name="Preformatted_20_Text">Auto Restart: false</text:p>
            <text:p text:style-name="Preformatted_20_Text">Full Core: false</text:p>
            <text:p text:style-name="Preformatted_20_Text"><text:s/></text:p>
            <text:p text:style-name="Preformatted_20_Text">Network Information</text:p>
            <text:p text:style-name="Preformatted_20_Text"><text:s text:c="8"/>Host Name: tarsier</text:p>
            <text:p text:style-name="Preformatted_20_Text"><text:s text:c="8"/>IP Address: 10.41.11.15</text:p>
            <text:p text:style-name="Preformatted_20_Text"><text:s text:c="8"/>Sub Netmask: 255.255.0.0</text:p>
            <text:p text:style-name="Preformatted_20_Text"><text:s text:c="8"/>Gateway: 10.41.54.1</text:p>
            <text:p text:style-name="Preformatted_20_Text"><text:s text:c="8"/>Name Server: 10.41.13.22</text:p>
            <text:p text:style-name="Preformatted_20_Text"><text:s text:c="8"/>Domain Name: au.boulot</text:p>
            <text:p text:style-name="Preformatted_20_Text"><text:s/></text:p>
            <text:p text:style-name="Preformatted_20_Text">Paging Space Information</text:p>
            <text:p text:style-name="Preformatted_20_Text"><text:s text:c="8"/>Total Paging Space: 512MB</text:p>
            <text:p text:style-name="Preformatted_20_Text"><text:s text:c="8"/>Percent Used: 1%</text:p>
            <text:p text:style-name="Preformatted_20_Text"><text:s/></text:p>
            <text:p text:style-name="Preformatted_20_Text">Volume Groups Information</text:p>
            <text:p text:style-name="Preformatted_20_Text">============================================================================== </text:p>
            <text:p text:style-name="Preformatted_20_Text">rootvg:</text:p>
            <text:p text:style-name="Preformatted_20_Text">PV_NAME <text:s text:c="10"/>PV STATE <text:s text:c="9"/>TOTAL PPs <text:s text:c="2"/>FREE PPs <text:s text:c="3"/>FREE DISTRIBUTION</text:p>
            <text:p text:style-name="Preformatted_20_Text">hdisk0 <text:s text:c="11"/>active <text:s text:c="11"/>542 <text:s text:c="8"/>58 <text:s text:c="9"/>29..00..00..00..29</text:p>
            <text:p text:style-name="Preformatted_20_Text">hdisk1 <text:s text:c="11"/>active <text:s text:c="11"/>542 <text:s text:c="8"/>449 <text:s text:c="8"/>108..67..57..108..109</text:p>
            <text:p text:style-name="Preformatted_20_Text">============================================================================== </text:p>
            <text:p text:style-name="Preformatted_20_Text">[...] </text:p>
            <text:p text:style-name="P53">#</text:p>
          </table:table-cell>
        </table:table-row>
      </table:table>
      <text:p text:style-name="Text_20_body"><text:a xlink:type="simple" xlink:href="http://www.linux-france.org/%7Emdecore/aix/memo-aix/memo-aix.html#top">Top</text:a><text:bookmark text:name="subsec14.2"/></text:p>
      <text:h text:style-name="Heading_20_3" text:outline-level="3">14.2. Configurer les unités</text:h>
      <text:p text:style-name="Text_20_body">Rendre toute les unités auto configurables (toutes les unités sauf parallèle ou série, soit les imprimantes et les terminaux ASCII) disponibles (ie. sous tension) : </text:p>
      <table:table table:name="Tableau133" table:style-name="Tableau133">
        <table:table-column table:style-name="Tableau133.A"/>
        <table:table-row>
          <table:table-cell table:style-name="Tableau133.A1" office:value-type="string">
            <text:p text:style-name="Preformatted_20_Text"># cfgmgr</text:p>
            <text:p text:style-name="P53">#</text:p>
          </table:table-cell>
        </table:table-row>
      </table:table>
      <text:p text:style-name="Text_20_body">Rendre une unité disponible reliée par SCSI (-l scsi0) avec un affichage verbeux (-v) : </text:p>
      <table:table table:name="Tableau134" table:style-name="Tableau134">
        <table:table-column table:style-name="Tableau134.A"/>
        <table:table-row>
          <table:table-cell table:style-name="Tableau134.A1" office:value-type="string">
            <text:p text:style-name="Preformatted_20_Text"># cfgmgr -v -l scsi0</text:p>
            <text:p text:style-name="Preformatted_20_Text">----------------</text:p>
            <text:p text:style-name="Preformatted_20_Text">tentative de configuration de l'unité 'scsi0'</text:p>
            <text:p text:style-name="Preformatted_20_Text">Time: 0 LEDS: 0x2522</text:p>
            <text:p text:style-name="Preformatted_20_Text">appel de /usr/lib/methods/cfgsisscsib -l scsi0 </text:p>
            <text:p text:style-name="Preformatted_20_Text">Number of running methods: 1</text:p>
            <text:p text:style-name="Preformatted_20_Text">----------------</text:p>
            <text:p text:style-name="Preformatted_20_Text">Completed method for: scsi0, Elapsed time = 0</text:p>
            <text:p text:style-name="Preformatted_20_Text">code retour = 0</text:p>
            <text:p text:style-name="Preformatted_20_Text">************ sortie standard ********</text:p>
            <text:p text:style-name="Preformatted_20_Text">rmt0 ses0 </text:p>
            <text:p text:style-name="Preformatted_20_Text">*********** erreur standard *********</text:p>
            <text:p text:style-name="Preformatted_20_Text">Configuring device: scsi0</text:p>
            <text:p text:style-name="Preformatted_20_Text">Calling define_children()</text:p>
            <text:p text:style-name="Preformatted_20_Text">cfgsisscsib: entering define children routine</text:p>
            <text:p text:style-name="Preformatted_20_Text">update_vpd: parent devno = 0xe0000</text:p>
            <text:p text:style-name="Preformatted_20_Text">update_vpd: kmid = 0x706be00</text:p>
            <text:p text:style-name="Preformatted_20_Text">update_vpd: calling sysconfig with CFG_QVPD</text:p>
            <text:p text:style-name="Preformatted_20_Text">hexdump(): length=32</text:p>
            <text:p text:style-name="Preformatted_20_Text">90 0b 00 52 4d 08 30 32 <text:s text:c="2"/>30 41 30 30 34 39 79 1e <text:s text:c="7"/>...RM.02 0A0049y. </text:p>
            <text:p text:style-name="Preformatted_20_Text"/>
            <text:p text:style-name="Preformatted_20_Text">00 00 00 00 00 00 00 00 <text:s text:c="2"/>00 00 00 00 00 00 00 00 <text:s text:c="7"/>........ ........ </text:p>
            <text:p text:style-name="Preformatted_20_Text"/>
            <text:p text:style-name="Preformatted_20_Text"><text:s text:c="7"/></text:p>
            <text:p text:style-name="Preformatted_20_Text"/>
            <text:p text:style-name="Preformatted_20_Text">update_vpd: CuVPD updated</text:p>
            <text:p text:style-name="Preformatted_20_Text"/>
            <text:p text:style-name="Preformatted_20_Text">----------------</text:p>
            <text:p text:style-name="Preformatted_20_Text">Time: 0 LEDS: 0x539</text:p>
            <text:p text:style-name="Preformatted_20_Text">Number of running methods: 0</text:p>
            <text:p text:style-name="Preformatted_20_Text">----------------</text:p>
            <text:p text:style-name="Preformatted_20_Text">tentative de configuration de l'unité 'rmt0'</text:p>
            <text:p text:style-name="Preformatted_20_Text">Time: 0 LEDS: 0x68c</text:p>
            <text:p text:style-name="Preformatted_20_Text">appel de /etc/methods/cfgsctape -l rmt0 </text:p>
            <text:p text:style-name="Preformatted_20_Text">Number of running methods: 1</text:p>
            <text:p text:style-name="Preformatted_20_Text">----------------</text:p>
            <text:p text:style-name="Preformatted_20_Text">Completed method for: rmt0, Elapsed time = 0</text:p>
            <text:p text:style-name="Preformatted_20_Text">code retour = 0</text:p>
            <text:p text:style-name="Preformatted_20_Text">********** pas de sortie standard *******</text:p>
            <text:p text:style-name="Preformatted_20_Text">********** pas d'erreur standard ********</text:p>
            <text:p text:style-name="Preformatted_20_Text">----------------</text:p>
            <text:p text:style-name="Preformatted_20_Text">Time: 0 LEDS: 0x539</text:p>
            <text:p text:style-name="Preformatted_20_Text">Number of running methods: 0</text:p>
            <text:p text:style-name="Preformatted_20_Text">----------------</text:p>
            <text:p text:style-name="Preformatted_20_Text">[...]</text:p>
            <text:p text:style-name="Preformatted_20_Text">appel de savebase</text:p>
            <text:p text:style-name="Preformatted_20_Text">code retour = 0</text:p>
            <text:p text:style-name="Preformatted_20_Text">********** pas de sortie standard *******</text:p>
            <text:p text:style-name="Preformatted_20_Text">********** pas d'erreur standard ********</text:p>
            <text:p text:style-name="Preformatted_20_Text">Configuration time: 1 seconds</text:p>
            <text:p text:style-name="P53">#</text:p>
          </table:table-cell>
        </table:table-row>
      </table:table>
      <text:p text:style-name="Text_20_body">Rendre l'unité rmt0 disponible : </text:p>
      <table:table table:name="Tableau135" table:style-name="Tableau135">
        <table:table-column table:style-name="Tableau135.A"/>
        <table:table-row>
          <table:table-cell table:style-name="Tableau135.A1" office:value-type="string">
            <text:p text:style-name="Preformatted_20_Text"># mkdev -l rmt0</text:p>
            <text:p text:style-name="Preformatted_20_Text">rmt0 Disponible</text:p>
            <text:p text:style-name="P53">#</text:p>
          </table:table-cell>
        </table:table-row>
      </table:table>
      <text:p text:style-name="Text_20_body">Rendre l'unité rmt0 définie : </text:p>
      <table:table table:name="Tableau136" table:style-name="Tableau136">
        <table:table-column table:style-name="Tableau136.A"/>
        <table:table-row>
          <table:table-cell table:style-name="Tableau136.A1" office:value-type="string">
            <text:p text:style-name="Preformatted_20_Text"># rmdev -l rmt0</text:p>
            <text:p text:style-name="Preformatted_20_Text">rmt0 Défini</text:p>
            <text:p text:style-name="P53">#</text:p>
          </table:table-cell>
        </table:table-row>
      </table:table>
      <text:p text:style-name="Text_20_body">Rendre l'unité rmt0 non définie : </text:p>
      <table:table table:name="Tableau137" table:style-name="Tableau137">
        <table:table-column table:style-name="Tableau137.A"/>
        <table:table-row>
          <table:table-cell table:style-name="Tableau137.A1" office:value-type="string">
            <text:p text:style-name="Preformatted_20_Text"># rmdev -dl rmt0</text:p>
            <text:p text:style-name="Preformatted_20_Text">rmt0 supprimé</text:p>
            <text:p text:style-name="P53">#</text:p>
          </table:table-cell>
        </table:table-row>
      </table:table>
      <text:p text:style-name="Text_20_body">Changement de l'attribut système (-l sys0) maxuproc (les seuls paramètre qu'on peut modifier sont à Vrai dans la dernière colonne produite par la commande lsattr -E -l sys0, en l'occurrence keylock, realmem et conslogin pour sys0) : </text:p>
      <table:table table:name="Tableau138" table:style-name="Tableau138">
        <table:table-column table:style-name="Tableau138.A"/>
        <table:table-row>
          <table:table-cell table:style-name="Tableau138.A1" office:value-type="string">
            <text:p text:style-name="Preformatted_20_Text"># chdev -l sys0 -a maxuproc=150</text:p>
            <text:p text:style-name="Preformatted_20_Text">sys0 modifié</text:p>
            <text:p text:style-name="P53">#</text:p>
          </table:table-cell>
        </table:table-row>
      </table:table>
      <text:p text:style-name="Text_20_body"><text:a xlink:type="simple" xlink:href="http://www.linux-france.org/%7Emdecore/aix/memo-aix/memo-aix.html#top">Top</text:a><text:bookmark text:name="sec15"/></text:p>
      <text:h text:style-name="Heading_20_2" text:outline-level="2">15. Sauvegardes</text:h>
      <text:p text:style-name="Text_20_body"><text:a xlink:type="simple" xlink:href="http://www.linux-france.org/%7Emdecore/aix/memo-aix/memo-aix.html#top">Top</text:a><text:bookmark text:name="subsec15.1"/></text:p>
      <text:h text:style-name="Heading_20_3" text:outline-level="3">15.1. Sauvegarde système</text:h>
      <text:p text:style-name="Text_20_body">La sauvegarde du système (rootvg) se fait avec la commande mksysb. Cela sauvegarde : </text:p>
      <text:list xml:id="list37355570" text:style-name="L25">
        <text:list-item>
          <text:p text:style-name="P47">tous les systèmes de fichiers montés de rootvg </text:p>
        </text:list-item>
        <text:list-item>
          <text:p text:style-name="P47">les définitions de l'espace de pagination </text:p>
        </text:list-item>
        <text:list-item>
          <text:p text:style-name="P47">les définitions des LV </text:p>
        </text:list-item>
        <text:list-item>
          <text:p text:style-name="P25">créé une bande amorçable. </text:p>
        </text:list-item>
      </text:list>
      <text:p text:style-name="Text_20_body">Ca peut aussi servir à réduire un LV ou système de fichiers (option reducevg), ou augmenter la taille des PPs. L'archive est au format backup, et peut aussi être restaurée avec restore. </text:p>
      <text:p text:style-name="Text_20_body">Le fichier /image.data généré par la commande mkszfile ou l'option -i de mksysb contient les infos sur la sauvegarde système. En particulier, BOSINST_FILE permet d'indiquer quel programme exécuter à la fin de la restauration. Sinon le fichier /bosinst.data permet de définir les conditions requises sur le système cible. </text:p>
      <text:p text:style-name="Text_20_body">Pour restaurer redémarrer la machine, appuyer sur F1, puis choisir "Multiboot" puis "Install from". </text:p>
      <text:p text:style-name="Text_20_body">Restauration à partir d'une bande mksysb, sans redémarrage : </text:p>
      <text:p text:style-name="Text_20_body">Rembobinage de la bande : </text:p>
      <table:table table:name="Tableau139" table:style-name="Tableau139">
        <table:table-column table:style-name="Tableau139.A"/>
        <table:table-row>
          <table:table-cell table:style-name="Tableau139.A1" office:value-type="string">
            <text:p text:style-name="Preformatted_20_Text"># tctl rewind</text:p>
            <text:p text:style-name="P53">#</text:p>
          </table:table-cell>
        </table:table-row>
      </table:table>
      <text:p text:style-name="Text_20_body">Saute la partie amorcable de la bande : </text:p>
      <table:table table:name="Tableau140" table:style-name="Tableau140">
        <table:table-column table:style-name="Tableau140.A"/>
        <table:table-row>
          <table:table-cell table:style-name="Tableau140.A1" office:value-type="string">
            <text:p text:style-name="Preformatted_20_Text"># tctl -f /dev/rmt0.1 fsf 3</text:p>
            <text:p text:style-name="P53">#</text:p>
          </table:table-cell>
        </table:table-row>
      </table:table>
      <text:p text:style-name="Text_20_body">Restauration de l'archive </text:p>
      <table:table table:name="Tableau141" table:style-name="Tableau141">
        <table:table-column table:style-name="Tableau141.A"/>
        <table:table-row>
          <table:table-cell table:style-name="Tableau141.A1" office:value-type="string">
            <text:p text:style-name="Preformatted_20_Text"># restore [...]</text:p>
            <text:p text:style-name="Preformatted_20_Text">[ A COMPLETER...]</text:p>
            <text:p text:style-name="P53">#</text:p>
          </table:table-cell>
        </table:table-row>
      </table:table>
      <text:p text:style-name="Text_20_body">Pour que la bande lise en bloc de taille variable : </text:p>
      <table:table table:name="Tableau142" table:style-name="Tableau142">
        <table:table-column table:style-name="Tableau142.A"/>
        <table:table-row>
          <table:table-cell table:style-name="Tableau142.A1" office:value-type="string">
            <text:p text:style-name="Preformatted_20_Text"># chdev <text:s/>-l 'rmt0' -a block_size='0'</text:p>
            <text:p text:style-name="Preformatted_20_Text">rmt0 changed</text:p>
            <text:p text:style-name="P53">#</text:p>
          </table:table-cell>
        </table:table-row>
      </table:table>
      <text:p text:style-name="Text_20_body">Activer la compression matérielle (par défaut) : </text:p>
      <table:table table:name="Tableau143" table:style-name="Tableau143">
        <table:table-column table:style-name="Tableau143.A"/>
        <table:table-row>
          <table:table-cell table:style-name="Tableau143.A1" office:value-type="string">
            <text:p text:style-name="Preformatted_20_Text"># chdev <text:s/>-l 'rmt0' -a compress='yes'</text:p>
            <text:p text:style-name="Preformatted_20_Text">rmt0 changed</text:p>
            <text:p text:style-name="P53">#</text:p>
          </table:table-cell>
        </table:table-row>
      </table:table>
      <text:p text:style-name="Text_20_body">Pour sauvegarder les autres VG que rootvg, utiliser la commande savevg : </text:p>
      <table:table table:name="Tableau144" table:style-name="Tableau144">
        <table:table-column table:style-name="Tableau144.A"/>
        <table:table-row>
          <table:table-cell table:style-name="Tableau144.A1" office:value-type="string">
            <text:p text:style-name="Preformatted_20_Text"># tctl -f /dev/rmt0.1 rewind</text:p>
            <text:p text:style-name="P53">#</text:p>
          </table:table-cell>
        </table:table-row>
      </table:table>
      <table:table table:name="Tableau145" table:style-name="Tableau145">
        <table:table-column table:style-name="Tableau145.A"/>
        <table:table-row>
          <table:table-cell table:style-name="Tableau145.A1" office:value-type="string">
            <text:p text:style-name="Preformatted_20_Text"># for vg in `lsvg -o | grep -v rootvg` ; do /usr/bin/savevg -f /dev/rmt0.1 -i -m -e -X $vg ; done</text:p>
            <text:p text:style-name="Preformatted_20_Text">Création du fichier d'informations pour le groupe de volumes gicrvg..</text:p>
            <text:p text:style-name="Preformatted_20_Text"/>
            <text:p text:style-name="Preformatted_20_Text">Création de la liste des fichiers à sauvegarder.</text:p>
            <text:p text:style-name="Preformatted_20_Text">Sauvegarde de 4897 fichiers..............................</text:p>
            <text:p text:style-name="Preformatted_20_Text">16 fichiers sur 4897 (0%)..............................</text:p>
            <text:p text:style-name="Preformatted_20_Text">16 fichiers sur 4897 (0%)..............................</text:p>
            <text:p text:style-name="Preformatted_20_Text">16 fichiers sur 4897 (0%)..............................</text:p>
            <text:p text:style-name="Preformatted_20_Text">17 fichiers sur 4897 (0%)..............................</text:p>
            <text:p text:style-name="Preformatted_20_Text">17 fichiers sur 4897 (0%)..............................</text:p>
            <text:p text:style-name="Preformatted_20_Text">17 fichiers sur 4897 (0%)..............................</text:p>
            <text:p text:style-name="Preformatted_20_Text">4895 fichiers sur 4897 (99%)..............................</text:p>
            <text:p text:style-name="Preformatted_20_Text">4895 fichiers sur 4897 (99%)..............................</text:p>
            <text:p text:style-name="Preformatted_20_Text">4895 fichiers sur 4897 (99%)..............................</text:p>
            <text:p text:style-name="Preformatted_20_Text">4896 fichiers sur 4897 (99%)..............................</text:p>
            <text:p text:style-name="Preformatted_20_Text">4896 fichiers sur 4897 (99%)..............................</text:p>
            <text:p text:style-name="Preformatted_20_Text">4896 fichiers sur 4897 (99%).............................</text:p>
            <text:p text:style-name="Preformatted_20_Text">4897 fichiers sur 4897 (100%)</text:p>
            <text:p text:style-name="Preformatted_20_Text">0512-038 savevg : La sauvegarde a abouti.</text:p>
            <text:p text:style-name="Preformatted_20_Text"/>
            <text:p text:style-name="Preformatted_20_Text">Création du fichier d'informations pour le groupe de volumes logvg.</text:p>
            <text:p text:style-name="Preformatted_20_Text"/>
            <text:p text:style-name="Preformatted_20_Text">Création de la liste des fichiers à sauvegarder.</text:p>
            <text:p text:style-name="Preformatted_20_Text">Sauvegarde de 108 fichiers..............................</text:p>
            <text:p text:style-name="Preformatted_20_Text">13 fichiers sur 108 (12%)..............................</text:p>
            <text:p text:style-name="Preformatted_20_Text">16 fichiers sur 108 (14%)..............................</text:p>
            <text:p text:style-name="Preformatted_20_Text">30 fichiers sur 108 (27%)..............................</text:p>
            <text:p text:style-name="Preformatted_20_Text">31 fichiers sur 108 (28%)..............................</text:p>
            <text:p text:style-name="Preformatted_20_Text">56 fichiers sur 108 (51%)..............................</text:p>
            <text:p text:style-name="Preformatted_20_Text">60 fichiers sur 108 (55%)..............................</text:p>
            <text:p text:style-name="Preformatted_20_Text">65 fichiers sur 108 (60%)..............................</text:p>
            <text:p text:style-name="Preformatted_20_Text">67 fichiers sur 108 (62%)..........</text:p>
            <text:p text:style-name="Preformatted_20_Text">108 fichiers sur 108 (100%)</text:p>
            <text:p text:style-name="Preformatted_20_Text">0512-038 savevg : La sauvegarde a abouti.</text:p>
            <text:p text:style-name="P53">#</text:p>
          </table:table-cell>
        </table:table-row>
      </table:table>
      <table:table table:name="Tableau146" table:style-name="Tableau146">
        <table:table-column table:style-name="Tableau146.A"/>
        <table:table-row>
          <table:table-cell table:style-name="Tableau146.A1" office:value-type="string">
            <text:p text:style-name="Preformatted_20_Text"># tctl -f /dev/rmt0.1 rewind</text:p>
            <text:p text:style-name="P53">#</text:p>
          </table:table-cell>
        </table:table-row>
      </table:table>
      <text:p text:style-name="Text_20_body">Pour visualiser le backup (-s pour un backup d'un VG autre que rootvg) : </text:p>
      <table:table table:name="Tableau147" table:style-name="Tableau147">
        <table:table-column table:style-name="Tableau147.A"/>
        <table:table-row>
          <table:table-cell table:style-name="Tableau147.A1" office:value-type="string">
            <text:p text:style-name="Preformatted_20_Text"># listvgbackup -s</text:p>
            <text:p text:style-name="Preformatted_20_Text">New volume on /dev/rmt0:</text:p>
            <text:p text:style-name="Preformatted_20_Text"><text:s/>Cluster 51200 bytes (100 blocks).</text:p>
            <text:p text:style-name="Preformatted_20_Text"><text:s text:c="4"/>Volume number 1</text:p>
            <text:p text:style-name="Preformatted_20_Text"><text:s text:c="4"/>Date of backup: Sat Sep <text:s/>4 01:13:07 2004</text:p>
            <text:p text:style-name="Preformatted_20_Text"><text:s text:c="4"/>Files backed up by name</text:p>
            <text:p text:style-name="Preformatted_20_Text"><text:s text:c="4"/>User root</text:p>
            <text:p text:style-name="Preformatted_20_Text"><text:s text:c="9"/>374 ./tmp/vgdata/vgdata.files532504</text:p>
            <text:p text:style-name="Preformatted_20_Text"><text:s text:c="9"/>374 ./tmp/vgdata/vgdata.files</text:p>
            <text:p text:style-name="Preformatted_20_Text"><text:s text:c="8"/>2990 ./tmp/vgdata/gicrvg/filesystems</text:p>
            <text:p text:style-name="Preformatted_20_Text"><text:s text:c="11"/>7 ./tmp/vgdata/gicrvg/tapeblksz</text:p>
            <text:p text:style-name="Preformatted_20_Text"><text:s text:c="8"/>8167 ./tmp/vgdata/gicrvg/gicrvg.data</text:p>
            <text:p text:style-name="Preformatted_20_Text"><text:s text:c="10"/>60 ./tmp/vgdata/gicrvg/fslv00.map</text:p>
            <text:p text:style-name="Preformatted_20_Text"><text:s text:c="10"/>60 ./tmp/vgdata/gicrvg/fslv01.map</text:p>
            <text:p text:style-name="Preformatted_20_Text"><text:s text:c="9"/>192 ./tmp/vgdata/gicrvg/fslv02.map</text:p>
            <text:p text:style-name="Preformatted_20_Text"><text:s text:c="9"/>192 ./tmp/vgdata/gicrvg/fslv03.map</text:p>
            <text:p text:style-name="Preformatted_20_Text"><text:s text:c="9"/>192 ./tmp/vgdata/gicrvg/fslv04.map</text:p>
            <text:p text:style-name="Preformatted_20_Text"><text:s text:c="9"/>192 ./tmp/vgdata/gicrvg/fslv05.map</text:p>
            <text:p text:style-name="Preformatted_20_Text"><text:s text:c="8"/>3888 ./tmp/vgdata/gicrvg/fslv06.map</text:p>
            <text:p text:style-name="Preformatted_20_Text"><text:s text:c="8"/>3888 ./tmp/vgdata/gicrvg/fslv07.map</text:p>
            <text:p text:style-name="Preformatted_20_Text"><text:s text:c="10"/>12 ./tmp/vgdata/gicrvg/loglv01.map</text:p>
            <text:p text:style-name="Preformatted_20_Text"><text:s text:c="11"/>0 ./data_prod</text:p>
            <text:p text:style-name="Preformatted_20_Text"><text:s text:c="11"/>0 ./data_prod/lost+found</text:p>
            <text:p text:style-name="Preformatted_20_Text"><text:s/>10485764096 ./data_prod/data_prod1.dat</text:p>
            <text:p text:style-name="Preformatted_20_Text">[...]</text:p>
            <text:p text:style-name="Preformatted_20_Text">0 ./alloc/log</text:p>
            <text:p text:style-name="Preformatted_20_Text"><text:s text:c="8"/>4522 ./alloc/log/sat_stat.log</text:p>
            <text:p text:style-name="Preformatted_20_Text"><text:s text:c="10"/>40 ./alloc/log/sat_stat.log.tmp</text:p>
            <text:p text:style-name="Preformatted_20_Text"><text:s text:c="8"/>1212 ./alloc/sybinit.err</text:p>
            <text:p text:style-name="Preformatted_20_Text"><text:s text:c="11"/>0 ./alloc/toto.txt</text:p>
            <text:p text:style-name="Preformatted_20_Text"><text:s text:c="11"/>0 ./data_simul</text:p>
            <text:p text:style-name="Preformatted_20_Text"><text:s text:c="11"/>0 ./data_simul/lost+found</text:p>
            <text:p text:style-name="Preformatted_20_Text"><text:s/>10485764096 ./data_simul/data_simul2.dat</text:p>
            <text:p text:style-name="Preformatted_20_Text"><text:s/>10485764096 ./data_simul/data_simul1.dat</text:p>
            <text:p text:style-name="Preformatted_20_Text"><text:s text:c="4"/>total size: 42481872194</text:p>
            <text:p text:style-name="P53">#</text:p>
          </table:table-cell>
        </table:table-row>
      </table:table>
      <text:p text:style-name="Text_20_body"><text:a xlink:type="simple" xlink:href="http://www.linux-france.org/%7Emdecore/aix/memo-aix/memo-aix.html#top">Top</text:a><text:bookmark text:name="subsec15.2"/></text:p>
      <text:h text:style-name="Heading_20_3" text:outline-level="3">15.2. backup / restore</text:h>
      <text:p text:style-name="Text_20_body">backup : lit la liste de fichiers à sauvegarder sur stdin. Commande AIX, la seule à pouvoir gérer les ACL ou la base informatique sécurisée TCB. </text:p>
      <text:p text:style-name="Text_20_body">Sauvegarde du répertoire /home (find /home) par nom de fichiers (-i) - sinon sauvegarde par inode, sur un système de fichiers qui n'a pas besoin d'être monté, sur le périphérique /dev/rmt0, sans demande d'appuyer sur un touche avant de lancer la sauvegarde (-q) - question posée pour être sûr qu'il y a bien une bande prête, avec compression (-p) - ne pas utiliser la compression sur un système de fichiers actifs, le fichier pouvant être modifié lors de la compression, avec affichage de la liste des fichiers sauvegardés (-v) : </text:p>
      <table:table table:name="Tableau148" table:style-name="Tableau148">
        <table:table-column table:style-name="Tableau148.A"/>
        <table:table-row>
          <table:table-cell table:style-name="Tableau148.A1" office:value-type="string">
            <text:p text:style-name="Preformatted_20_Text"># find /home | backup -ivqf /dev/rmt0</text:p>
            <text:p text:style-name="Preformatted_20_Text">Backing up to /dev/rmt0</text:p>
            <text:p text:style-name="Preformatted_20_Text">Cluster 51200 bytes (100 blocks).</text:p>
            <text:p text:style-name="Preformatted_20_Text">Volume 1 on /dev/null</text:p>
            <text:p text:style-name="Preformatted_20_Text">a <text:s text:c="11"/>0 /home</text:p>
            <text:p text:style-name="Preformatted_20_Text"><text:soft-page-break/>[...]</text:p>
            <text:p text:style-name="Preformatted_20_Text">a <text:s text:c="11"/>0 /home/TT_DB</text:p>
            <text:p text:style-name="Preformatted_20_Text">a <text:s text:c="8"/>3072 /home/TT_DB/file_table.rec</text:p>
            <text:p text:style-name="Preformatted_20_Text">a <text:s text:c="8"/>2048 /home/TT_DB/file_table.ind</text:p>
            <text:p text:style-name="Preformatted_20_Text">a <text:s text:c="11"/>0 /home/TT_DB/file_table.var</text:p>
            <text:p text:style-name="Preformatted_20_Text">a <text:s text:c="8"/>2048 /home/TT_DB/file_object_map.rec</text:p>
            <text:p text:style-name="Preformatted_20_Text">a <text:s text:c="8"/>2048 /home/TT_DB/file_object_map.ind</text:p>
            <text:p text:style-name="Preformatted_20_Text">a <text:s text:c="8"/>3072 /home/TT_DB/property_table.rec</text:p>
            <text:p text:style-name="Preformatted_20_Text">a <text:s text:c="8"/>1024 /home/TT_DB/property_table.ind</text:p>
            <text:p text:style-name="Preformatted_20_Text">a <text:s text:c="8"/>1024 /home/TT_DB/property_table.var</text:p>
            <text:p text:style-name="Preformatted_20_Text">a <text:s text:c="8"/>3072 /home/TT_DB/access_table.rec</text:p>
            <text:p text:style-name="Preformatted_20_Text">a <text:s text:c="8"/>1024 /home/TT_DB/access_table.ind</text:p>
            <text:p text:style-name="Preformatted_20_Text"><text:s text:c="4"/>total size: 339954942</text:p>
            <text:p text:style-name="Preformatted_20_Text">Done at Fri Jun 25 14:48:28 2004; 664100 blocks on 1 volume(s)</text:p>
            <text:p text:style-name="P53">#</text:p>
          </table:table-cell>
        </table:table-row>
      </table:table>
      <text:p text:style-name="Text_20_body">Sauvegarde avec mise à jour du fichier /etc/dumpdates - historique des sauvegardes (-u), depuis le niveau inférieur à 1 (-1) - n-1, 0 pour une sauvegarde complète ; si la sauvegarde n-1 n'existe pas, essaie n-2 ; si n-2 n'existe pas, essaie n-3 et ainsi de suite jusqu'à 0 ; -9 par défaut : </text:p>
      <table:table table:name="Tableau149" table:style-name="Tableau149">
        <table:table-column table:style-name="Tableau149.A"/>
        <table:table-row>
          <table:table-cell table:style-name="Tableau149.A1" office:value-type="string">
            <text:p text:style-name="Preformatted_20_Text"># backup -u -1 -f /dev/rmt0 /home</text:p>
            <text:p text:style-name="Preformatted_20_Text">[ A COMPLETER...]</text:p>
            <text:p text:style-name="P53">#</text:p>
          </table:table-cell>
        </table:table-row>
      </table:table>
      <text:p text:style-name="Text_20_body">Voir le contenu de l'archive (-T) : </text:p>
      <table:table table:name="Tableau150" table:style-name="Tableau150">
        <table:table-column table:style-name="Tableau150.A"/>
        <table:table-row>
          <table:table-cell table:style-name="Tableau150.A1" office:value-type="string">
            <text:p text:style-name="Preformatted_20_Text"># restore -Tvf /dev/rmt0</text:p>
            <text:p text:style-name="Preformatted_20_Text">[ A COMPLETER...]</text:p>
            <text:p text:style-name="P53">#</text:p>
          </table:table-cell>
        </table:table-row>
      </table:table>
      <text:p text:style-name="Text_20_body">Restaurer (-x) le fichier /home/mdecore : </text:p>
      <table:table table:name="Tableau151" table:style-name="Tableau151">
        <table:table-column table:style-name="Tableau151.A"/>
        <table:table-row>
          <table:table-cell table:style-name="Tableau151.A1" office:value-type="string">
            <text:p text:style-name="Preformatted_20_Text"># restore -xvf /dev/rmt0 /home/mdecore</text:p>
            <text:p text:style-name="Preformatted_20_Text">[ A COMPLETER...]</text:p>
            <text:p text:style-name="P53">#</text:p>
          </table:table-cell>
        </table:table-row>
      </table:table>
      <text:p text:style-name="Text_20_body">Restaurer toute les sauvegarder incrémentales (-r) - 0 puis 1 puis 2 etc. : </text:p>
      <table:table table:name="Tableau152" table:style-name="Tableau152">
        <table:table-column table:style-name="Tableau152.A"/>
        <table:table-row>
          <table:table-cell table:style-name="Tableau152.A1" office:value-type="string">
            <text:p text:style-name="Preformatted_20_Text"># restore -rqvf /dev/rmt0</text:p>
            <text:p text:style-name="Preformatted_20_Text">[ A COMPLETER...]</text:p>
            <text:p text:style-name="P53">#</text:p>
          </table:table-cell>
        </table:table-row>
      </table:table>
      <text:p text:style-name="Text_20_body">Le fichier restoresymtable est créé à la racine du système de fichiers restauré pour s'assurer que la séquence de restauration soit correcte. Une fois la restauration terminée, il faut le supprimer. </text:p>
      <text:p text:style-name="Text_20_body">Restauration du fichier /etc/passwd de la 4ème sauvegarde (-s 4) : </text:p>
      <table:table table:name="Tableau153" table:style-name="Tableau153">
        <table:table-column table:style-name="Tableau153.A"/>
        <table:table-row>
          <table:table-cell table:style-name="Tableau153.A1" office:value-type="string">
            <text:p text:style-name="Preformatted_20_Text"># restore -s 4 -xvf /dev/rmt0.1 /etc/passwd</text:p>
            <text:p text:style-name="Preformatted_20_Text">[ A COMPLETER...]</text:p>
            <text:p text:style-name="P53">#</text:p>
          </table:table-cell>
        </table:table-row>
      </table:table>
      <text:p text:style-name="Text_20_body">[AIX 5.2] Restauration des attributs du fichier /etc/passwd sans le créer (-Pa) : </text:p>
      <table:table table:name="Tableau154" table:style-name="Tableau154">
        <table:table-column table:style-name="Tableau154.A"/>
        <table:table-row>
          <table:table-cell table:style-name="Tableau154.A1" office:value-type="string">
            <text:p text:style-name="Preformatted_20_Text"># restore -Pa -vf /dev/rmt0 /etc/passwd</text:p>
            <text:p text:style-name="Preformatted_20_Text">[ A COMPLETER...]</text:p>
            <text:p text:style-name="P53">#</text:p>
          </table:table-cell>
        </table:table-row>
      </table:table>
      <text:p text:style-name="Text_20_body">[AIX 5.2] Visualisation des attributs du fichier /etc/passwd (-Ta) : </text:p>
      <table:table table:name="Tableau155" table:style-name="Tableau155">
        <table:table-column table:style-name="Tableau155.A"/>
        <table:table-row>
          <table:table-cell table:style-name="Tableau155.A1" office:value-type="string">
            <text:p text:style-name="Preformatted_20_Text"># restore -Ta -vf /dev/rmt0 /etc/passwd</text:p>
            <text:p text:style-name="Preformatted_20_Text">[ A COMPLETER...]</text:p>
            <text:p text:style-name="P53">#</text:p>
          </table:table-cell>
        </table:table-row>
      </table:table>
      <text:p text:style-name="Text_20_body"><text:a xlink:type="simple" xlink:href="http://www.linux-france.org/%7Emdecore/aix/memo-aix/memo-aix.html#top">Top</text:a><text:bookmark text:name="subsec15.3"/></text:p>
      <text:h text:style-name="Heading_20_3" text:outline-level="3">15.3. cpio</text:h>
      <text:p text:style-name="Text_20_body">La commande cpio se trouve sur différents systèmes, est POSIX… </text:p>
      <text:p text:style-name="Text_20_body">Copier le répertoire /mnt1 vers /mnt2 en lisant les noms des fichiers sur l’entrée standard (-p), en créant les répertoires si nécessaires (-d) et en créant des liens au lieu de les copier (–l) : </text:p>
      <table:table table:name="Tableau156" table:style-name="Tableau156">
        <table:table-column table:style-name="Tableau156.A"/>
        <table:table-row>
          <table:table-cell table:style-name="Tableau156.A1" office:value-type="string">
            <text:p text:style-name="Preformatted_20_Text"># cd /mnt1 &amp;&amp; find . -xdev | cpio –pdl /mnt2</text:p>
            <text:p text:style-name="Preformatted_20_Text">[…]</text:p>
            <text:p text:style-name="P53">#</text:p>
          </table:table-cell>
        </table:table-row>
      </table:table>
      <text:p text:style-name="Text_20_body">[FIXME] voir quelle commande passe smit restfilesys </text:p>
      <text:p text:style-name="Text_20_body"><text:a xlink:type="simple" xlink:href="http://www.linux-france.org/%7Emdecore/aix/memo-aix/memo-aix.html#top">Top</text:a><text:bookmark text:name="subsec15.4"/></text:p>
      <text:h text:style-name="Heading_20_3" text:outline-level="3">15.4. Gestion de la bande</text:h>
      <text:p text:style-name="Text_20_body">Rembobinage de la bande située dans /dev/rmt0 : </text:p>
      <table:table table:name="Tableau157" table:style-name="Tableau157">
        <table:table-column table:style-name="Tableau157.A"/>
        <table:table-row>
          <table:table-cell table:style-name="Tableau157.A1" office:value-type="string">
            <text:p text:style-name="Preformatted_20_Text"># tctl -f /dev/rmt0 rewind</text:p>
            <text:p text:style-name="P53">#</text:p>
          </table:table-cell>
        </table:table-row>
      </table:table>
      <text:p text:style-name="Text_20_body">Rembobinage et éjection de la bande située dans /dev/rmt0 : </text:p>
      <table:table table:name="Tableau158" table:style-name="Tableau158">
        <table:table-column table:style-name="Tableau158.A"/>
        <table:table-row>
          <table:table-cell table:style-name="Tableau158.A1" office:value-type="string">
            <text:p text:style-name="Preformatted_20_Text"># tctl -f /dev/rmt0 rewoffl</text:p>
            <text:p text:style-name="P53">#</text:p>
          </table:table-cell>
        </table:table-row>
      </table:table>
      <text:p text:style-name="Text_20_body">Ejection de la bande située dans /dev/rmt0 : </text:p>
      <table:table table:name="Tableau159" table:style-name="Tableau159">
        <table:table-column table:style-name="Tableau159.A"/>
        <table:table-row>
          <table:table-cell table:style-name="Tableau159.A1" office:value-type="string">
            <text:p text:style-name="Preformatted_20_Text"># tctl -f /dev/rmt0 offline</text:p>
            <text:p text:style-name="P53">#</text:p>
          </table:table-cell>
        </table:table-row>
      </table:table>
      <text:p text:style-name="Text_20_body">Positionnement au début du 4ème fichier de la bande située dans /dev/rmt0 : </text:p>
      <table:table table:name="Tableau160" table:style-name="Tableau160">
        <table:table-column table:style-name="Tableau160.A"/>
        <table:table-row>
          <table:table-cell table:style-name="Tableau160.A1" office:value-type="string">
            <text:p text:style-name="Preformatted_20_Text"># tctl -f /dev/rmt0.1 fsf 3</text:p>
            <text:p text:style-name="P53">#</text:p>
          </table:table-cell>
        </table:table-row>
      </table:table>
      <text:p text:style-name="Text_20_body">Affichage d'un rapport indiquant le nombre de fichiers et les tailles de blocs : </text:p>
      <table:table table:name="Tableau161" table:style-name="Tableau161">
        <table:table-column table:style-name="Tableau161.A"/>
        <table:table-row>
          <table:table-cell table:style-name="Tableau161.A1" office:value-type="string">
            <text:p text:style-name="Preformatted_20_Text"># tcopy /dev/rmt0</text:p>
            <text:p text:style-name="Preformatted_20_Text">tcopy : Fichier bande : 1 ; enregistrements : 1 à 15354 ; taille : 512.</text:p>
            <text:p text:style-name="Preformatted_20_Text">tcopy : Fichier bande : 1 ; fin de fichier après 15354 enregistrements, 7861248 octets.</text:p>
            <text:p text:style-name="Preformatted_20_Text">tcopy : Fichier bande : 2 ; enregistrements : 1 à 5800 ; taille : 512.</text:p>
            <text:p text:style-name="Preformatted_20_Text">tcopy : Fichier bande : 2 ; fin de fichier après 5800 enregistrements, 2969600 octets.</text:p>
            <text:p text:style-name="Preformatted_20_Text">tcopy : Fichier bande : 3 ; enregistrement : 1 ; taille : 512.</text:p>
            <text:p text:style-name="Preformatted_20_Text">tcopy : Fichier bande : 3 ; fin de fichier après 1 enregistrements, 512 octets.</text:p>
            <text:p text:style-name="Preformatted_20_Text">tcopy : Fichier bande : 4 ; enregistrements : 1 à 453050 ; taille : 1024.</text:p>
            <text:p text:style-name="Preformatted_20_Text">tcopy : Fichier bande : 4 ; fin de fichier après 453050 enregistrements, 463923200 octets.</text:p>
            <text:p text:style-name="Preformatted_20_Text">tcopy : La fin de la bande est atteinte.</text:p>
            <text:p text:style-name="Preformatted_20_Text">tcopy : Longueur totale de la bande : 474754560 octets.</text:p>
            <text:p text:style-name="P53">#</text:p>
          </table:table-cell>
        </table:table-row>
      </table:table>
      <text:p text:style-name="Text_20_body">Copie de la bande située dans /dev/rmt0 dans la bande située dans /dev/rmt1 : </text:p>
      <table:table table:name="Tableau162" table:style-name="Tableau162">
        <table:table-column table:style-name="Tableau162.A"/>
        <table:table-row>
          <table:table-cell table:style-name="Tableau162.A1" office:value-type="string">
            <text:p text:style-name="Preformatted_20_Text"># tcopy /dev/rmt0 /dev/rmt1</text:p>
            <text:p text:style-name="Preformatted_20_Text">tcopy : Fichier bande : 1 ; enregistrements : 1 à 15354 ; taille : 512.</text:p>
            <text:p text:style-name="Preformatted_20_Text">tcopy : Fichier bande : 1 ; fin de fichier après 15354 enregistrements, 7861248 octets.</text:p>
            <text:p text:style-name="Preformatted_20_Text">[...]</text:p>
            <text:p text:style-name="P53">#</text:p>
          </table:table-cell>
        </table:table-row>
      </table:table>
      <text:p text:style-name="Text_20_body"><text:a xlink:type="simple" xlink:href="http://www.linux-france.org/%7Emdecore/aix/memo-aix/memo-aix.html#top">Top</text:a><text:bookmark text:name="subsec15.5"/></text:p>
      <text:h text:style-name="Heading_20_3" text:outline-level="3">15.5. Vérifications de la sauvegarde, de la bande</text:h>
      <text:p text:style-name="Text_20_body">Vérifier l'archive au format backup : </text:p>
      <table:table table:name="Tableau163" table:style-name="Tableau163">
        <table:table-column table:style-name="Tableau163.A"/>
        <table:table-row>
          <table:table-cell table:style-name="Tableau163.A1" office:value-type="string">
            <text:p text:style-name="Preformatted_20_Text"># restore -T</text:p>
            <text:p text:style-name="Preformatted_20_Text">[...]</text:p>
            <text:p text:style-name="P53">#</text:p>
          </table:table-cell>
        </table:table-row>
      </table:table>
      <text:p text:style-name="Text_20_body">Vérifier l'archive au format tar : </text:p>
      <table:table table:name="Tableau164" table:style-name="Tableau164">
        <table:table-column table:style-name="Tableau164.A"/>
        <table:table-row>
          <table:table-cell table:style-name="Tableau164.A1" office:value-type="string">
            <text:p text:style-name="Preformatted_20_Text"># tar t</text:p>
            <text:p text:style-name="Preformatted_20_Text">[...]</text:p>
            <text:p text:style-name="P53">#</text:p>
          </table:table-cell>
        </table:table-row>
      </table:table>
      <text:p text:style-name="Text_20_body">Vérifie les dysfonctionnements matériels en indiquant de lire 2 fichiers sur la bande : </text:p>
      <table:table table:name="Tableau165" table:style-name="Tableau165">
        <table:table-column table:style-name="Tableau165.A"/>
        <table:table-row>
          <table:table-cell table:style-name="Tableau165.A1" office:value-type="string">
            <text:p text:style-name="Preformatted_20_Text"># tapechk 2</text:p>
            <text:p text:style-name="Preformatted_20_Text">118-008 The tapechk command is rewinding the tape. Please wait.</text:p>
            <text:p text:style-name="Preformatted_20_Text">118-015 The tapechk command is checking the next 2 file(s).</text:p>
            <text:p text:style-name="Preformatted_20_Text"><text:s text:c="8"/>Please wait.</text:p>
            <text:p text:style-name="Preformatted_20_Text">118-016 The files you requested on tape "/dev/rmt0" appear</text:p>
            <text:p text:style-name="Preformatted_20_Text"><text:s text:c="8"/>to be OK.</text:p>
            <text:p text:style-name="P53">#</text:p>
          </table:table-cell>
        </table:table-row>
      </table:table>
      <text:p text:style-name="Text_20_body"><text:a xlink:type="simple" xlink:href="http://www.linux-france.org/%7Emdecore/aix/memo-aix/memo-aix.html#top">Top</text:a><text:bookmark text:name="sec16"/></text:p>
      <text:h text:style-name="Heading_20_2" text:outline-level="2">16. Les packages</text:h>
      <text:p text:style-name="Text_20_body">Les packages sont appellés des filesets (ensembles de fichiers, plus petite unité). Ces filesets sont regroupés en packages, eux même regroupés en LPP (Licensed Program Product, ensemble de packages donnant un produit complet). Par exemple, bos (Base Operating System) est un LPP, bos.Ined et bos.adt sont des packages et bos.adt.lib et bos.adt.prof sont des filesets. </text:p>
      <text:p text:style-name="Text_20_body">Déterminer la version d'AIX : </text:p>
      <table:table table:name="Tableau166" table:style-name="Tableau166">
        <table:table-column table:style-name="Tableau166.A"/>
        <table:table-row>
          <table:table-cell table:style-name="Tableau166.A1" office:value-type="string">
            <text:p text:style-name="Preformatted_20_Text"># oslevel</text:p>
            <text:p text:style-name="Preformatted_20_Text">5.1.0.0</text:p>
            <text:p text:style-name="P53">#</text:p>
          </table:table-cell>
        </table:table-row>
      </table:table>
      <text:p text:style-name="Text_20_body">Déterminer la version minimum recommandée : </text:p>
      <table:table table:name="Tableau167" table:style-name="Tableau167">
        <table:table-column table:style-name="Tableau167.A"/>
        <table:table-row>
          <table:table-cell table:style-name="Tableau167.A1" office:value-type="string">
            <text:p text:style-name="Preformatted_20_Text"># oslevel -r</text:p>
            <text:p text:style-name="Preformatted_20_Text">5100-04</text:p>
            <text:p text:style-name="P53">#</text:p>
          </table:table-cell>
        </table:table-row>
      </table:table>
      <text:p text:style-name="Text_20_body"><text:a xlink:type="simple" xlink:href="http://www.linux-france.org/%7Emdecore/aix/memo-aix/memo-aix.html#top">Top</text:a><text:bookmark text:name="subsec16.1"/></text:p>
      <text:h text:style-name="Heading_20_3" text:outline-level="3">16.1. Listes des packages</text:h>
      <text:p text:style-name="Text_20_body">Liste de tous les packages installés : </text:p>
      <table:table table:name="Tableau168" table:style-name="Tableau168">
        <table:table-column table:style-name="Tableau168.A"/>
        <table:table-row>
          <table:table-cell table:style-name="Tableau168.A1" office:value-type="string">
            <text:p text:style-name="Preformatted_20_Text"># lslpp -L all</text:p>
            <text:p text:style-name="Preformatted_20_Text"><text:s text:c="2"/>Fileset <text:s text:c="21"/>Level <text:s/>State <text:s/>Type <text:s/>Description (Uninstaller)</text:p>
            <text:p text:style-name="Preformatted_20_Text"><text:s text:c="2"/>----------------------------------------------------------------------------</text:p>
            <text:p text:style-name="Preformatted_20_Text"><text:s text:c="2"/>IMNSearch.rte.httpdlite <text:s text:c="2"/>2.0.0.15 <text:s text:c="3"/>C <text:s text:c="4"/>F <text:s text:c="3"/>Lite NetQuestion Local Web</text:p>
            <text:p text:style-name="Preformatted_20_Text"><text:s text:c="51"/>Server </text:p>
            <text:p text:style-name="Preformatted_20_Text"><text:s text:c="2"/>Java130.rte.bin <text:s text:c="10"/>1.3.0.16 <text:s text:c="3"/>C <text:s text:c="4"/>F <text:s text:c="3"/>Java Runtime Environment</text:p>
            <text:p text:style-name="Preformatted_20_Text"><text:s text:c="51"/>Executables </text:p>
            <text:p text:style-name="Preformatted_20_Text"><text:s text:c="2"/>Java130.rte.lib <text:s text:c="10"/>1.3.0.16 <text:s text:c="3"/>C <text:s text:c="4"/>F <text:s text:c="3"/>Java Runtime Environment</text:p>
            <text:p text:style-name="Preformatted_20_Text"><text:s text:c="51"/>Libraries </text:p>
            <text:p text:style-name="Preformatted_20_Text"><text:s text:c="2"/>Tivoli_Management_Agent.client.rte</text:p>
            <text:p text:style-name="Preformatted_20_Text"><text:s text:c="29"/>3.7.1.0 <text:s text:c="3"/>C <text:s text:c="4"/>F <text:s text:c="3"/>Management Framework Endpoint</text:p>
            <text:p text:style-name="Preformatted_20_Text"><text:s text:c="51"/>Runtime"</text:p>
            <text:p text:style-name="Preformatted_20_Text"><text:s text:c="2"/>X11.Dt.ToolTalk <text:s text:c="10"/>5.1.0.50 <text:s text:c="3"/>C <text:s text:c="4"/>F <text:s text:c="3"/>AIX CDE ToolTalk Support </text:p>
            <text:p text:style-name="Preformatted_20_Text"><text:s text:c="2"/>X11.Dt.bitmaps <text:s text:c="12"/>5.1.0.0 <text:s text:c="3"/>C <text:s text:c="4"/>F <text:s text:c="3"/>AIX CDE Bitmaps </text:p>
            <text:p text:style-name="Preformatted_20_Text">[...]</text:p>
            <text:p text:style-name="P53">#</text:p>
          </table:table-cell>
        </table:table-row>
      </table:table>
      <text:p text:style-name="Text_20_body">Affichage de l'historique des installations et mises à jour d'un logiciel : </text:p>
      <table:table table:name="Tableau169" table:style-name="Tableau169">
        <table:table-column table:style-name="Tableau169.A"/>
        <table:table-row>
          <table:table-cell table:style-name="Tableau169.A1" office:value-type="string">
            <text:p text:style-name="Preformatted_20_Text"># lslpp -ha bos.net.*</text:p>
            <text:p text:style-name="Preformatted_20_Text"><text:s text:c="2"/>Fileset <text:s text:c="8"/>Level <text:s text:c="4"/>Action <text:s text:c="6"/>Status <text:s text:c="6"/>Date <text:s text:c="8"/>Time <text:s text:c="7"/></text:p>
            <text:p text:style-name="Preformatted_20_Text"><text:s text:c="2"/>----------------------------------------------------------------------------</text:p>
            <text:p text:style-name="Preformatted_20_Text">Path: /usr/lib/objrepos</text:p>
            <text:p text:style-name="Preformatted_20_Text"><text:s text:c="2"/>bos.net.ipsec.keymgt</text:p>
            <text:p text:style-name="Preformatted_20_Text"><text:s text:c="17"/>5.1.0.50 <text:s text:c="2"/>COMMIT <text:s text:c="6"/>COMPLETE <text:s text:c="4"/>03/27/04 <text:s text:c="4"/>10:47:00 <text:s text:c="3"/></text:p>
            <text:p text:style-name="Preformatted_20_Text"><text:s text:c="17"/>5.1.0.50 <text:s text:c="2"/>APPLY <text:s text:c="7"/>COMPLETE <text:s text:c="4"/>03/27/04 <text:s text:c="4"/>10:47:00 <text:s text:c="3"/></text:p>
            <text:p text:style-name="Preformatted_20_Text"/>
            <text:p text:style-name="Preformatted_20_Text"><text:s text:c="2"/>bos.net.ipsec.rte</text:p>
            <text:p text:style-name="Preformatted_20_Text"><text:s text:c="17"/>5.1.0.50 <text:s text:c="2"/>COMMIT <text:s text:c="6"/>COMPLETE <text:s text:c="4"/>03/27/04 <text:s text:c="4"/>10:47:00 <text:s text:c="3"/></text:p>
            <text:p text:style-name="Preformatted_20_Text"><text:s text:c="17"/>5.1.0.50 <text:s text:c="2"/>APPLY <text:s text:c="7"/>COMPLETE <text:s text:c="4"/>03/27/04 <text:s text:c="4"/>10:47:00 <text:s text:c="3"/></text:p>
            <text:p text:style-name="Preformatted_20_Text"><text:s text:c="17"/>5.1.0.51 <text:s text:c="2"/>COMMIT <text:s text:c="6"/>COMPLETE <text:s text:c="4"/>03/27/04 <text:s text:c="4"/>18:25:43 <text:s text:c="3"/></text:p>
            <text:p text:style-name="Preformatted_20_Text"><text:s text:c="17"/>5.1.0.51 <text:s text:c="2"/>APPLY <text:s text:c="7"/>COMPLETE <text:s text:c="4"/>03/27/04 <text:s text:c="4"/>18:25:42 <text:s text:c="3"/></text:p>
            <text:p text:style-name="Preformatted_20_Text"/>
            <text:p text:style-name="Preformatted_20_Text"><text:s text:c="2"/>bos.net.ncs</text:p>
            <text:p text:style-name="Preformatted_20_Text"><text:s text:c="17"/>5.1.0.25 <text:s text:c="2"/>COMMIT <text:s text:c="6"/>COMPLETE <text:s text:c="4"/>03/27/04 <text:s text:c="4"/>10:47:00 <text:s text:c="3"/></text:p>
            <text:p text:style-name="Preformatted_20_Text"><text:s text:c="17"/>5.1.0.25 <text:s text:c="2"/>APPLY <text:s text:c="7"/>COMPLETE <text:s text:c="4"/>03/27/04 <text:s text:c="4"/>10:47:00 <text:s text:c="3"/></text:p>
            <text:p text:style-name="Preformatted_20_Text"/>
            <text:p text:style-name="Preformatted_20_Text"><text:s text:c="2"/>bos.net.nfs.adt</text:p>
            <text:p text:style-name="Preformatted_20_Text"><text:s text:c="17"/>5.1.0.50 <text:s text:c="2"/>COMMIT <text:s text:c="6"/>COMPLETE <text:s text:c="4"/>03/27/04 <text:s text:c="4"/>10:47:00 <text:s text:c="3"/></text:p>
            <text:p text:style-name="Preformatted_20_Text"><text:s text:c="17"/>5.1.0.50 <text:s text:c="2"/>APPLY <text:s text:c="7"/>COMPLETE <text:s text:c="4"/>03/27/04 <text:s text:c="4"/>10:47:00 <text:s text:c="3"/></text:p>
            <text:p text:style-name="Preformatted_20_Text"/>
            <text:p text:style-name="Preformatted_20_Text"><text:s text:c="2"/>bos.net.nfs.cachefs</text:p>
            <text:p text:style-name="Preformatted_20_Text"><text:s text:c="17"/>5.1.0.50 <text:s text:c="2"/>COMMIT <text:s text:c="6"/>COMPLETE <text:s text:c="4"/>03/27/04 <text:s text:c="4"/>10:47:00 <text:s text:c="3"/></text:p>
            <text:p text:style-name="Preformatted_20_Text"><text:s text:c="17"/>5.1.0.50 <text:s text:c="2"/>APPLY <text:s text:c="7"/>COMPLETE <text:s text:c="4"/>03/27/04 <text:s text:c="4"/>10:47:00 <text:s text:c="3"/></text:p>
            <text:p text:style-name="Preformatted_20_Text"/>
            <text:p text:style-name="Preformatted_20_Text"><text:s text:c="2"/>bos.net.nfs.client</text:p>
            <text:p text:style-name="Preformatted_20_Text"><text:s text:c="17"/>5.1.0.50 <text:s text:c="2"/>COMMIT <text:s text:c="6"/>COMPLETE <text:s text:c="4"/>03/27/04 <text:s text:c="4"/>10:47:00 <text:s text:c="3"/></text:p>
            <text:p text:style-name="Preformatted_20_Text"><text:s text:c="17"/>5.1.0.50 <text:s text:c="2"/>APPLY <text:s text:c="7"/>COMPLETE <text:s text:c="4"/>03/27/04 <text:s text:c="4"/>10:47:00 <text:s text:c="3"/></text:p>
            <text:p text:style-name="Preformatted_20_Text"><text:s text:c="17"/>5.1.0.51 <text:s text:c="2"/>COMMIT <text:s text:c="6"/>COMPLETE <text:s text:c="4"/>03/27/04 <text:s text:c="4"/>18:25:43 <text:s text:c="3"/></text:p>
            <text:p text:style-name="Preformatted_20_Text"><text:s text:c="17"/>5.1.0.51 <text:s text:c="2"/>APPLY <text:s text:c="7"/>COMPLETE <text:s text:c="4"/>03/27/04 <text:s text:c="4"/>18:25:28 <text:s text:c="3"/></text:p>
            <text:p text:style-name="Preformatted_20_Text"/>
            <text:p text:style-name="Preformatted_20_Text"><text:s text:c="2"/>bos.net.nfs.server</text:p>
            <text:p text:style-name="Preformatted_20_Text"><text:s text:c="17"/>5.1.0.50 <text:s text:c="2"/>COMMIT <text:s text:c="6"/>COMPLETE <text:s text:c="4"/>03/27/04 <text:s text:c="4"/>10:47:00 <text:s text:c="3"/></text:p>
            <text:p text:style-name="Preformatted_20_Text"><text:s text:c="17"/>5.1.0.50 <text:s text:c="2"/>APPLY <text:s text:c="7"/>COMPLETE <text:s text:c="4"/>03/27/04 <text:s text:c="4"/>10:47:00 <text:s text:c="3"/></text:p>
            <text:p text:style-name="Preformatted_20_Text">[...]</text:p>
            <text:p text:style-name="Preformatted_20_Text"/>
            <text:p text:style-name="Preformatted_20_Text">Path: /etc/objrepos</text:p>
            <text:p text:style-name="Preformatted_20_Text"><text:s text:c="2"/>bos.net.ipsec.keymgt</text:p>
            <text:p text:style-name="Preformatted_20_Text"><text:s text:c="17"/>5.1.0.50 <text:s text:c="2"/>COMMIT <text:s text:c="6"/>COMPLETE <text:s text:c="4"/>03/27/04 <text:s text:c="4"/>10:47:25 <text:s text:c="3"/></text:p>
            <text:p text:style-name="Preformatted_20_Text"><text:s text:c="17"/>5.1.0.50 <text:s text:c="2"/>APPLY <text:s text:c="7"/>COMPLETE <text:s text:c="4"/>03/27/04 <text:s text:c="4"/>10:47:25 <text:s text:c="3"/></text:p>
            <text:p text:style-name="Preformatted_20_Text"/>
            <text:p text:style-name="Preformatted_20_Text"><text:s text:c="2"/>bos.net.ipsec.rte</text:p>
            <text:p text:style-name="Preformatted_20_Text"><text:s text:c="17"/>5.1.0.50 <text:s text:c="2"/>COMMIT <text:s text:c="6"/>COMPLETE <text:s text:c="4"/>03/27/04 <text:s text:c="4"/>10:47:25 <text:s text:c="3"/></text:p>
            <text:p text:style-name="Preformatted_20_Text"><text:s text:c="17"/>5.1.0.50 <text:s text:c="2"/>APPLY <text:s text:c="7"/>COMPLETE <text:s text:c="4"/>03/27/04 <text:s text:c="4"/>10:47:25 <text:s text:c="3"/></text:p>
            <text:p text:style-name="Preformatted_20_Text">[...]</text:p>
            <text:p text:style-name="P53">#</text:p>
          </table:table-cell>
        </table:table-row>
      </table:table>
      <text:p text:style-name="Text_20_body">Affiche des caractéristiques sur le fileset bos.net : </text:p>
      <table:table table:name="Tableau170" table:style-name="Tableau170">
        <table:table-column table:style-name="Tableau170.A"/>
        <table:table-row>
          <table:table-cell table:style-name="Tableau170.A1" office:value-type="string">
            <text:p text:style-name="Preformatted_20_Text"># lslpp -L bos.net.*</text:p>
            <text:p text:style-name="Preformatted_20_Text"><text:s text:c="2"/>Fileset <text:s text:c="21"/>Level <text:s/>State <text:s/>Type <text:s/>Description (Uninstaller)</text:p>
            <text:p text:style-name="Preformatted_20_Text"><text:s text:c="2"/>----------------------------------------------------------------------------</text:p>
            <text:p text:style-name="Preformatted_20_Text"><text:s text:c="2"/>bos.net.ipsec.keymgt <text:s text:c="5"/>5.1.0.50 <text:s text:c="3"/>C <text:s text:c="4"/>F <text:s text:c="3"/>IP Security Key Management </text:p>
            <text:p text:style-name="Preformatted_20_Text"><text:s text:c="2"/>bos.net.ipsec.rte <text:s text:c="8"/>5.1.0.51 <text:s text:c="3"/>C <text:s text:c="4"/>F <text:s text:c="3"/>IP Security</text:p>
            <text:p text:style-name="Preformatted_20_Text"><text:s text:c="2"/>bos.net.ncs <text:s text:c="14"/>5.1.0.25 <text:s text:c="3"/>C <text:s text:c="4"/>F <text:s text:c="3"/>Network Computing System 1.5.1</text:p>
            <text:p text:style-name="Preformatted_20_Text"><text:s text:c="2"/>bos.net.nfs.adt <text:s text:c="10"/>5.1.0.50 <text:s text:c="3"/>C <text:s text:c="4"/>F <text:s text:c="3"/>Network File System</text:p>
            <text:p text:style-name="Preformatted_20_Text"><text:s text:c="51"/>Development Toolkit </text:p>
            <text:p text:style-name="Preformatted_20_Text"><text:s text:c="2"/>bos.net.nfs.cachefs <text:s text:c="6"/>5.1.0.50 <text:s text:c="3"/>C <text:s text:c="4"/>F <text:s text:c="3"/>CacheFS File System </text:p>
            <text:p text:style-name="Preformatted_20_Text"><text:s text:c="2"/>bos.net.nfs.client <text:s text:c="7"/>5.1.0.51 <text:s text:c="3"/>C <text:s text:c="4"/>F <text:s text:c="3"/>Network File System Client</text:p>
            <text:p text:style-name="Preformatted_20_Text"><text:s text:c="2"/>bos.net.nfs.server <text:s text:c="7"/>5.1.0.50 <text:s text:c="3"/>C <text:s text:c="4"/>F <text:s text:c="3"/>Network File System Server </text:p>
            <text:p text:style-name="Preformatted_20_Text"><text:s text:c="2"/>bos.net.nis.client <text:s text:c="7"/>5.1.0.50 <text:s text:c="3"/>C <text:s text:c="4"/>F <text:s text:c="3"/>Network Information Service</text:p>
            <text:p text:style-name="Preformatted_20_Text"><text:s text:c="51"/>Client </text:p>
            <text:p text:style-name="Preformatted_20_Text"><text:s text:c="2"/>bos.net.nis.server <text:s text:c="7"/>5.1.0.50 <text:s text:c="3"/>C <text:s text:c="4"/>F <text:s text:c="3"/>Network Information Service</text:p>
            <text:p text:style-name="Preformatted_20_Text"><text:s text:c="51"/>Server </text:p>
            <text:p text:style-name="Preformatted_20_Text"><text:s text:c="2"/>bos.net.snapp <text:s text:c="13"/>5.1.0.0 <text:s text:c="3"/>C <text:s text:c="4"/>F <text:s text:c="3"/>System Networking Analysis and</text:p>
            <text:p text:style-name="Preformatted_20_Text"><text:s text:c="51"/>Performance Pilot </text:p>
            <text:p text:style-name="Preformatted_20_Text"><text:s text:c="2"/>bos.net.tcp.adt <text:s text:c="10"/>5.1.0.35 <text:s text:c="3"/>C <text:s text:c="4"/>F <text:s text:c="3"/>TCP/IP Application Toolkit </text:p>
            <text:p text:style-name="Preformatted_20_Text"><text:s text:c="2"/>bos.net.tcp.client <text:s text:c="7"/>5.1.0.52 <text:s text:c="3"/>C <text:s text:c="4"/>F <text:s text:c="3"/>TCP/IP Client Support</text:p>
            <text:p text:style-name="Preformatted_20_Text"><text:s text:c="2"/>bos.net.tcp.server <text:s text:c="7"/>5.1.0.50 <text:s text:c="3"/>C <text:s text:c="4"/>F <text:s text:c="3"/>TCP/IP Server </text:p>
            <text:p text:style-name="Preformatted_20_Text"><text:s text:c="2"/>bos.net.tcp.smit <text:s text:c="9"/>5.1.0.50 <text:s text:c="3"/>C <text:s text:c="4"/>F <text:s text:c="3"/>TCP/IP SMIT Support </text:p>
            <text:p text:style-name="Preformatted_20_Text"><text:s text:c="2"/>bos.net.uucp <text:s text:c="13"/>5.1.0.35 <text:s text:c="3"/>C <text:s text:c="4"/>F <text:s text:c="3"/>Unix to Unix Copy Program </text:p>
            <text:p text:style-name="Preformatted_20_Text"/>
            <text:p text:style-name="Preformatted_20_Text"/>
            <text:p text:style-name="Preformatted_20_Text">State codes: </text:p>
            <text:p text:style-name="Preformatted_20_Text"><text:s/>A -- Applied. </text:p>
            <text:p text:style-name="Preformatted_20_Text"><text:s/>B -- Broken. </text:p>
            <text:p text:style-name="Preformatted_20_Text"><text:s/>C -- Committed. </text:p>
            <text:p text:style-name="Preformatted_20_Text"><text:s/>E -- EFIX Locked. </text:p>
            <text:p text:style-name="Preformatted_20_Text"><text:s/>O -- Obsolete. <text:s/>(partially migrated to newer version) </text:p>
            <text:p text:style-name="Preformatted_20_Text"><text:s/>? -- Inconsistent State...Run lppchk -v. </text:p>
            <text:p text:style-name="Preformatted_20_Text"/>
            <text:p text:style-name="Preformatted_20_Text">Type codes: </text:p>
            <text:p text:style-name="Preformatted_20_Text"><text:s/>F -- Installp Fileset </text:p>
            <text:p text:style-name="Preformatted_20_Text"><text:s/>P -- Product </text:p>
            <text:p text:style-name="Preformatted_20_Text"><text:s/>C -- Component </text:p>
            <text:p text:style-name="Preformatted_20_Text"><text:s/>T -- Feature </text:p>
            <text:p text:style-name="Preformatted_20_Text"><text:s/>R -- RPM Package </text:p>
            <text:p text:style-name="P53">#</text:p>
          </table:table-cell>
        </table:table-row>
      </table:table>
      <text:p text:style-name="Text_20_body">Affiche des caractéristiques sur le fileset bos.net, affiché sous forme de colonnes (affichage modifié pour que ça tienne sur une ligne) : </text:p>
      <table:table table:name="Tableau171" table:style-name="Tableau171">
        <table:table-column table:style-name="Tableau171.A"/>
        <table:table-row>
          <table:table-cell table:style-name="Tableau171.A1" office:value-type="string">
            <text:p text:style-name="Preformatted_20_Text"># lslpp -Lc</text:p>
            <text:p text:style-name="Preformatted_20_Text">#Package Name:Fileset:Level:State:PTF Id:Fix State:Type:Description:\</text:p>
            <text:p text:style-name="Preformatted_20_Text">Destination Dir.:Uninstaller:Message Catalog:Message Set:\</text:p>
            <text:p text:style-name="Preformatted_20_Text">Message Number:Parent:EFIX Locked</text:p>
            <text:p text:style-name="Preformatted_20_Text">IMNSearch.rte.httpdlite:IMNSearch.rte.httpdlite:2.0.0.15: : :C: :\</text:p>
            <text:p text:style-name="Preformatted_20_Text">Lite NetQuestion Local Web Server : : : : : : :0:</text:p>
            <text:p text:style-name="Preformatted_20_Text">Java130.rte:Java130.rte.bin:1.3.0.16: : :C: :\</text:p>
            <text:p text:style-name="Preformatted_20_Text">Java Runtime Environment Executables : : : : : : :0:</text:p>
            <text:p text:style-name="Preformatted_20_Text">Java130.rte:Java130.rte.lib:1.3.0.16: : :C: :\</text:p>
            <text:p text:style-name="Preformatted_20_Text">Java Runtime Environment Libraries : : : : : : :0:</text:p>
            <text:p text:style-name="Preformatted_20_Text">[...]</text:p>
            <text:p text:style-name="P53">#</text:p>
          </table:table-cell>
        </table:table-row>
      </table:table>
      <text:p text:style-name="Text_20_body">Affiche des caractéristiques plus succintes sur le fileset bos.net : </text:p>
      <table:table table:name="Tableau172" table:style-name="Tableau172">
        <table:table-column table:style-name="Tableau172.A"/>
        <table:table-row>
          <table:table-cell table:style-name="Tableau172.A1" office:value-type="string">
            <text:p text:style-name="Preformatted_20_Text"># lslpp -l bos.net.*</text:p>
            <text:p text:style-name="Preformatted_20_Text"><text:s text:c="2"/>Fileset <text:s text:c="21"/>Level <text:s/>State <text:s text:c="5"/>Description <text:s text:c="8"/></text:p>
            <text:p text:style-name="Preformatted_20_Text"><text:s text:c="2"/>----------------------------------------------------------------------------</text:p>
            <text:p text:style-name="Preformatted_20_Text">Path: /usr/lib/objrepos</text:p>
            <text:p text:style-name="Preformatted_20_Text"><text:s text:c="2"/>bos.net.ipsec.keymgt <text:s text:c="5"/>5.1.0.50 <text:s/>COMMITTED <text:s/>IP Security Key Management </text:p>
            <text:p text:style-name="Preformatted_20_Text"><text:s text:c="2"/>bos.net.ipsec.rte <text:s text:c="8"/>5.1.0.51 <text:s/>COMMITTED <text:s/>IP Security</text:p>
            <text:p text:style-name="Preformatted_20_Text"><text:s text:c="2"/>bos.net.ncs <text:s text:c="14"/>5.1.0.25 <text:s/>COMMITTED <text:s/>Network Computing System 1.5.1</text:p>
            <text:p text:style-name="Preformatted_20_Text"><text:s text:c="2"/>bos.net.nfs.adt <text:s text:c="10"/>5.1.0.50 <text:s/>COMMITTED <text:s/>Network File System</text:p>
            <text:p text:style-name="Preformatted_20_Text"><text:s text:c="49"/>Development Toolkit </text:p>
            <text:p text:style-name="Preformatted_20_Text"><text:s text:c="2"/>bos.net.nfs.cachefs <text:s text:c="6"/>5.1.0.50 <text:s/>COMMITTED <text:s/>CacheFS File System </text:p>
            <text:p text:style-name="Preformatted_20_Text"><text:s text:c="2"/>bos.net.nfs.client <text:s text:c="7"/>5.1.0.51 <text:s/>COMMITTED <text:s/>Network File System Client</text:p>
            <text:p text:style-name="Preformatted_20_Text"><text:s text:c="2"/>bos.net.nfs.server <text:s text:c="7"/>5.1.0.50 <text:s/>COMMITTED <text:s/>Network File System Server </text:p>
            <text:p text:style-name="Preformatted_20_Text"><text:s text:c="2"/>bos.net.nis.client <text:s text:c="7"/>5.1.0.50 <text:s/>COMMITTED <text:s/>Network Information Service</text:p>
            <text:p text:style-name="Preformatted_20_Text"><text:s text:c="49"/>Client </text:p>
            <text:p text:style-name="Preformatted_20_Text"><text:s text:c="2"/>bos.net.nis.server <text:s text:c="7"/>5.1.0.50 <text:s/>COMMITTED <text:s/>Network Information Service</text:p>
            <text:p text:style-name="Preformatted_20_Text"><text:s text:c="49"/>Server </text:p>
            <text:p text:style-name="Preformatted_20_Text"><text:s text:c="2"/>bos.net.snapp <text:s text:c="13"/>5.1.0.0 <text:s/>COMMITTED <text:s/>System Networking Analysis and</text:p>
            <text:p text:style-name="Preformatted_20_Text"><text:s text:c="49"/>Performance Pilot </text:p>
            <text:p text:style-name="Preformatted_20_Text"><text:s text:c="2"/>bos.net.tcp.adt <text:s text:c="10"/>5.1.0.35 <text:s/>COMMITTED <text:s/>TCP/IP Application Toolkit </text:p>
            <text:p text:style-name="Preformatted_20_Text"><text:s text:c="2"/>bos.net.tcp.client <text:s text:c="7"/>5.1.0.52 <text:s/>COMMITTED <text:s/>TCP/IP Client Support</text:p>
            <text:p text:style-name="Preformatted_20_Text"><text:s text:c="2"/>bos.net.tcp.server <text:s text:c="7"/>5.1.0.50 <text:s/>COMMITTED <text:s/>TCP/IP Server </text:p>
            <text:p text:style-name="Preformatted_20_Text"><text:s text:c="2"/>bos.net.tcp.smit <text:s text:c="9"/>5.1.0.50 <text:s/>COMMITTED <text:s/>TCP/IP SMIT Support </text:p>
            <text:p text:style-name="Preformatted_20_Text"><text:s text:c="2"/>bos.net.uucp <text:s text:c="13"/>5.1.0.35 <text:s/>COMMITTED <text:s/>Unix to Unix Copy Program </text:p>
            <text:p text:style-name="Preformatted_20_Text"/>
            <text:p text:style-name="Preformatted_20_Text">Path: /etc/objrepos</text:p>
            <text:p text:style-name="Preformatted_20_Text"><text:s text:c="2"/>bos.net.ipsec.keymgt <text:s text:c="5"/>5.1.0.50 <text:s/>COMMITTED <text:s/>IP Security Key Management </text:p>
            <text:p text:style-name="Preformatted_20_Text"><text:s text:c="2"/>bos.net.ipsec.rte <text:s text:c="8"/>5.1.0.50 <text:s/>COMMITTED <text:s/>IP Security </text:p>
            <text:p text:style-name="Preformatted_20_Text"><text:s text:c="2"/>bos.net.ncs <text:s text:c="14"/>5.1.0.25 <text:s/>COMMITTED <text:s/>Network Computing System 1.5.1</text:p>
            <text:p text:style-name="Preformatted_20_Text"><text:s text:c="2"/>bos.net.nfs.cachefs <text:s text:c="6"/>5.1.0.50 <text:s/>COMMITTED <text:s/>CacheFS File System </text:p>
            <text:p text:style-name="Preformatted_20_Text"><text:s text:c="2"/>bos.net.nfs.client <text:s text:c="7"/>5.1.0.51 <text:s/>COMMITTED <text:s/>Network File System Client</text:p>
            <text:p text:style-name="Preformatted_20_Text"><text:s text:c="2"/>bos.net.nis.client <text:s text:c="7"/>5.1.0.50 <text:s/>COMMITTED <text:s/>Network Information Service</text:p>
            <text:p text:style-name="Preformatted_20_Text"><text:s text:c="49"/>Client </text:p>
            <text:p text:style-name="Preformatted_20_Text"><text:s text:c="2"/>bos.net.nis.server <text:s text:c="7"/>5.1.0.50 <text:s/>COMMITTED <text:s/>Network Information Service</text:p>
            <text:p text:style-name="Preformatted_20_Text"><text:s text:c="49"/>Server </text:p>
            <text:p text:style-name="Preformatted_20_Text"><text:s text:c="2"/>bos.net.snapp <text:s text:c="13"/>5.1.0.0 <text:s/>COMMITTED <text:s/>System Networking Analysis and</text:p>
            <text:p text:style-name="Preformatted_20_Text"><text:s text:c="49"/>Performance Pilot </text:p>
            <text:p text:style-name="Preformatted_20_Text"><text:s text:c="2"/>bos.net.tcp.client <text:s text:c="7"/>5.1.0.52 <text:s/>COMMITTED <text:s/>TCP/IP Client Support</text:p>
            <text:p text:style-name="Preformatted_20_Text"><text:s text:c="2"/>bos.net.tcp.server <text:s text:c="7"/>5.1.0.50 <text:s/>COMMITTED <text:s/>TCP/IP Server </text:p>
            <text:p text:style-name="Preformatted_20_Text"><text:s text:c="2"/>bos.net.uucp <text:s text:c="13"/>5.1.0.35 <text:s/>COMMITTED <text:s/>Unix to Unix Copy Program</text:p>
            <text:p text:style-name="P53">#</text:p>
          </table:table-cell>
        </table:table-row>
      </table:table>
      <text:p text:style-name="Text_20_body">Affichage des patchs installés : </text:p>
      <table:table table:name="Tableau173" table:style-name="Tableau173">
        <table:table-column table:style-name="Tableau173.A"/>
        <table:table-row>
          <table:table-cell table:style-name="Tableau173.A1" office:value-type="string">
            <text:p text:style-name="Preformatted_20_Text"># instfix -i</text:p>
            <text:p text:style-name="Preformatted_20_Text"><text:s text:c="4"/>All filesets for 5.1.0.0_AIX_ML were found.</text:p>
            <text:p text:style-name="Preformatted_20_Text"><text:s text:c="4"/>All filesets for 5100-01_AIX_ML were found.</text:p>
            <text:p text:style-name="Preformatted_20_Text"><text:s text:c="4"/>All filesets for IY22854 were found.</text:p>
            <text:p text:style-name="Preformatted_20_Text"><text:s text:c="4"/>All filesets for 5100-02_AIX_ML were found.</text:p>
            <text:p text:style-name="Preformatted_20_Text"><text:s text:c="4"/>All filesets for 5100-03_AIX_ML were found.</text:p>
            <text:p text:style-name="Preformatted_20_Text"><text:s text:c="4"/>All filesets for 5100-04_AIX_ML were found.</text:p>
            <text:p text:style-name="Preformatted_20_Text"><text:s text:c="4"/>All filesets for IY43209 were found.</text:p>
            <text:p text:style-name="Preformatted_20_Text"><text:s text:c="4"/>Not all filesets for IY43094 were found.</text:p>
            <text:p text:style-name="Preformatted_20_Text"><text:s text:c="4"/>All filesets for IY41829 were found.</text:p>
            <text:p text:style-name="Preformatted_20_Text"><text:s text:c="4"/>All filesets for IY42879 were found.</text:p>
            <text:p text:style-name="Preformatted_20_Text">[...]</text:p>
            <text:p text:style-name="Preformatted_20_Text"><text:s text:c="4"/>All filesets for IY51039 were found.</text:p>
            <text:p text:style-name="Preformatted_20_Text"><text:s text:c="4"/>All filesets for IY51524 were found.</text:p>
            <text:p text:style-name="Preformatted_20_Text"><text:s text:c="4"/>All filesets for IY51955 were found.</text:p>
            <text:p text:style-name="Preformatted_20_Text"><text:s text:c="4"/>All filesets for IY52442 were found.</text:p>
            <text:p text:style-name="Preformatted_20_Text"><text:s text:c="4"/>All filesets for IY44787 were found.</text:p>
            <text:p text:style-name="Preformatted_20_Text"><text:s text:c="4"/>All filesets for IY44242 were found.</text:p>
            <text:p text:style-name="Preformatted_20_Text"><text:s text:c="4"/>All filesets for IY32114 were found.</text:p>
            <text:p text:style-name="Preformatted_20_Text"><text:s text:c="4"/>All filesets for IY49924 were found.</text:p>
            <text:p text:style-name="Preformatted_20_Text"><text:s text:c="4"/>All filesets for IY45541 were found.</text:p>
            <text:p text:style-name="Preformatted_20_Text"><text:s text:c="4"/>All filesets for IY46663 were found.</text:p>
            <text:p text:style-name="P53">#</text:p>
          </table:table-cell>
        </table:table-row>
      </table:table>
      <text:p text:style-name="Text_20_body">Vérification des fichiers des packages : </text:p>
      <table:table table:name="Tableau174" table:style-name="Tableau174">
        <table:table-column table:style-name="Tableau174.A"/>
        <table:table-row>
          <table:table-cell table:style-name="Tableau174.A1" office:value-type="string">
            <text:p text:style-name="Preformatted_20_Text"># lppchk -v</text:p>
            <text:p text:style-name="Preformatted_20_Text">lppchk: <text:s/>The following filesets need to be installed or corrected to bring</text:p>
            <text:p text:style-name="Preformatted_20_Text"><text:s text:c="9"/>the system to a consistent state:</text:p>
            <text:p text:style-name="Preformatted_20_Text"/>
            <text:p text:style-name="Preformatted_20_Text"><text:s text:c="2"/>Mozilla.msg.FR_FR.base.rte 1.4.1.0 <text:s text:c="5"/>(not installed; requisite fileset)</text:p>
            <text:p text:style-name="Preformatted_20_Text"/>
            <text:p text:style-name="P53">#</text:p>
          </table:table-cell>
        </table:table-row>
      </table:table>
      <text:p text:style-name="Text_20_body"><text:a xlink:type="simple" xlink:href="http://www.linux-france.org/%7Emdecore/aix/memo-aix/memo-aix.html#top">Top</text:a><text:bookmark text:name="subsec16.2"/></text:p>
      <text:h text:style-name="Heading_20_3" text:outline-level="3">16.2. Installation des packages et des patchs</text:h>
      <text:p text:style-name="Text_20_body">Installation de logiciels : smit install </text:p>
      <text:p text:style-name="Text_20_body">Méthode d'installation : </text:p>
      <text:list xml:id="list37342858" text:style-name="L26">
        <text:list-item>
          <text:p text:style-name="P48">Mise en place du CD 1 d'AIX (qui contient la liste des packages par CD et est donc capable de demander le bon CD pour installer le package désiré) </text:p>
        </text:list-item>
        <text:list-item>
          <text:p text:style-name="P48">Commande : smitty install_latest </text:p>
        </text:list-item>
        <text:list-item>
          <text:p text:style-name="P48">Média : /cdrom </text:p>
        </text:list-item>
        <text:list-item>
          <text:p text:style-name="P48">Sélection des packages à installer </text:p>
        </text:list-item>
        <text:list-item>
          <text:p text:style-name="P48">Accepter les nouveaux contrats de licence ? Oui </text:p>
        </text:list-item>
        <text:list-item>
          <text:p text:style-name="P48">Installation... </text:p>
        </text:list-item>
        <text:list-item>
          <text:p text:style-name="P26">Mise à jour : insertion du CD de mise à jour, puis lancer la commande smitty update_all </text:p>
        </text:list-item>
      </text:list>
      <text:p text:style-name="Text_20_body">Vérification des patchs installés : </text:p>
      <table:table table:name="Tableau175" table:style-name="Tableau175">
        <table:table-column table:style-name="Tableau175.A"/>
        <table:table-row>
          <table:table-cell table:style-name="Tableau175.A1" office:value-type="string">
            <text:p text:style-name="Preformatted_20_Text"># instfix -i | grep ML</text:p>
            <text:p text:style-name="Preformatted_20_Text"><text:s text:c="4"/>Tous les ensembles de fichiers de 5.1.0.0_AIX_ML ont été trouvés.</text:p>
            <text:p text:style-name="Preformatted_20_Text"><text:s text:c="4"/>Tous les ensembles de fichiers de 5100-01_AIX_ML ont été trouvés.</text:p>
            <text:p text:style-name="Preformatted_20_Text"><text:s text:c="4"/>Tous les ensembles de fichiers de 5100-02_AIX_ML ont été trouvés.</text:p>
            <text:p text:style-name="Preformatted_20_Text"><text:s text:c="4"/>Tous les ensembles de fichiers de 5100-03_AIX_ML ont été trouvés.</text:p>
            <text:p text:style-name="Preformatted_20_Text"><text:s text:c="4"/>Tous les ensembles de fichiers de 5100-04_AIX_ML ont été trouvés.</text:p>
            <text:p text:style-name="Preformatted_20_Text"><text:s text:c="4"/>Tous les ensembles de fichiers de 5100-05_AIX_ML ont été trouvés.</text:p>
            <text:p text:style-name="Preformatted_20_Text"><text:s text:c="4"/>Tous les ensembles de fichiers de 5100-06_AIX_ML ont été trouvés.</text:p>
            <text:p text:style-name="P53">#</text:p>
          </table:table-cell>
        </table:table-row>
      </table:table>
      <text:p text:style-name="Text_20_body">Installer un patch chargé sur le site d’IBM (fichiers .bff) : </text:p>
      <table:table table:name="Tableau176" table:style-name="Tableau176">
        <table:table-column table:style-name="Tableau176.A"/>
        <table:table-row>
          <table:table-cell table:style-name="Tableau176.A1" office:value-type="string">
            <text:p text:style-name="Preformatted_20_Text"># inutoc /tmp</text:p>
            <text:p text:style-name="P53">#</text:p>
          </table:table-cell>
        </table:table-row>
      </table:table>
      <table:table table:name="Tableau177" table:style-name="Tableau177">
        <table:table-column table:style-name="Tableau177.A"/>
        <table:table-row>
          <table:table-cell table:style-name="Tableau177.A1" office:value-type="string">
            <text:p text:style-name="Preformatted_20_Text"># smit install_latest</text:p>
            <text:p text:style-name="Preformatted_20_Text">[ Sélectionner comme répertoire /tmp, puis installation normale ]</text:p>
            <text:p text:style-name="Preformatted_20_Text">[…]</text:p>
            <text:p text:style-name="P53">#</text:p>
          </table:table-cell>
        </table:table-row>
      </table:table>
      <text:p text:style-name="Text_20_body">Installer un patch chargé sur le site de Bull (fichiers .exe) : </text:p>
      <table:table table:name="Tableau178" table:style-name="Tableau178">
        <table:table-column table:style-name="Tableau178.A"/>
        <table:table-row>
          <table:table-cell table:style-name="Tableau178.A1" office:value-type="string">
            <text:p text:style-name="Preformatted_20_Text"># chmod +x fic.exe</text:p>
            <text:p text:style-name="P53">#</text:p>
          </table:table-cell>
        </table:table-row>
      </table:table>
      <table:table table:name="Tableau179" table:style-name="Tableau179">
        <table:table-column table:style-name="Tableau179.A"/>
        <table:table-row>
          <table:table-cell table:style-name="Tableau179.A1" office:value-type="string">
            <text:p text:style-name="Preformatted_20_Text"># ./fic.exe</text:p>
            <text:p text:style-name="Preformatted_20_Text">UnZipSFX 5.32 of 3 November 1997, by Info-ZIP (Zip-Bugs@lists.wku.edu).</text:p>
            <text:p text:style-name="Preformatted_20_Text"><text:s text:c="2"/>inflating: fic-version.bff</text:p>
            <text:p text:style-name="Preformatted_20_Text"><text:s text:c="2"/>inflating: fic-version.bff.asc</text:p>
            <text:p text:style-name="P53">#</text:p>
          </table:table-cell>
        </table:table-row>
      </table:table>
      <text:p text:style-name="Text_20_body">Puis suivre la procédure classique d’installation via smit. </text:p>
      <text:p text:style-name="Text_20_body">Le répertoire des patchs peut être monté par NFS (remplacer xxx par 433 ou 51, en cas de doute taper showmount -e post.doit.wisc.edu) : </text:p>
      <table:table table:name="Tableau180" table:style-name="Tableau180">
        <table:table-column table:style-name="Tableau180.A"/>
        <table:table-row>
          <table:table-cell table:style-name="Tableau180.A1" office:value-type="string">
            <text:p text:style-name="Preformatted_20_Text"># mount post.doit.wisc.edu:/aix/xxx/fix /mnt</text:p>
            <text:p text:style-name="P53">#</text:p>
          </table:table-cell>
        </table:table-row>
      </table:table>
      <text:p text:style-name="Text_20_body">Puis avec smitty update_all préciser comme répertoire /mnt/5100-03 (version AIX 5100-03) ou /mnt/postML3 (maintenance level 3). </text:p>
      <text:p text:style-name="Text_20_body">Enfin, démonter le répertoire NFS : </text:p>
      <table:table table:name="Tableau181" table:style-name="Tableau181">
        <table:table-column table:style-name="Tableau181.A"/>
        <table:table-row>
          <table:table-cell table:style-name="Tableau181.A1" office:value-type="string">
            <text:p text:style-name="Preformatted_20_Text"># umount /mnt</text:p>
            <text:p text:style-name="P53">#</text:p>
          </table:table-cell>
        </table:table-row>
      </table:table>
      <text:p text:style-name="Text_20_body"><text:a xlink:type="simple" xlink:href="http://www.linux-france.org/%7Emdecore/aix/memo-aix/memo-aix.html#top">Top</text:a><text:bookmark text:name="sec17"/></text:p>
      <text:h text:style-name="Heading_20_2" text:outline-level="2">17. Sécurité et utilisateurs</text:h>
      <text:p text:style-name="Text_20_body"><text:a xlink:type="simple" xlink:href="http://www.linux-france.org/%7Emdecore/aix/memo-aix/memo-aix.html#top">Top</text:a><text:bookmark text:name="subsec17.1"/></text:p>
      <text:h text:style-name="Heading_20_3" text:outline-level="3">17.1. Fichiers utilisés</text:h>
      <text:list xml:id="list37350271" text:style-name="L27">
        <text:list-item>
          <text:p text:style-name="P49">Fichier de logs de la commande su : /var/adm/sulog </text:p>
        </text:list-item>
        <text:list-item>
          <text:p text:style-name="P49">Mots de passes stockés : /etc/security/passwd </text:p>
        </text:list-item>
        <text:list-item>
          <text:p text:style-name="P49">Journal des connexions ayant abouti : /var/adm/wtmp (who /var/adm/wtmp) </text:p>
        </text:list-item>
        <text:list-item>
          <text:p text:style-name="P49">Liste des utilisateurs connectés : /etc/utmp (who /etc/utmp) </text:p>
        </text:list-item>
        <text:list-item>
          <text:p text:style-name="P49">Journal des connexions ayant échoué : /etc/security/failedlogin (who /etc/security/failedlogin) </text:p>
        </text:list-item>
        <text:list-item>
          <text:p text:style-name="P49">umask par défaut : /etc/security/user </text:p>
        </text:list-item>
        <text:list-item>
          <text:p text:style-name="P49">mot de passe chiffré : /etc/security/passwd </text:p>
        </text:list-item>
        <text:list-item>
          <text:p text:style-name="P27">configuration de l'environnement : /etc/environment, /etc/security/environ, /etc/security/limits, /etc/security/user, /etc/profile, $HOME/.profile </text:p>
        </text:list-item>
      </text:list>
      <text:p text:style-name="Text_20_body">$HOME/.dtprofile remplace $HOME/.profile pour CDE. Pour utiliser les deux, dé commenter la ligne DTSOURCEPROFILE dans $HOME/.dtprofile. </text:p>
      <text:p text:style-name="Text_20_body"><text:a xlink:type="simple" xlink:href="http://www.linux-france.org/%7Emdecore/aix/memo-aix/memo-aix.html#top">Top</text:a><text:bookmark text:name="subsec17.2"/></text:p>
      <text:h text:style-name="Heading_20_3" text:outline-level="3">17.2. Les utilisateurs</text:h>
      <text:p text:style-name="Text_20_body">Affichage de tous les attributs de tous les utilisateurs : </text:p>
      <table:table table:name="Tableau182" table:style-name="Tableau182">
        <table:table-column table:style-name="Tableau182.A"/>
        <table:table-row>
          <table:table-cell table:style-name="Tableau182.A1" office:value-type="string">
            <text:p text:style-name="Preformatted_20_Text"># lsuser ALL</text:p>
            <text:p text:style-name="Preformatted_20_Text">root id=0 pgrp=system groups=system,bin,sys,security,cron,audit,lp home=/ shell=/usr/bin/ksh </text:p>
            <text:p text:style-name="Preformatted_20_Text">daemon id=1 pgrp=staff groups=staff home=/etc </text:p>
            <text:p text:style-name="Preformatted_20_Text">bin id=2 pgrp=bin groups=bin,sys,adm home=/bin </text:p>
            <text:p text:style-name="Preformatted_20_Text">sys id=3 pgrp=sys groups=sys home=/usr/sys </text:p>
            <text:p text:style-name="Preformatted_20_Text">adm id=4 pgrp=adm groups=adm home=/var/adm </text:p>
            <text:p text:style-name="Preformatted_20_Text">uucp id=5 pgrp=uucp groups=uucp home=/usr/lib/uucp </text:p>
            <text:p text:style-name="Preformatted_20_Text">guest id=100 pgrp=usr groups=usr home=/home/guest </text:p>
            <text:p text:style-name="Preformatted_20_Text">nobody id=-2 pgrp=nobody groups=nobody home=/ </text:p>
            <text:p text:style-name="Preformatted_20_Text">lpd id=9 pgrp=nobody groups=nobody home=/ </text:p>
            <text:p text:style-name="Preformatted_20_Text">lp id=11 pgrp=lp groups=lp,printq home=/var/spool/lp shell=/bin/false </text:p>
            <text:p text:style-name="Preformatted_20_Text">invscout id=200 pgrp=staff groups=staff home=/var/adm/invscout shell=/usr/bin/ksh </text:p>
            <text:p text:style-name="Preformatted_20_Text">ipsec id=201 pgrp=staff groups=staff home=/etc/ipsec shell=/usr/bin/ksh </text:p>
            <text:p text:style-name="Preformatted_20_Text">nuucp id=6 pgrp=uucp groups=uucp home=/var/spool/uucppublic shell=/usr/sbin/uucp/uucico gecos=uucp login user </text:p>
            <text:p text:style-name="Preformatted_20_Text">snapp id=177 pgrp=staff groups=staff home=/usr/sbin/snapp shell=/usr/sbin/snappd gecos=snapp login user </text:p>
            <text:p text:style-name="Preformatted_20_Text">imnadm id=188 pgrp=imnadm groups=imnadm home=/home/imnadm shell=/usr/bin/ksh </text:p>
            <text:p text:style-name="P53">#</text:p>
          </table:table-cell>
        </table:table-row>
      </table:table>
      <text:p text:style-name="Text_20_body">Gestion des utilisateurs : mkuser, chuser, rmuser, passwd, pwdadm (changement du mot de passe de n'importe quel utilisateur, commande réservée à root et aux membres du groupe security). </text:p>
      <text:p text:style-name="Text_20_body">Effacement d'un utilisateur avec effacement des entrées dans /etc/security/* (-p) : </text:p>
      <table:table table:name="Tableau183" table:style-name="Tableau183">
        <table:table-column table:style-name="Tableau183.A"/>
        <table:table-row>
          <table:table-cell table:style-name="Tableau183.A1" office:value-type="string">
            <text:p text:style-name="Preformatted_20_Text"># rmuser -p mdecore &amp;&amp; rm -rf /home/mdecore</text:p>
            <text:p text:style-name="P53">#</text:p>
          </table:table-cell>
        </table:table-row>
      </table:table>
      <text:p text:style-name="Text_20_body">Mise à jour de la limite de la taille maximum de création d'un fichier (minimum 8192, -1 ou unlimited pour des fichier de taille plus grande que 2 Go) : </text:p>
      <table:table table:name="Tableau184" table:style-name="Tableau184">
        <table:table-column table:style-name="Tableau184.A"/>
        <table:table-row>
          <table:table-cell table:style-name="Tableau184.A1" office:value-type="string">
            <text:p text:style-name="Preformatted_20_Text"># chuser fsize='20971520' mdecore</text:p>
            <text:p text:style-name="P53">#</text:p>
          </table:table-cell>
        </table:table-row>
      </table:table>
      <text:p text:style-name="Text_20_body">Ces données, ainsi que les données par défaut, sont stockées dans le fichier /etc/security/limits et peuvent être visualisées / modifiées par la commande ulimit. </text:p>
      <text:p text:style-name="Text_20_body">Bloquer un compte (sans le supprimer) : </text:p>
      <table:table table:name="Tableau185" table:style-name="Tableau185">
        <table:table-column table:style-name="Tableau185.A"/>
        <table:table-row>
          <table:table-cell table:style-name="Tableau185.A1" office:value-type="string">
            <text:p text:style-name="Preformatted_20_Text"># chuser account_locked=yes piou</text:p>
            <text:p text:style-name="P53">#</text:p>
          </table:table-cell>
        </table:table-row>
      </table:table>
      <text:p text:style-name="Text_20_body"><text:a xlink:type="simple" xlink:href="http://www.linux-france.org/%7Emdecore/aix/memo-aix/memo-aix.html#top">Top</text:a><text:bookmark text:name="subsec17.3"/></text:p>
      <text:h text:style-name="Heading_20_3" text:outline-level="3">17.3. Les groupes</text:h>
      <text:p text:style-name="Text_20_body">Affichage de tous les attributs de tous les groupes : </text:p>
      <table:table table:name="Tableau186" table:style-name="Tableau186">
        <table:table-column table:style-name="Tableau186.A"/>
        <table:table-row>
          <table:table-cell table:style-name="Tableau186.A1" office:value-type="string">
            <text:p text:style-name="Preformatted_20_Text"># lsgroup ALL</text:p>
            <text:p text:style-name="Preformatted_20_Text">system id=0 admin=true users=root,syb12 registry=files </text:p>
            <text:p text:style-name="Preformatted_20_Text">staff id=1 admin=false users=invscout,ipsec,snapp,sshd,daemon registry=files </text:p>
            <text:p text:style-name="Preformatted_20_Text">bin id=2 admin=true users=root,bin registry=files </text:p>
            <text:p text:style-name="Preformatted_20_Text">sys id=3 admin=true users=root,bin,sys registry=files </text:p>
            <text:p text:style-name="Preformatted_20_Text">adm id=4 admin=true users=bin,adm registry=files </text:p>
            <text:p text:style-name="Preformatted_20_Text">uucp id=5 admin=true users=nuucp,uucp registry=files </text:p>
            <text:p text:style-name="Preformatted_20_Text">mail id=6 admin=true users= registry=files </text:p>
            <text:p text:style-name="Preformatted_20_Text">security id=7 admin=true users=root registry=files </text:p>
            <text:p text:style-name="Preformatted_20_Text">cron id=8 admin=true users=root registry=files </text:p>
            <text:p text:style-name="Preformatted_20_Text">printq id=9 admin=true users=lp registry=files </text:p>
            <text:p text:style-name="Preformatted_20_Text">audit id=10 admin=true users=root registry=files </text:p>
            <text:p text:style-name="Preformatted_20_Text">ecs id=28 admin=true users= registry=files </text:p>
            <text:p text:style-name="Preformatted_20_Text">nobody id=-2 admin=false users=nobody,lpd registry=files </text:p>
            <text:p text:style-name="Preformatted_20_Text">usr id=100 admin=false users=guest registry=files </text:p>
            <text:p text:style-name="Preformatted_20_Text">perf id=20 admin=false users= registry=files </text:p>
            <text:p text:style-name="Preformatted_20_Text">shutdown id=21 admin=true users= registry=files </text:p>
            <text:p text:style-name="Preformatted_20_Text">lp id=11 admin=true users=root,lp,printq registry=files </text:p>
            <text:p text:style-name="Preformatted_20_Text">ipsec id=200 admin=false users= registry=files </text:p>
            <text:p text:style-name="Preformatted_20_Text">imnadm id=188 admin=false users=imnadm registry=files </text:p>
            <text:p text:style-name="P53">#</text:p>
          </table:table-cell>
        </table:table-row>
      </table:table>
      <text:p text:style-name="Text_20_body"><text:a xlink:type="simple" xlink:href="http://www.linux-france.org/%7Emdecore/aix/memo-aix/memo-aix.html#top">Top</text:a><text:bookmark text:name="subsec17.4"/></text:p>
      <text:h text:style-name="Heading_20_3" text:outline-level="3">17.4. Au secours !</text:h>
      <text:p text:style-name="Text_20_body">Pour récupérer le mot de passe root, il faut redémarrer avec un CD d'installation ou une bande amorcable, sélectionner l'option 3 'Activation du mode maintenance pour la reprise' dans le menu d'installation et de maintenance, activer le rootvg et accéder au shell, changer le mot de passe et redémarrer. Pour éviter cette faille de sécurité, il faut mettre un mot de passe sur le menu SMS (Utilitaires --&gt; Définition du mot de passe). </text:p>
      <text:p text:style-name="Text_20_body"><text:a xlink:type="simple" xlink:href="http://www.linux-france.org/%7Emdecore/aix/memo-aix/memo-aix.html#top">Top</text:a><text:bookmark text:name="sec18"/></text:p>
      <text:h text:style-name="Heading_20_2" text:outline-level="2">18. Cron</text:h>
      <text:p text:style-name="Text_20_body">Le fichier /var/adm/cron/queuedefs permet de paramétrer cron : </text:p>
      <table:table table:name="Tableau187" table:style-name="Tableau187">
        <table:table-column table:style-name="Tableau187.A"/>
        <table:table-row>
          <table:table-cell table:style-name="Tableau187.A1" office:value-type="string">
            <text:p text:style-name="P53">c.200j10n120w</text:p>
          </table:table-cell>
        </table:table-row>
      </table:table>
      <text:list xml:id="list37343680" text:style-name="L28">
        <text:list-item>
          <text:p text:style-name="P50">c : cron </text:p>
        </text:list-item>
        <text:list-item>
          <text:p text:style-name="P50">200j : 200 jobs </text:p>
        </text:list-item>
        <text:list-item>
          <text:p text:style-name="P50">10n : nice de 10 unités en moins </text:p>
        </text:list-item>
        <text:list-item>
          <text:p text:style-name="P28">120w : 120 secondes d'attente (wait) entre deux vérifications des fichiers </text:p>
        </text:list-item>
      </text:list>
      <text:p text:style-name="Text_20_body">Fichier de la crontab dans /var/spool/cron/crontabs/$USER. Fichiers d'autorisation / interdiction : /var/spool/cron/cron.deny / /var/spool/cron/cron.allow </text:p>
      <text:list xml:id="list37333205" text:style-name="L29">
        <text:list-item>
          <text:p text:style-name="P51">Par défaut, cron.deny est vide (tout le monde peut utiliser cron). Pour utiliser cron.allow, il faut supprimmer cron.deny. </text:p>
        </text:list-item>
        <text:list-item>
          <text:p text:style-name="P51">Si cron.allow est vide, personne ne peut utiliser cron. </text:p>
        </text:list-item>
        <text:list-item>
          <text:p text:style-name="P51">Si cron.allow et cron.deny existent, cron.allow est utilisé. </text:p>
        </text:list-item>
        <text:list-item>
          <text:p text:style-name="P29">Si aucun des deux fichier n'existent, seul root peut utiliser cron. </text:p>
        </text:list-item>
      </text:list>
      <text:p text:style-name="Text_20_body">Pour at, même principe avec les fichiers /var/spool/cron/at.deny et /var/spool/cron/at.allow. </text:p>
      <text:p text:style-name="Text_20_body"><text:a xlink:type="simple" xlink:href="http://www.linux-france.org/%7Emdecore/aix/memo-aix/memo-aix.html#top">Top</text:a><text:bookmark text:name="sec19"/></text:p>
      <text:h text:style-name="Heading_20_2" text:outline-level="2">19. Réseau</text:h>
      <text:p text:style-name="Text_20_body"><text:a xlink:type="simple" xlink:href="http://www.linux-france.org/%7Emdecore/aix/memo-aix/memo-aix.html#top">Top</text:a><text:bookmark text:name="subsec19.1"/></text:p>
      <text:h text:style-name="Heading_20_3" text:outline-level="3">19.1. Affichage des attributs réseau</text:h>
      <text:p text:style-name="Text_20_body">Affichage des routes (-r) sans résolution des adresses IP en noms (-n) : </text:p>
      <table:table table:name="Tableau188" table:style-name="Tableau188">
        <table:table-column table:style-name="Tableau188.A"/>
        <table:table-row>
          <table:table-cell table:style-name="Tableau188.A1" office:value-type="string">
            <text:p text:style-name="Preformatted_20_Text"># netstat -nr</text:p>
            <text:p text:style-name="Preformatted_20_Text">Routing tables</text:p>
            <text:p text:style-name="Preformatted_20_Text">Destination <text:s text:c="5"/>Gateway <text:s text:c="10"/>Flags <text:s text:c="2"/>Refs <text:s text:c="4"/>Use <text:s/>If <text:s text:c="2"/>PMTU Exp Groups</text:p>
            <text:p text:style-name="Preformatted_20_Text"/>
            <text:p text:style-name="Preformatted_20_Text">Route tree for Protocol Family 2 (Internet):</text:p>
            <text:p text:style-name="Preformatted_20_Text">default <text:s text:c="9"/>10.41.54.1 <text:s text:c="7"/>UGc <text:s text:c="6"/>0 <text:s text:c="7"/>0 <text:s/>en0 <text:s text:c="4"/>- <text:s text:c="2"/>-</text:p>
            <text:p text:style-name="Preformatted_20_Text">10.41/16 <text:s text:c="8"/>10.41.11.15 <text:s text:c="6"/>U <text:s text:c="8"/>5 <text:s text:c="2"/>221056 <text:s/>en0 <text:s text:c="4"/>- <text:s text:c="2"/>-</text:p>
            <text:p text:style-name="Preformatted_20_Text">10.41.11.15 <text:s text:c="5"/>127.0.0.1 <text:s text:c="8"/>UGHS <text:s text:c="5"/>3 <text:s text:c="4"/>1283 <text:s/>lo0 <text:s text:c="4"/>- <text:s text:c="2"/>-</text:p>
            <text:p text:style-name="Preformatted_20_Text">10.42.23.206 <text:s text:c="4"/>10.41.54.1 <text:s text:c="7"/>UGHW <text:s text:c="5"/>4 <text:s text:c="3"/>92542 <text:s/>en0 <text:s/>1500 <text:s text:c="2"/>-</text:p>
            <text:p text:style-name="Preformatted_20_Text">127/8 <text:s text:c="11"/>127.0.0.1 <text:s text:c="8"/>U <text:s text:c="7"/>37 <text:s text:c="4"/>1653 <text:s/>lo0 <text:s text:c="4"/>- <text:s text:c="2"/>-</text:p>
            <text:p text:style-name="Preformatted_20_Text"/>
            <text:p text:style-name="Preformatted_20_Text">Route tree for Protocol Family 24 (Internet v6):</text:p>
            <text:p text:style-name="Preformatted_20_Text">::1 <text:s text:c="13"/>::1 <text:s text:c="14"/>UH <text:s text:c="7"/>0 <text:s text:c="7"/>0 <text:s/>lo0 16896 <text:s text:c="2"/>-</text:p>
            <text:p text:style-name="P53">#</text:p>
          </table:table-cell>
        </table:table-row>
      </table:table>
      <text:p text:style-name="Text_20_body">Affichage de la configuration des interfaces configurées : </text:p>
      <table:table table:name="Tableau189" table:style-name="Tableau189">
        <table:table-column table:style-name="Tableau189.A"/>
        <table:table-row>
          <table:table-cell table:style-name="Tableau189.A1" office:value-type="string">
            <text:p text:style-name="Preformatted_20_Text"># netstat -i</text:p>
            <text:p text:style-name="Preformatted_20_Text">Name <text:s/>Mtu <text:s text:c="2"/>Network <text:s text:c="4"/>Address <text:s text:c="13"/>Ipkts Ierrs <text:s text:c="3"/>Opkts Oerrs <text:s/>Coll</text:p>
            <text:p text:style-name="Preformatted_20_Text">en0 <text:s text:c="2"/>1500 <text:s/>link#2 <text:s text:c="5"/>0.9.6b.3e.34.4d <text:s text:c="2"/>10999574 <text:s text:c="4"/>0 <text:s/>2339358 <text:s text:c="4"/>0 <text:s text:c="4"/>0</text:p>
            <text:p text:style-name="Preformatted_20_Text">en0 <text:s text:c="2"/>1500 <text:s/>10.41 <text:s text:c="6"/>rsallyy01.intrane 10999574 <text:s text:c="4"/>0 <text:s/>2339358 <text:s text:c="4"/>0 <text:s text:c="4"/>0</text:p>
            <text:p text:style-name="Preformatted_20_Text">lo0 <text:s text:c="2"/>16896 link#1 <text:s text:c="27"/>3998 <text:s text:c="4"/>0 <text:s text:c="4"/>4317 <text:s text:c="4"/>0 <text:s text:c="4"/>0</text:p>
            <text:p text:style-name="Preformatted_20_Text">lo0 <text:s text:c="2"/>16896 127 <text:s text:c="8"/>localhost <text:s text:c="12"/>3998 <text:s text:c="4"/>0 <text:s text:c="4"/>4317 <text:s text:c="4"/>0 <text:s text:c="4"/>0</text:p>
            <text:p text:style-name="Preformatted_20_Text">lo0 <text:s text:c="2"/>16896 ::1 <text:s text:c="30"/>3998 <text:s text:c="4"/>0 <text:s text:c="4"/>4317 <text:s text:c="4"/>0 <text:s text:c="4"/>0</text:p>
            <text:p text:style-name="P53">#</text:p>
          </table:table-cell>
        </table:table-row>
      </table:table>
      <text:p text:style-name="Text_20_body">Statistiques de l'interface en0 : </text:p>
      <table:table table:name="Tableau190" table:style-name="Tableau190">
        <table:table-column table:style-name="Tableau190.A"/>
        <table:table-row>
          <table:table-cell table:style-name="Tableau190.A1" office:value-type="string">
            <text:p text:style-name="Preformatted_20_Text"># entstat en0</text:p>
            <text:p text:style-name="Preformatted_20_Text">-------------------------------------------------------------</text:p>
            <text:p text:style-name="Preformatted_20_Text">ETHERNET STATISTICS (en0) :</text:p>
            <text:p text:style-name="Preformatted_20_Text">Device Type: 10/100 Mbps Ethernet PCI Adapter II (1410ff01)</text:p>
            <text:p text:style-name="Preformatted_20_Text">Hardware Address: 00:09:6b:3e:34:4d</text:p>
            <text:p text:style-name="Preformatted_20_Text">Elapsed Time: 17 days 22 hours 22 minutes 47 seconds</text:p>
            <text:p text:style-name="Preformatted_20_Text"/>
            <text:p text:style-name="Preformatted_20_Text">Transmit Statistics: <text:s text:c="25"/>Receive Statistics:</text:p>
            <text:p text:style-name="Preformatted_20_Text">-------------------- <text:s text:c="25"/>-------------------</text:p>
            <text:p text:style-name="Preformatted_20_Text">Packets: 2341664 <text:s text:c="29"/>Packets: 12106165</text:p>
            <text:p text:style-name="Preformatted_20_Text">Bytes: 2505847939 <text:s text:c="28"/>Bytes: 2050086563</text:p>
            <text:p text:style-name="Preformatted_20_Text">Interrupts: 3 <text:s text:c="32"/>Interrupts: 12024601</text:p>
            <text:p text:style-name="Preformatted_20_Text">Transmit Errors: 0 <text:s text:c="27"/>Receive Errors: 54</text:p>
            <text:p text:style-name="Preformatted_20_Text">Packets Dropped: 0 <text:s text:c="27"/>Packets Dropped: 0</text:p>
            <text:p text:style-name="Preformatted_20_Text"><text:s text:c="46"/>Bad Packets: 54</text:p>
            <text:p text:style-name="Preformatted_20_Text">Max Packets on S/W Transmit Queue: 11</text:p>
            <text:p text:style-name="Preformatted_20_Text">S/W Transmit Queue Overflow: 0</text:p>
            <text:p text:style-name="Preformatted_20_Text">Current S/W+H/W Transmit Queue Length: 1</text:p>
            <text:p text:style-name="Preformatted_20_Text"/>
            <text:p text:style-name="Preformatted_20_Text">Transmit Statistics: <text:s text:c="25"/>Receive Statistics:</text:p>
            <text:p text:style-name="Preformatted_20_Text">-------------------- <text:s text:c="25"/>-------------------</text:p>
            <text:p text:style-name="Preformatted_20_Text">Packets: 2341664 <text:s text:c="29"/>Packets: 12106165</text:p>
            <text:p text:style-name="Preformatted_20_Text">Bytes: 2505847939 <text:s text:c="28"/>Bytes: 2050086563</text:p>
            <text:p text:style-name="Preformatted_20_Text">Interrupts: 3 <text:s text:c="32"/>Interrupts: 12024601</text:p>
            <text:p text:style-name="Preformatted_20_Text">Transmit Errors: 0 <text:s text:c="27"/>Receive Errors: 54</text:p>
            <text:p text:style-name="Preformatted_20_Text">Packets Dropped: 0 <text:s text:c="27"/>Packets Dropped: 0</text:p>
            <text:p text:style-name="Preformatted_20_Text"><text:s text:c="46"/>Bad Packets: 54</text:p>
            <text:p text:style-name="Preformatted_20_Text">Max Packets on S/W Transmit Queue: 11</text:p>
            <text:p text:style-name="Preformatted_20_Text">S/W Transmit Queue Overflow: 0</text:p>
            <text:p text:style-name="Preformatted_20_Text">Current S/W+H/W Transmit Queue Length: 1</text:p>
            <text:p text:style-name="Preformatted_20_Text"/>
            <text:p text:style-name="Preformatted_20_Text">Broadcast Packets: 316 <text:s text:c="23"/>Broadcast Packets: 9884483</text:p>
            <text:p text:style-name="Preformatted_20_Text">Multicast Packets: 0 <text:s text:c="25"/>Multicast Packets: 0</text:p>
            <text:p text:style-name="Preformatted_20_Text">No Carrier Sense: 0 <text:s text:c="26"/>CRC Errors: 0</text:p>
            <text:p text:style-name="Preformatted_20_Text">DMA Underrun: 0 <text:s text:c="30"/>DMA Overrun: 54</text:p>
            <text:p text:style-name="Preformatted_20_Text">Lost CTS Errors: 0 <text:s text:c="27"/>Alignment Errors: 0</text:p>
            <text:p text:style-name="Preformatted_20_Text">Max Collision Errors: 0 <text:s text:c="22"/>No Resource Errors: 0</text:p>
            <text:p text:style-name="Preformatted_20_Text">Late Collision Errors: 0 <text:s text:c="21"/>Receive Collision Errors: 0</text:p>
            <text:p text:style-name="Preformatted_20_Text">Deferred: 0 <text:s text:c="34"/>Packet Too Short Errors: 0</text:p>
            <text:p text:style-name="Preformatted_20_Text">SQE Test: 0 <text:s text:c="34"/>Packet Too Long Errors: 0</text:p>
            <text:p text:style-name="Preformatted_20_Text">Timeout Errors: 0 <text:s text:c="28"/>Packets Discarded by Adapter: 0</text:p>
            <text:p text:style-name="Preformatted_20_Text">Single Collision Count: 0 <text:s text:c="20"/>Receiver Start Count: 0</text:p>
            <text:p text:style-name="Preformatted_20_Text">Multiple Collision Count: 0</text:p>
            <text:p text:style-name="Preformatted_20_Text">Current HW Transmit Queue Length: 1</text:p>
            <text:p text:style-name="Preformatted_20_Text"/>
            <text:p text:style-name="Preformatted_20_Text">General Statistics:</text:p>
            <text:p text:style-name="Preformatted_20_Text">-------------------</text:p>
            <text:p text:style-name="Preformatted_20_Text">No mbuf Errors: 0</text:p>
            <text:p text:style-name="Preformatted_20_Text">Adapter Reset Count: 0</text:p>
            <text:p text:style-name="Preformatted_20_Text">Adapter Data Rate: 200</text:p>
            <text:p text:style-name="Preformatted_20_Text">Driver Flags: Up Broadcast Running</text:p>
            <text:p text:style-name="Preformatted_20_Text"><text:s text:c="8"/>Simplex AlternateAddress 64BitSupport</text:p>
            <text:p text:style-name="Preformatted_20_Text"><text:s text:c="8"/>ChecksumTCP ChecksumOffload PrivateSegment</text:p>
            <text:p text:style-name="Preformatted_20_Text"><text:s text:c="8"/>DataRateSet</text:p>
            <text:p text:style-name="P53">#</text:p>
          </table:table-cell>
        </table:table-row>
      </table:table>
      <text:p text:style-name="Text_20_body">Affiche tous les attributs réseau configurables avec leurs valeurs : </text:p>
      <table:table table:name="Tableau191" table:style-name="Tableau191">
        <table:table-column table:style-name="Tableau191.A"/>
        <table:table-row>
          <table:table-cell table:style-name="Tableau191.A1" office:value-type="string">
            <text:p text:style-name="Preformatted_20_Text"># no -a</text:p>
            <text:p text:style-name="Preformatted_20_Text"><text:s text:c="9"/>extendednetstats = 0</text:p>
            <text:p text:style-name="Preformatted_20_Text"><text:s text:c="18"/>thewall = 1048576</text:p>
            <text:p text:style-name="Preformatted_20_Text"><text:s text:c="15"/>sockthresh = 85</text:p>
            <text:p text:style-name="Preformatted_20_Text"><text:s text:c="19"/>sb_max = 1048576</text:p>
            <text:p text:style-name="Preformatted_20_Text"><text:s text:c="16"/>somaxconn = 1024</text:p>
            <text:p text:style-name="Preformatted_20_Text"><text:s text:c="6"/>clean_partial_conns = 0</text:p>
            <text:p text:style-name="Preformatted_20_Text">[...]</text:p>
            <text:p text:style-name="P53">#</text:p>
          </table:table-cell>
        </table:table-row>
      </table:table>
      <text:p text:style-name="Text_20_body"><text:a xlink:type="simple" xlink:href="http://www.linux-france.org/%7Emdecore/aix/memo-aix/memo-aix.html#top">Top</text:a><text:bookmark text:name="subsec19.2"/></text:p>
      <text:h text:style-name="Heading_20_3" text:outline-level="3">19.2. Configurer une interface</text:h>
      <text:p text:style-name="Text_20_body">mktcpip ou smit mktcpip : </text:p>
      <table:table table:name="Tableau192" table:style-name="Tableau192">
        <table:table-column table:style-name="Tableau192.A"/>
        <table:table-row>
          <table:table-cell table:style-name="Tableau192.A1" office:value-type="string">
            <text:p text:style-name="Preformatted_20_Text"># /usr/sbin/mktcpip -h'tarsier' -a'10.41.11.15' -m'255.255.0.0' \</text:p>
            <text:p text:style-name="Preformatted_20_Text">-i'en0' -n'10.41.13.22' -d'au.boulot' -g'10.41.54.1' \</text:p>
            <text:p text:style-name="Preformatted_20_Text">-A'no' -t'N/A' # ou smitty tcpip</text:p>
            <text:p text:style-name="Preformatted_20_Text">en0</text:p>
            <text:p text:style-name="Preformatted_20_Text">tarsier</text:p>
            <text:p text:style-name="Preformatted_20_Text">inet0 modifié</text:p>
            <text:p text:style-name="Preformatted_20_Text">en0 modifié</text:p>
            <text:p text:style-name="Preformatted_20_Text">inet0 modifié</text:p>
            <text:p text:style-name="P53">#</text:p>
          </table:table-cell>
        </table:table-row>
      </table:table>
      <text:p text:style-name="Text_20_body"><text:a xlink:type="simple" xlink:href="http://www.linux-france.org/%7Emdecore/aix/memo-aix/memo-aix.html#top">Top</text:a><text:bookmark text:name="subsec19.3"/></text:p>
      <text:h text:style-name="Heading_20_3" text:outline-level="3">19.3. Dé configurer une interface</text:h>
      <text:p text:style-name="Text_20_body">Désactive l'interface en1 : </text:p>
      <table:table table:name="Tableau193" table:style-name="Tableau193">
        <table:table-column table:style-name="Tableau193.A"/>
        <table:table-row>
          <table:table-cell table:style-name="Tableau193.A1" office:value-type="string">
            <text:p text:style-name="Preformatted_20_Text"># ifconfig en1 down</text:p>
            <text:p text:style-name="P53">#</text:p>
          </table:table-cell>
        </table:table-row>
      </table:table>
      <text:p text:style-name="Text_20_body">Supprime l'interface en1 de la liste des interfaces disponibles : </text:p>
      <table:table table:name="Tableau194" table:style-name="Tableau194">
        <table:table-column table:style-name="Tableau194.A"/>
        <table:table-row>
          <table:table-cell table:style-name="Tableau194.A1" office:value-type="string">
            <text:p text:style-name="Preformatted_20_Text"># ifconfig en1 detach</text:p>
            <text:p text:style-name="P53">#</text:p>
          </table:table-cell>
        </table:table-row>
      </table:table>
      <text:p text:style-name="Text_20_body">Supprime la configuration de l'interface en1 : </text:p>
      <table:table table:name="Tableau195" table:style-name="Tableau195">
        <table:table-column table:style-name="Tableau195.A"/>
        <table:table-row>
          <table:table-cell table:style-name="Tableau195.A1" office:value-type="string">
            <text:p text:style-name="Preformatted_20_Text"># rmdev -l en1 -d</text:p>
            <text:p text:style-name="Preformatted_20_Text">en1 supprimé</text:p>
            <text:p text:style-name="P53">#</text:p>
          </table:table-cell>
        </table:table-row>
      </table:table>
      <text:p text:style-name="Text_20_body">Supprime la configuration de l'interface en1 : </text:p>
      <table:table table:name="Tableau196" table:style-name="Tableau196">
        <table:table-column table:style-name="Tableau196.A"/>
        <table:table-row>
          <table:table-cell table:style-name="Tableau196.A1" office:value-type="string">
            <text:p text:style-name="Preformatted_20_Text"># rmdev -l ent1 -d</text:p>
            <text:p text:style-name="Preformatted_20_Text">ent1 supprimé</text:p>
            <text:p text:style-name="P53">#</text:p>
          </table:table-cell>
        </table:table-row>
      </table:table>
      <text:p text:style-name="Text_20_body"><text:a xlink:type="simple" xlink:href="http://www.linux-france.org/%7Emdecore/aix/memo-aix/memo-aix.html#top">Top</text:a><text:bookmark text:name="subsec19.4"/></text:p>
      <text:h text:style-name="Heading_20_3" text:outline-level="3">19.4. Modifications de l'interface réseau</text:h>
      <text:p text:style-name="Text_20_body">Passer la vitesse de l'interface en0 de Auto_Negotiation en 100_Full_Duplex (chdev ou smitty commodev) : </text:p>
      <table:table table:name="Tableau197" table:style-name="Tableau197">
        <table:table-column table:style-name="Tableau197.A"/>
        <table:table-row>
          <table:table-cell table:style-name="Tableau197.A1" office:value-type="string">
            <text:p text:style-name="Preformatted_20_Text"># ifconfig en0 detach &amp;&amp; \</text:p>
            <text:p text:style-name="Preformatted_20_Text">chdev -l ent0 -a media_speed='100_Full_Duplex' &amp;&amp; \</text:p>
            <text:p text:style-name="Preformatted_20_Text">ifconfig en0 up</text:p>
            <text:p text:style-name="Preformatted_20_Text">ent0 modifié</text:p>
            <text:p text:style-name="P53">#</text:p>
          </table:table-cell>
        </table:table-row>
      </table:table>
      <text:p text:style-name="Text_20_body">Si nécessaire, reconfiguration classique : </text:p>
      <table:table table:name="Tableau198" table:style-name="Tableau198">
        <table:table-column table:style-name="Tableau198.A"/>
        <table:table-row>
          <table:table-cell table:style-name="Tableau198.A1" office:value-type="string">
            <text:p text:style-name="Preformatted_20_Text"># /usr/sbin/mktcpip -h'tarsier' -a'10.41.11.15' -m'255.255.0.0' \</text:p>
            <text:p text:style-name="Preformatted_20_Text">-i'en0' -n'10.41.13.22' -d'au.boulot' -g'10.41.54.1' \</text:p>
            <text:p text:style-name="Preformatted_20_Text">-A'no' -t'N/A' # ou smitty tcpip</text:p>
            <text:p text:style-name="Preformatted_20_Text">en0</text:p>
            <text:p text:style-name="Preformatted_20_Text">tarsier</text:p>
            <text:p text:style-name="Preformatted_20_Text">inet0 modifié</text:p>
            <text:p text:style-name="Preformatted_20_Text">en0 modifié</text:p>
            <text:p text:style-name="Preformatted_20_Text">inet0 modifié</text:p>
            <text:p text:style-name="P53">#</text:p>
          </table:table-cell>
        </table:table-row>
      </table:table>
      <text:p text:style-name="Text_20_body"><text:a xlink:type="simple" xlink:href="http://www.linux-france.org/%7Emdecore/aix/memo-aix/memo-aix.html#top">Top</text:a><text:bookmark text:name="sec20"/></text:p>
      <text:h text:style-name="Heading_20_2" text:outline-level="2">20. Autres commandes</text:h>
      <text:p text:style-name="Text_20_body">Utilisation de sar (informations sur l'activité système) </text:p>
      <text:p text:style-name="Text_20_body">Sans crontab de root : </text:p>
      <table:table table:name="Tableau199" table:style-name="Tableau199">
        <table:table-column table:style-name="Tableau199.A"/>
        <table:table-row>
          <table:table-cell table:style-name="Tableau199.A1" office:value-type="string">
            <text:p text:style-name="P53">0 * * * * <text:s/>/usr/lib/sa/sa1 300 12 &amp;</text:p>
          </table:table-cell>
        </table:table-row>
      </table:table>
      <text:p text:style-name="Text_20_body">pour avoir toute les 300 secondes (5 minutes) une collecte d'information, 12 fois de suite. Au total cela donne 300 s * 12 = 3600 s = 60 mn, donc la commande lancée une fois par heure collectera les informations en permanance toute les 5 mn. </text:p>
      <text:p text:style-name="Text_20_body">Puis : </text:p>
      <table:table table:name="Tableau200" table:style-name="Tableau200">
        <table:table-column table:style-name="Tableau200.A"/>
        <table:table-row>
          <table:table-cell table:style-name="Tableau200.A1" office:value-type="string">
            <text:p text:style-name="Preformatted_20_Text"># sar | tail</text:p>
            <text:p text:style-name="Preformatted_20_Text">14:20:00 <text:s text:c="6"/>0 <text:s text:c="6"/>0 <text:s text:c="6"/>0 <text:s text:c="4"/>100</text:p>
            <text:p text:style-name="Preformatted_20_Text">14:25:00 <text:s text:c="6"/>0 <text:s text:c="6"/>0 <text:s text:c="6"/>0 <text:s text:c="4"/>100</text:p>
            <text:p text:style-name="Preformatted_20_Text">14:30:00 <text:s text:c="6"/>0 <text:s text:c="6"/>0 <text:s text:c="6"/>0 <text:s text:c="4"/>100</text:p>
            <text:p text:style-name="Preformatted_20_Text">14:35:00 <text:s text:c="6"/>0 <text:s text:c="6"/>0 <text:s text:c="6"/>0 <text:s text:c="4"/>100</text:p>
            <text:p text:style-name="Preformatted_20_Text">14:40:00 <text:s text:c="6"/>0 <text:s text:c="6"/>0 <text:s text:c="6"/>0 <text:s text:c="4"/>100</text:p>
            <text:p text:style-name="Preformatted_20_Text">14:45:00 <text:s text:c="6"/>0 <text:s text:c="6"/>0 <text:s text:c="6"/>0 <text:s text:c="4"/>100</text:p>
            <text:p text:style-name="Preformatted_20_Text">14:50:00 <text:s text:c="6"/>0 <text:s text:c="6"/>0 <text:s text:c="6"/>0 <text:s text:c="4"/>100</text:p>
            <text:p text:style-name="Preformatted_20_Text">14:55:00 <text:s text:c="6"/>0 <text:s text:c="6"/>0 <text:s text:c="6"/>1 <text:s text:c="5"/>99</text:p>
            <text:p text:style-name="Preformatted_20_Text"/>
            <text:p text:style-name="Preformatted_20_Text">Average <text:s text:c="7"/>0 <text:s text:c="6"/>0 <text:s text:c="6"/>1 <text:s text:c="5"/>99</text:p>
            <text:p text:style-name="P53">#</text:p>
          </table:table-cell>
        </table:table-row>
      </table:table>
      <text:p text:style-name="Text_20_body">Attention : le répertoire /var/adm/sa peut vite grossir, à surveiller ! On peut mettre dans la crontab de root une commande du style : </text:p>
      <table:table table:name="Tableau201" table:style-name="Tableau201">
        <table:table-column table:style-name="Tableau201.A"/>
        <table:table-row>
          <table:table-cell table:style-name="Tableau201.A1" office:value-type="string">
            <text:p text:style-name="P53">10 6 * * * find /var/adm/sa -type f ! -name "*.gz" -mtime +1 -exec gzip {} \\;</text:p>
          </table:table-cell>
        </table:table-row>
      </table:table>
      <text:list xml:id="list37356175" text:style-name="L30">
        <text:list-item>
          <text:p text:style-name="P52">filemon - Monitors the performance of thefile system, and reports the I/O activity on behalf of logical files, virtualmemory segments, logical volumes, and physical volumes. </text:p>
        </text:list-item>
        <text:list-item>
          <text:p text:style-name="P30">trcstop - Stops the trace function. </text:p>
        </text:list-item>
      </text:list>
      <text:p text:style-name="Text_20_body">Capture et analyse d'une image de la mémoire virtuelle : </text:p>
      <table:table table:name="Tableau202" table:style-name="Tableau202">
        <table:table-column table:style-name="Tableau202.A"/>
        <table:table-row>
          <table:table-cell table:style-name="Tableau202.A1" office:value-type="string">
            <text:p text:style-name="Preformatted_20_Text"># svmon</text:p>
            <text:p text:style-name="Preformatted_20_Text"><text:s text:c="15"/>size <text:s text:c="5"/>inuse <text:s text:c="6"/>free <text:s text:c="7"/>pin <text:s text:c="3"/>virtual</text:p>
            <text:p text:style-name="Preformatted_20_Text">memory <text:s text:c="5"/>2097136 <text:s text:c="4"/>425396 <text:s text:c="3"/>1671740 <text:s text:c="4"/>155425 <text:s text:c="4"/>203762</text:p>
            <text:p text:style-name="Preformatted_20_Text">pg space <text:s text:c="4"/>131072 <text:s text:c="7"/>874</text:p>
            <text:p text:style-name="Preformatted_20_Text"/>
            <text:p text:style-name="Preformatted_20_Text"><text:s text:c="15"/>work <text:s text:c="6"/>pers <text:s text:c="6"/>clnt <text:s text:c="5"/>lpage</text:p>
            <text:p text:style-name="Preformatted_20_Text">pin <text:s text:c="9"/>155425 <text:s text:c="9"/>0 <text:s text:c="9"/>0 <text:s text:c="9"/>0</text:p>
            <text:p text:style-name="Preformatted_20_Text">in use <text:s text:c="6"/>203776 <text:s text:c="9"/>0 <text:s text:c="4"/>221620 <text:s text:c="9"/>0</text:p>
            <text:p text:style-name="P53">#</text:p>
          </table:table-cell>
        </table:table-row>
      </table:table>
      <text:p text:style-name="Text_20_body">Affichage de statistiques sur les E/S des disques : </text:p>
      <table:table table:name="Tableau203" table:style-name="Tableau203">
        <table:table-column table:style-name="Tableau203.A"/>
        <table:table-row>
          <table:table-cell table:style-name="Tableau203.A1" office:value-type="string">
            <text:p text:style-name="Preformatted_20_Text"># iostat</text:p>
            <text:p text:style-name="Preformatted_20_Text"/>
            <text:p text:style-name="Preformatted_20_Text">tty : <text:s text:c="5"/>tentr. <text:s text:c="5"/>tsort. <text:s text:c="2"/>CPU-moy : <text:s/>% util <text:s text:c="3"/>% sys <text:s text:c="4"/>% inact. <text:s/>% att.E-S</text:p>
            <text:p text:style-name="Preformatted_20_Text"><text:s text:c="10"/>0,1 <text:s text:c="9"/>2,4 <text:s text:c="14"/>0,2 <text:s text:c="5"/>0,1 <text:s text:c="6"/>99,6 <text:s text:c="6"/>0,0</text:p>
            <text:p text:style-name="Preformatted_20_Text"/>
            <text:p text:style-name="Preformatted_20_Text">Disques : <text:s text:c="7"/>% tm_act <text:s text:c="4"/>ko/s <text:s text:c="5"/>t/s <text:s text:c="3"/>ko_lus <text:s/>ko_écrits</text:p>
            <text:p text:style-name="Preformatted_20_Text">hdisk3 <text:s text:c="10"/>0,0 <text:s text:c="6"/>0,0 <text:s text:c="6"/>0,0 <text:s text:c="8"/>72 <text:s text:c="4"/>10498</text:p>
            <text:p text:style-name="Preformatted_20_Text">hdisk1 <text:s text:c="10"/>0,1 <text:s text:c="6"/>1,7 <text:s text:c="6"/>0,2 <text:s text:c="6"/>2526 <text:s text:c="2"/>2656109</text:p>
            <text:p text:style-name="Preformatted_20_Text">hdisk2 <text:s text:c="10"/>0,0 <text:s text:c="6"/>0,1 <text:s text:c="6"/>0,0 <text:s text:c="4"/>151584 <text:s text:c="4"/>10518</text:p>
            <text:p text:style-name="Preformatted_20_Text">hdisk5 <text:s text:c="10"/>0,0 <text:s text:c="6"/>0,0 <text:s text:c="6"/>0,0 <text:s text:c="8"/>46 <text:s text:c="5"/>8417</text:p>
            <text:p text:style-name="Preformatted_20_Text">hdisk0 <text:s text:c="10"/>0,1 <text:s text:c="6"/>2,3 <text:s text:c="6"/>0,2 <text:s text:c="4"/>954477 <text:s text:c="2"/>2656181</text:p>
            <text:p text:style-name="Preformatted_20_Text">hdisk4 <text:s text:c="10"/>0,0 <text:s text:c="6"/>0,1 <text:s text:c="6"/>0,0 <text:s text:c="5"/>83193 <text:s text:c="4"/>14732</text:p>
            <text:p text:style-name="Preformatted_20_Text">cd0 <text:s text:c="13"/>0,0 <text:s text:c="6"/>0,0 <text:s text:c="6"/>0,0 <text:s text:c="5"/>11082 <text:s text:c="8"/>0</text:p>
            <text:p text:style-name="P53">#</text:p>
          </table:table-cell>
        </table:table-row>
      </table:table>
      <text:p text:style-name="Text_20_body">Gestion des segments de mémoire partagée : </text:p>
      <table:table table:name="Tableau204" table:style-name="Tableau204">
        <table:table-column table:style-name="Tableau204.A"/>
        <table:table-row>
          <table:table-cell table:style-name="Tableau204.A1" office:value-type="string">
            <text:p text:style-name="Preformatted_20_Text"># ipcs -m</text:p>
            <text:p text:style-name="Preformatted_20_Text">Etat IPC extrait de /dev/mem le jeu <text:s/>8 jul 11:31:08 DFT 2004</text:p>
            <text:p text:style-name="Preformatted_20_Text">T <text:s text:c="7"/>ID <text:s text:c="4"/>CLE <text:s text:c="7"/>MODE <text:s text:c="3"/>PROPRIETE <text:s/>GROUPE</text:p>
            <text:p text:style-name="Preformatted_20_Text">Mémoire partagée :</text:p>
            <text:p text:style-name="Preformatted_20_Text">m <text:s text:c="3"/>131072 0x58001345 --rw-rw-rw- <text:s text:c="4"/>root <text:s text:c="2"/>system</text:p>
            <text:p text:style-name="Preformatted_20_Text">m <text:s text:c="8"/>1 0xe4663d62 --rw-rw-rw- <text:s text:c="2"/>imnadm <text:s text:c="2"/>imnadm</text:p>
            <text:p text:style-name="Preformatted_20_Text">m <text:s text:c="8"/>2 0x9308e451 --rw-rw-rw- <text:s text:c="2"/>imnadm <text:s text:c="2"/>imnadm</text:p>
            <text:p text:style-name="Preformatted_20_Text">m <text:s text:c="8"/>3 0x52e74b4f --rw-rw-rw- <text:s text:c="2"/>imnadm <text:s text:c="2"/>imnadm</text:p>
            <text:p text:style-name="Preformatted_20_Text">m <text:s text:c="8"/>4 0xc76283cc --rw-rw-rw- <text:s text:c="2"/>imnadm <text:s text:c="2"/>imnadm</text:p>
            <text:p text:style-name="Preformatted_20_Text">m <text:s text:c="8"/>5 0x298ee665 --rw-rw-rw- <text:s text:c="2"/>imnadm <text:s text:c="2"/>imnadm</text:p>
            <text:p text:style-name="Preformatted_20_Text">m <text:s text:c="8"/>6 0xffffffff --rw-rw---- <text:s text:c="4"/>root <text:s text:c="2"/>system</text:p>
            <text:p text:style-name="Preformatted_20_Text">m <text:s text:c="8"/>7 0xffffffff --rw-rw---- <text:s text:c="4"/>root <text:s text:c="2"/>system</text:p>
            <text:p text:style-name="Preformatted_20_Text">m <text:s text:c="8"/>8 0xffffffff --rw-rw---- <text:s text:c="4"/>root <text:s text:c="2"/>system</text:p>
            <text:p text:style-name="Preformatted_20_Text">m <text:s text:c="8"/>9 0x0d001276 --rw-rw-rw- <text:s text:c="4"/>root <text:s text:c="2"/>system</text:p>
            <text:p text:style-name="P53">#</text:p>
          </table:table-cell>
        </table:table-row>
      </table:table>
      <text:p text:style-name="Text_20_body">Suppression d'un segment de mémoire partagée : </text:p>
      <table:table table:name="Tableau205" table:style-name="Tableau205">
        <table:table-column table:style-name="Tableau205.A"/>
        <table:table-row>
          <table:table-cell table:style-name="Tableau205.A1" office:value-type="string">
            <text:p text:style-name="Preformatted_20_Text"># ipcrm -M &lt;@ memoire&gt; # eg. 0x9308e451</text:p>
            <text:p text:style-name="Preformatted_20_Text">[...]</text:p>
            <text:p text:style-name="P53">#</text:p>
          </table:table-cell>
        </table:table-row>
      </table:table>
      <text:p text:style-name="Text_20_body">Affichage de nouvelles : </text:p>
      <table:table table:name="Tableau206" table:style-name="Tableau206">
        <table:table-column table:style-name="Tableau206.A"/>
        <table:table-row>
          <table:table-cell table:style-name="Tableau206.A1" office:value-type="string">
            <text:p text:style-name="Preformatted_20_Text"># echo "Salut !!!" &gt; /var/news/toto &amp;&amp; news</text:p>
            <text:p text:style-name="Preformatted_20_Text"/>
            <text:p text:style-name="Preformatted_20_Text">toto (root) Tue Jun 22 14:55:11 2004</text:p>
            <text:p text:style-name="Preformatted_20_Text"><text:s text:c="3"/>Salut !!!</text:p>
            <text:p text:style-name="Preformatted_20_Text"/>
            <text:p text:style-name="P53">#</text:p>
          </table:table-cell>
        </table:table-row>
      </table:table>
      <text:p text:style-name="Text_20_body">Envoyer un message à tout le monde à partir du cron : </text:p>
      <table:table table:name="Tableau207" table:style-name="Tableau207">
        <table:table-column table:style-name="Tableau207.A"/>
        <table:table-row>
          <table:table-cell table:style-name="Tableau207.A1" office:value-type="string">
            <text:p text:style-name="P53">0 00,12 * * * wall%rc.powerfail : 2 :: ATTENTION !! L'alimentation ne fonctionne pas correctement.</text:p>
          </table:table-cell>
        </table:table-row>
      </table:table>
      <text:p text:style-name="Text_20_body">Suivant la langue employée, il faut spécifier parfois oui ou yes. Pour être certain de ne pas se tromper, il faut préciser : </text:p>
      <table:table table:name="Tableau208" table:style-name="Tableau208">
        <table:table-column table:style-name="Tableau208.A"/>
        <table:table-row>
          <table:table-cell table:style-name="Tableau208.A1" office:value-type="string">
            <text:p text:style-name="P53">`locale nostr | awk -F: '{print $1}'`</text:p>
          </table:table-cell>
        </table:table-row>
      </table:table>
      <text:p text:style-name="Text_20_body">En effet : </text:p>
      <table:table table:name="Tableau209" table:style-name="Tableau209">
        <table:table-column table:style-name="Tableau209.A"/>
        <table:table-row>
          <table:table-cell table:style-name="Tableau209.A1" office:value-type="string">
            <text:p text:style-name="Preformatted_20_Text"># locale nostr</text:p>
            <text:p text:style-name="Preformatted_20_Text">non:n:N:no</text:p>
            <text:p text:style-name="P53">#</text:p>
          </table:table-cell>
        </table:table-row>
      </table:table>
      <text:p text:style-name="Text_20_body">Exemple pour la création d'un point de montage pour le cd-rom : </text:p>
      <table:table table:name="Tableau210" table:style-name="Tableau210">
        <table:table-column table:style-name="Tableau210.A"/>
        <table:table-row>
          <table:table-cell table:style-name="Tableau210.A1" office:value-type="string">
            <text:p text:style-name="Preformatted_20_Text"># crfs -v cdrfs -p ro -d'cd0' -m'/cdrom' \</text:p>
            <text:p text:style-name="Preformatted_20_Text">-A''`locale nostr | awk -F: '{print $1}'`''</text:p>
            <text:p text:style-name="Preformatted_20_Text">[...]</text:p>
            <text:p text:style-name="P53">#</text:p>
          </table:table-cell>
        </table:table-row>
      </table:table>
      <text:p text:style-name="Text_20_body">Changer la langue : </text:p>
      <table:table table:name="Tableau211" table:style-name="Tableau211">
        <table:table-column table:style-name="Tableau211.A"/>
        <table:table-row>
          <table:table-cell table:style-name="Tableau211.A1" office:value-type="string">
            <text:p text:style-name="Preformatted_20_Text"># smit mlang # ou directement : smit chlang</text:p>
            <text:p text:style-name="P53">#</text:p>
          </table:table-cell>
        </table:table-row>
      </table:table>
      <text:p text:style-name="Text_20_body">ou : </text:p>
      <table:table table:name="Tableau212" table:style-name="Tableau212">
        <table:table-column table:style-name="Tableau212.A"/>
        <table:table-row>
          <table:table-cell table:style-name="Tableau212.A1" office:value-type="string">
            <text:p text:style-name="Preformatted_20_Text"># chlang fr_FR</text:p>
            <text:p text:style-name="Preformatted_20_Text">[ A COMPLETER ...]</text:p>
            <text:p text:style-name="P53">#</text:p>
          </table:table-cell>
        </table:table-row>
      </table:table>
      <text:p text:style-name="Text_20_body">ou : </text:p>
      <table:table table:name="Tableau213" table:style-name="Tableau213">
        <table:table-column table:style-name="Tableau213.A"/>
        <table:table-row>
          <table:table-cell table:style-name="Tableau213.A1" office:value-type="string">
            <text:p text:style-name="Preformatted_20_Text"># chlang C # (POSIX).</text:p>
            <text:p text:style-name="Preformatted_20_Text">[ A COMPLETER ...]</text:p>
            <text:p text:style-name="P53">#</text:p>
          </table:table-cell>
        </table:table-row>
      </table:table>
      <text:p text:style-name="Text_20_body">Ces commandes modifient dans le fichier /etc/environment la variable d'environnement LANG. </text:p>
      <text:p text:style-name="Text_20_body">Visualiser les types de plate-forme et d'architecture : </text:p>
      <table:table table:name="Tableau214" table:style-name="Tableau214">
        <table:table-column table:style-name="Tableau214.A"/>
        <table:table-row>
          <table:table-cell table:style-name="Tableau214.A1" office:value-type="string">
            <text:p text:style-name="Preformatted_20_Text"># bootinfo -p ; bootinfo -y</text:p>
            <text:p text:style-name="Preformatted_20_Text">chrp</text:p>
            <text:p text:style-name="Preformatted_20_Text">64</text:p>
            <text:p text:style-name="P53">#</text:p>
          </table:table-cell>
        </table:table-row>
      </table:table>
      <text:p text:style-name="Text_20_body">Afficher le journal de l'amorçage : </text:p>
      <table:table table:name="Tableau215" table:style-name="Tableau215">
        <table:table-column table:style-name="Tableau215.A"/>
        <table:table-row>
          <table:table-cell table:style-name="Tableau215.A1" office:value-type="string">
            <text:p text:style-name="Preformatted_20_Text"># alog -o -t boot</text:p>
            <text:p text:style-name="Preformatted_20_Text">----------------</text:p>
            <text:p text:style-name="Preformatted_20_Text">Completed method for: hdisk5, Elapsed time = 0</text:p>
            <text:p text:style-name="Preformatted_20_Text">code retour = 0</text:p>
            <text:p text:style-name="Preformatted_20_Text">********** pas de sortie standard *******</text:p>
            <text:p text:style-name="Preformatted_20_Text">********** pas d'erreur standard ********</text:p>
            <text:p text:style-name="Preformatted_20_Text">----------------</text:p>
            <text:p text:style-name="Preformatted_20_Text">Time: 13 <text:s text:c="7"/>LEDS: 0x539</text:p>
            <text:p text:style-name="Preformatted_20_Text">Number of running methods: 0</text:p>
            <text:p text:style-name="Preformatted_20_Text">----------------</text:p>
            <text:p text:style-name="Preformatted_20_Text">tentative de configuration de l'unité 'rmt0'</text:p>
            <text:p text:style-name="Preformatted_20_Text">Time: 13 <text:s text:c="7"/>LEDS: 0x68c</text:p>
            <text:p text:style-name="Preformatted_20_Text">appel de /etc/methods/cfgsctape -2 -l rmt0 </text:p>
            <text:p text:style-name="Preformatted_20_Text">Number of running methods: 1</text:p>
            <text:p text:style-name="Preformatted_20_Text">----------------</text:p>
            <text:p text:style-name="Preformatted_20_Text">Completed method for: rmt0, Elapsed time = 0</text:p>
            <text:p text:style-name="Preformatted_20_Text">code retour = 0</text:p>
            <text:p text:style-name="Preformatted_20_Text">********** pas de sortie standard *******</text:p>
            <text:p text:style-name="Preformatted_20_Text">********** pas d'erreur standard ********</text:p>
            <text:p text:style-name="Preformatted_20_Text">----------------</text:p>
            <text:p text:style-name="Preformatted_20_Text">Time: 13 <text:s text:c="7"/>LEDS: 0x539</text:p>
            <text:p text:style-name="Preformatted_20_Text">Number of running methods: 0</text:p>
            <text:p text:style-name="Preformatted_20_Text">----------------</text:p>
            <text:p text:style-name="Preformatted_20_Text">[...]</text:p>
            <text:p text:style-name="P53">#</text:p>
          </table:table-cell>
        </table:table-row>
      </table:table>
      <text:p text:style-name="Text_20_body">ou via le mode maintenance. alog permet de stocker dans des journaux circulaires situés dans /var/adm/ras/*. </text:p>
      <text:p text:style-name="Text_20_body">Créer un point de montage pour le lecteur cd-rom : </text:p>
      <table:table table:name="Tableau216" table:style-name="Tableau216">
        <table:table-column table:style-name="Tableau216.A"/>
        <table:table-row>
          <table:table-cell table:style-name="Tableau216.A1" office:value-type="string">
            <text:p text:style-name="Preformatted_20_Text"># mkdir /cdrom &amp;&amp; smitty cdrfs</text:p>
            <text:p text:style-name="P53">#</text:p>
          </table:table-cell>
        </table:table-row>
      </table:table>
      <text:p text:style-name="Text_20_body">invscout - Surveys the host system for currently installed microcode or Vital Product Data (VPD). </text:p>
      <text:p text:style-name="Text_20_body">diag - détecte les problèmes matériels </text:p>
      <text:p text:style-name="Text_20_body">Afficher les erreurs système : </text:p>
      <table:table table:name="Tableau217" table:style-name="Tableau217">
        <table:table-column table:style-name="Tableau217.A"/>
        <table:table-row>
          <table:table-cell table:style-name="Tableau217.A1" office:value-type="string">
            <text:p text:style-name="Preformatted_20_Text"># errpt -a</text:p>
            <text:p text:style-name="Preformatted_20_Text">---------------------------------------------------------------------------</text:p>
            <text:p text:style-name="Preformatted_20_Text">LABEL: <text:s text:c="9"/>SRC_SVKO</text:p>
            <text:p text:style-name="Preformatted_20_Text">IDENTIFIER: <text:s text:c="4"/>BC3BE5A3</text:p>
            <text:p text:style-name="Preformatted_20_Text"/>
            <text:p text:style-name="Preformatted_20_Text">Date/Time: <text:s text:c="6"/>Tue Jun 22 10:34:31 2004</text:p>
            <text:p text:style-name="Preformatted_20_Text">Sequence Number: 57</text:p>
            <text:p text:style-name="Preformatted_20_Text">Machine Id: <text:s text:c="5"/>005D8FBC4C00</text:p>
            <text:p text:style-name="Preformatted_20_Text">Node Id: <text:s text:c="8"/>RsALLYY01</text:p>
            <text:p text:style-name="Preformatted_20_Text">Class: <text:s text:c="10"/>S</text:p>
            <text:p text:style-name="Preformatted_20_Text">Type: <text:s text:c="11"/>PERM</text:p>
            <text:p text:style-name="Preformatted_20_Text">Resource Name: <text:s text:c="2"/>SRC</text:p>
            <text:p text:style-name="Preformatted_20_Text"/>
            <text:p text:style-name="Preformatted_20_Text">Description</text:p>
            <text:p text:style-name="Preformatted_20_Text">SOFTWARE PROGRAM ERROR</text:p>
            <text:p text:style-name="Preformatted_20_Text"/>
            <text:p text:style-name="Preformatted_20_Text">Probable Causes</text:p>
            <text:p text:style-name="Preformatted_20_Text">APPLICATION PROGRAM</text:p>
            <text:p text:style-name="Preformatted_20_Text"/>
            <text:p text:style-name="Preformatted_20_Text">Failure Causes</text:p>
            <text:p text:style-name="Preformatted_20_Text">SOFTWARE PROGRAM</text:p>
            <text:p text:style-name="Preformatted_20_Text"/>
            <text:p text:style-name="Preformatted_20_Text"><text:s text:c="8"/>Recommended Actions</text:p>
            <text:p text:style-name="Preformatted_20_Text"><text:s text:c="8"/>MANUALLY RESTART SUBSYSTEM IF NEEDED</text:p>
            <text:p text:style-name="Preformatted_20_Text"/>
            <text:p text:style-name="Preformatted_20_Text">Detail Data</text:p>
            <text:p text:style-name="Preformatted_20_Text">SYMPTOM CODE</text:p>
            <text:p text:style-name="Preformatted_20_Text"><text:s text:c="7"/>16384</text:p>
            <text:p text:style-name="Preformatted_20_Text">SOFTWARE ERROR CODE</text:p>
            <text:p text:style-name="Preformatted_20_Text"><text:s text:c="7"/>-9017</text:p>
            <text:p text:style-name="Preformatted_20_Text">ERROR CODE</text:p>
            <text:p text:style-name="Preformatted_20_Text"><text:s text:c="11"/>0</text:p>
            <text:p text:style-name="Preformatted_20_Text">DETECTING MODULE</text:p>
            <text:p text:style-name="Preformatted_20_Text">'srchevn.c'@line:'334'</text:p>
            <text:p text:style-name="Preformatted_20_Text">FAILING MODULE</text:p>
            <text:p text:style-name="Preformatted_20_Text">sendmail</text:p>
            <text:p text:style-name="Preformatted_20_Text">---------------------------------------------------------------------------</text:p>
            <text:p text:style-name="Preformatted_20_Text">[...]</text:p>
            <text:p text:style-name="P53">#</text:p>
          </table:table-cell>
        </table:table-row>
      </table:table>
      <text:p text:style-name="Text_20_body">Effacer tous les messages d'erreurs : </text:p>
      <table:table table:name="Tableau218" table:style-name="Tableau218">
        <table:table-column table:style-name="Tableau218.A"/>
        <table:table-row>
          <table:table-cell table:style-name="Tableau218.A1" office:value-type="string">
            <text:p text:style-name="Preformatted_20_Text"># errclear 0</text:p>
            <text:p text:style-name="P53">#</text:p>
          </table:table-cell>
        </table:table-row>
      </table:table>
      <text:p text:style-name="Text_20_body">Effacer tous les messages d'erreur de type software vieux de plus de 30 jours (-S 30) et tous les messages d'erreur de type hardware vieux de plus de 90 jours (-H 90) : </text:p>
      <table:table table:name="Tableau219" table:style-name="Tableau219">
        <table:table-column table:style-name="Tableau219.A"/>
        <table:table-row>
          <table:table-cell table:style-name="Tableau219.A1" office:value-type="string">
            <text:p text:style-name="Preformatted_20_Text"># errclear -d S 30 ; errclear -d H 90</text:p>
            <text:p text:style-name="P53">#</text:p>
          </table:table-cell>
        </table:table-row>
      </table:table>
      <text:p text:style-name="Text_20_body">nmon - free tool to analyze AIX performance </text:p>
      <text:p text:style-name="Text_20_body">Configuration du compilateur C (LUM) : </text:p>
      <table:table table:name="Tableau220" table:style-name="Tableau220">
        <table:table-column table:style-name="Tableau220.A"/>
        <table:table-row>
          <table:table-cell table:style-name="Tableau220.A1" office:value-type="string">
            <text:p text:style-name="Preformatted_20_Text"># /usr/opt/ifor/bin/i4cfg -a n -S a</text:p>
            <text:p text:style-name="Preformatted_20_Text">i4cfg Version 4.6.5 AIX -- LUM Configuration Tool</text:p>
            <text:p text:style-name="Preformatted_20_Text">(c) Copyright 1995-2002, IBM Corporation, All Rights Reserved</text:p>
            <text:p text:style-name="Preformatted_20_Text">US Government Users Restricted Rights - Use, duplication or disclosure</text:p>
            <text:p text:style-name="Preformatted_20_Text">restricted by GSA ADP Schedule Contract with IBM Corp.</text:p>
            <text:p text:style-name="Preformatted_20_Text"/>
            <text:p text:style-name="P53">#</text:p>
          </table:table-cell>
        </table:table-row>
      </table:table>
      <table:table table:name="Tableau221" table:style-name="Tableau221">
        <table:table-column table:style-name="Tableau221.A"/>
        <table:table-row>
          <table:table-cell table:style-name="Tableau221.A1" office:value-type="string">
            <text:p text:style-name="Preformatted_20_Text"># /usr/opt/ifor/bin/i4cfg -start</text:p>
            <text:p text:style-name="Preformatted_20_Text">i4cfg Version 4.6.5 AIX -- LUM Configuration Tool</text:p>
            <text:p text:style-name="Preformatted_20_Text">(c) Copyright 1995-2002, IBM Corporation, All Rights Reserved</text:p>
            <text:p text:style-name="Preformatted_20_Text">US Government Users Restricted Rights - Use, duplication or disclosure</text:p>
            <text:p text:style-name="Preformatted_20_Text">restricted by GSA ADP Schedule Contract with IBM Corp.</text:p>
            <text:p text:style-name="Preformatted_20_Text"/>
            <text:p text:style-name="Preformatted_20_Text">0513-059 The i4llmd Subsystem has been started. Subsystem PID is 843940.</text:p>
            <text:p text:style-name="Preformatted_20_Text"/>
            <text:p text:style-name="Preformatted_20_Text">'Start Services' has completed successfully</text:p>
            <text:p text:style-name="P53">#</text:p>
          </table:table-cell>
        </table:table-row>
      </table:table>
      <table:table table:name="Tableau222" table:style-name="Tableau222">
        <table:table-column table:style-name="Tableau222.A"/>
        <table:table-row>
          <table:table-cell table:style-name="Tableau222.A1" office:value-type="string">
            <text:p text:style-name="Preformatted_20_Text"># /usr/opt/ifor/bin/i4blt -a \</text:p>
            <text:p text:style-name="Preformatted_20_Text">-v "'IBM Software Solutions Toronto' \</text:p>
            <text:p text:style-name="Preformatted_20_Text">5da54a553b4c.02.09.15.31.05.00.00.00 p9gb3ycs6ydpw" \</text:p>
            <text:p text:style-name="Preformatted_20_Text">-p "'C for AIX' '6.0.cn' \</text:p>
            <text:p text:style-name="Preformatted_20_Text">t26663vp4mrffwhqdac39gzj4qpi22pe22 " -T 10 -R "root"</text:p>
            <text:p text:style-name="Preformatted_20_Text">[...]</text:p>
            <text:p text:style-name="P53">#</text:p>
          </table:table-cell>
        </table:table-row>
      </table:table>
      <text:p text:style-name="Text_20_body">truss(1) - Traces a process's system calls, recieved signals and incurred machinefaults. </text:p>
      <text:p text:style-name="Text_20_body">Espace pagination libre : expr `bootinfo -r` - `vmstat 1 2 | tail -n 1 | awk '{ print $3/4 }'` </text:p>
      <text:p text:style-name="Text_20_body">Mémoire utilisée par processus : svmon -P </text:p>
      <text:p text:style-name="Text_20_body">Mémoire utilisée par segment : svmon -S </text:p>
      <table:table table:name="Tableau223" table:style-name="Tableau223">
        <table:table-column table:style-name="Tableau223.A"/>
        <table:table-row>
          <table:table-cell table:style-name="Tableau223.A1" office:value-type="string">
            <text:p text:style-name="Preformatted_20_Text"># /usr/samples/kernel/vmtune</text:p>
            <text:p text:style-name="Preformatted_20_Text">vmtune: <text:s/>current values:</text:p>
            <text:p text:style-name="Preformatted_20_Text"><text:s text:c="2"/>-p <text:s text:c="6"/>-P <text:s text:c="7"/>-r <text:s text:c="9"/>-R <text:s text:c="8"/>-f <text:s text:c="6"/>-F <text:s text:c="6"/>-N <text:s text:c="7"/>-W</text:p>
            <text:p text:style-name="Preformatted_20_Text">minperm <text:s/>maxperm <text:s/>minpgahead maxpgahead <text:s/>minfree <text:s/>maxfree <text:s/>pd_npages maxrandwrt</text:p>
            <text:p text:style-name="Preformatted_20_Text"><text:s/>394821 <text:s/>1579284 <text:s text:c="6"/>2 <text:s text:c="9"/>8 <text:s text:c="7"/>120 <text:s text:c="5"/>128 <text:s text:c="5"/>65536 <text:s text:c="7"/>0</text:p>
            <text:p text:style-name="Preformatted_20_Text"/>
            <text:p text:style-name="Preformatted_20_Text"><text:s text:c="2"/>-M <text:s text:c="5"/>-w <text:s text:c="5"/>-k <text:s text:c="5"/>-c <text:s text:c="7"/>-b <text:s text:c="8"/>-B <text:s text:c="10"/>-u <text:s text:c="7"/>-l <text:s text:c="3"/>-d</text:p>
            <text:p text:style-name="Preformatted_20_Text">maxpin npswarn npskill numclust numfsbufs hd_pbuf_cnt lvm_bufcnt lrubucket defps</text:p>
            <text:p text:style-name="Preformatted_20_Text">1677709 <text:s text:c="3"/>8192 <text:s text:c="3"/>2048 <text:s text:c="6"/>1 <text:s text:c="4"/>196 <text:s text:c="7"/>320 <text:s text:c="9"/>9 <text:s text:c="5"/>131072 <text:s text:c="4"/>1</text:p>
            <text:p text:style-name="Preformatted_20_Text"/>
            <text:p text:style-name="Preformatted_20_Text"><text:s text:c="8"/>-s <text:s text:c="13"/>-n <text:s text:c="8"/>-S <text:s text:c="8"/>-L <text:s text:c="9"/>-g <text:s text:c="10"/>-h</text:p>
            <text:p text:style-name="Preformatted_20_Text">sync_release_ilock <text:s/>nokilluid <text:s/>v_pinshm <text:s/>lgpg_regions <text:s/>lgpg_size <text:s/>strict_maxperm</text:p>
            <text:p text:style-name="Preformatted_20_Text"><text:s text:c="8"/>0 <text:s text:c="14"/>0 <text:s text:c="10"/>0 <text:s text:c="10"/>0 <text:s text:c="11"/>0 <text:s text:c="7"/>0</text:p>
            <text:p text:style-name="Preformatted_20_Text"/>
            <text:p text:style-name="Preformatted_20_Text"><text:s text:c="4"/>-t <text:s text:c="10"/>-j <text:s text:c="13"/>-J <text:s text:c="14"/>-z</text:p>
            <text:p text:style-name="Preformatted_20_Text">maxclient <text:s/>j2_nPagesPer j2_maxRandomWrite <text:s/>j2_nRandomCluster</text:p>
            <text:p text:style-name="Preformatted_20_Text">1579284 <text:s text:c="10"/>32 <text:s text:c="11"/>0 <text:s text:c="17"/>0 <text:s text:c="8"/>1681493504</text:p>
            <text:p text:style-name="Preformatted_20_Text"/>
            <text:p text:style-name="Preformatted_20_Text"><text:s text:c="4"/>-Z <text:s text:c="17"/>-q <text:s text:c="19"/>-Q <text:s text:c="15"/>-y</text:p>
            <text:p text:style-name="Preformatted_20_Text">j2_nBufferPer <text:s/>j2_minPageReadAhead <text:s/>j2_maxPageReadAhead <text:s text:c="2"/>memory_affinity</text:p>
            <text:p text:style-name="Preformatted_20_Text"><text:s text:c="6"/>512 <text:s text:c="13"/>2 <text:s text:c="19"/>8 <text:s text:c="16"/>0</text:p>
            <text:p text:style-name="Preformatted_20_Text"/>
            <text:p text:style-name="Preformatted_20_Text"><text:s text:c="4"/>-V <text:s text:c="17"/>-i <text:s text:c="14"/>-e <text:s text:c="17"/>-E</text:p>
            <text:p text:style-name="Preformatted_20_Text">num_spec_dataseg <text:s/>spec_dataseg_int jfs_clread_enabled <text:s/>jfs_use_read_lock</text:p>
            <text:p text:style-name="Preformatted_20_Text"><text:s text:c="6"/>0 <text:s text:c="15"/>512 <text:s text:c="15"/>0 <text:s text:c="18"/>1</text:p>
            <text:p text:style-name="Preformatted_20_Text"/>
            <text:p text:style-name="Preformatted_20_Text">PTA balance threshold percentage = 50.000000%</text:p>
            <text:p text:style-name="Preformatted_20_Text"/>
            <text:p text:style-name="Preformatted_20_Text">number of valid memory pages = 2097136 <text:s/>maxperm=80.0% of real memory</text:p>
            <text:p text:style-name="Preformatted_20_Text">maximum pinable=80.0% of real memory <text:s text:c="3"/>minperm=20.0% of real memory</text:p>
            <text:p text:style-name="Preformatted_20_Text">number of file memory pages = 1165532 <text:s text:c="2"/>numperm=59.0% of real memory</text:p>
            <text:p text:style-name="Preformatted_20_Text">number of compressed memory pages = 0 <text:s text:c="2"/>compressed=0.0% of real memory</text:p>
            <text:p text:style-name="Preformatted_20_Text">number of client memory pages = 1143842 numclient=57.9% of real memory</text:p>
            <text:p text:style-name="Preformatted_20_Text"># of remote pgs sched-pageout = 0 <text:s text:c="6"/>maxclient=80.0% of real memory</text:p>
            <text:p text:style-name="Preformatted_20_Text"/>
            <text:p text:style-name="P53">#</text:p>
          </table:table-cell>
        </table:table-row>
      </table:table>
      <text:p text:style-name="Text_20_body">/usr/samples/kernel/vmtune svmon -G </text:p>
      <text:p text:style-name="Text_20_body">maxfree should always = minfree + maxpgahead. /usr/samples/kernel/vmtune -P 40 : maxperm = 40 % (évite de trop soliciter le paging space, beaucoup plus lent que la RAM) </text:p>
      <text:p text:style-name="Text_20_body">/usr/lib/errdemon : démon loguant les erreurs (dans /var/adm/ras/errlog, accessible via la commande smitty error. La commande errclear permet de définir la taille du fichier de d'erreurs, avec rotation circulaire. </text:p>
      <text:p text:style-name="Text_20_body">no -o extendednetstats=1 # pour pouvoir afficher les stats "By type" de netstat -m netstat -m =&gt; By type inuse calls failed delayed memuse memmax mapb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M13S</meta:editing-duration>
    <meta:editing-cycles>3</meta:editing-cycles>
    <meta:generator>OpenOffice.org/3.3$Win32 OpenOffice.org_project/330m20$Build-9567</meta:generator>
    <dc:date>2012-05-23T17:21:22.17</dc:date>
    <meta:document-statistic meta:table-count="223" meta:image-count="0" meta:object-count="0" meta:page-count="2" meta:paragraph-count="2457" meta:word-count="15621" meta:character-count="117262"/>
    <dc:creator>A L</dc:creator>
    <meta:user-defined meta:name="Info 1"/>
    <meta:user-defined meta:name="Info 2"/>
    <meta:user-defined meta:name="Info 3"/>
    <meta:user-defined meta:name="Info 4"/>
  </office:meta>
</office:document-meta>
</file>